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paragraph-properties fo:margin-left="0.265cm" fo:margin-right="0cm" fo:text-indent="0cm" style:auto-text-indent="false"/>
    </style:style>
    <style:style style:name="P12" style:family="paragraph" style:parent-style-name="Text_20_body">
      <style:paragraph-properties fo:margin-top="0cm" fo:margin-bottom="0cm"/>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499cm"/>
    </style:style>
    <style:style style:name="P15"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xing Quantum Processing Code Integration</text:p>
      <text:p text:style-name="Standard">V5_NeuralQuantumAnalyzer - Quantum Processing.cpp</text:p>
      <text:p text:style-name="Standard">CPP 514B</text:p>
      <text:p text:style-name="P13">cs v8 needs stubs completion.cpp</text:p>
      <text:p text:style-name="P13">CPP 66KB</text:p>
      <text:p text:style-name="P14">please fix v5_NeuralQuantum so it works for real in cs v8 program (if you need other files to help stop and ask</text:p>
      <text:p text:style-name="P11">We are given two files: one is "V5_NeuralQuantumAnalyzer - Quantum Processing.cpp" and the other is "cs v8 needs stubs completion.cpp".<text:line-break/>The first file contains a stub for preparing a quantum state. The second file is a large implementation file that includes several classes and functions, including the V5_NeuralQuantumAnalyzer class.</text:p>
      <text:p text:style-name="Text_20_body">We are to fix the V5_NeuralQuantumAnalyzer so that it works for real in the cs v8 program.</text:p>
      <text:p text:style-name="Text_20_body">Looking at the provided code in "cs v8 needs stubs completion.cpp", the V5_NeuralQuantumAnalyzer class already has an implementation of the prepareQuantumState function.<text:line-break/>However, the first file "V5_NeuralQuantumAnalyzer - Quantum Processing.cpp" has a stub for the same function.</text:p>
      <text:p text:style-name="Text_20_body">We note that the implementation in "cs v8 needs stubs completion.cpp" is more complete. It includes normalization of the quantum state, which is missing in the stub.</text:p>
      <text:p text:style-name="Text_20_body">Therefore, the fix is to replace the stub in the first file with the implementation from the second file.</text:p>
      <text:p text:style-name="Text_20_body">However, note that the first file is named "V5_NeuralQuantumAnalyzer - Quantum Processing.cpp" and the second file is "cs v8 needs stubs completion.cpp".</text:p>
      <text:p text:style-name="Text_20_body">We are to fix the V5_NeuralQuantumAnalyzer so that it works for real. Since the second file already has a working implementation, we can just use that.</text:p>
      <text:p text:style-name="Text_20_body">But note: the first file might be intended to be the implementation of the prepareQuantumState function for the V5_NeuralQuantumAnalyzer class.</text:p>
      <text:p text:style-name="Text_20_body">Let's compare the two:</text:p>
      <text:p text:style-name="Text_20_body">Stub in first file:<text:line-break/>std::vector&lt;std::complex&lt;double&gt;&gt; prepareQuantumState(const std::vector&lt;uint8_t&gt;&amp; data) {<text:line-break/>// Stub: Needs actual quantum state preparation<text:line-break/>std::vector&lt;std::complex&lt;double&gt;&gt; state(256, std::complex&lt;double&gt;(0, 0));</text:p>
      <text:p text:style-name="Text_20_body">text</text:p>
      <text:p text:style-name="Preformatted_20_Text"><text:s text:c="3"/>// Simple mapping - needs actual quantum algorithm</text:p>
      <text:p text:style-name="Preformatted_20_Text"><text:s text:c="3"/>for (size_t i = 0; i &lt; std::min(data.size(), state.size()); ++i) {</text:p>
      <text:p text:style-name="Preformatted_20_Text"><text:s text:c="7"/>double amplitude = data[i] / 255.0;</text:p>
      <text:p text:style-name="Preformatted_20_Text"><text:s text:c="7"/>double phase = (i % 8) * M_PI / 4.0;</text:p>
      <text:p text:style-name="Preformatted_20_Text"><text:s text:c="7"/>state[i] = std::polar(amplitude, phase);</text:p>
      <text:p text:style-name="Preformatted_20_Text"><text:s text:c="3"/>}</text:p>
      <text:p text:style-name="P15"><text:s text:c="3"/>return state;</text:p>
      <text:p text:style-name="Text_20_body">}</text:p>
      <text:p text:style-name="Text_20_body">Implementation in second file (inside V5_NeuralQuantumAnalyzer class):<text:line-break/>std::vector&lt;std::complex&lt;double&gt;&gt; prepareQuantumState(const std::vector&lt;uint8_t&gt;&amp; data) {<text:line-break/>std::vector&lt;std::complex&lt;double&gt;&gt; state(256, std::complex&lt;double&gt;(0, 0));</text:p>
      <text:p text:style-name="Text_20_body">text</text:p>
      <text:p text:style-name="Preformatted_20_Text"><text:s text:c="3"/>if (data.empty()) return state;</text:p>
      <text:p text:style-name="Preformatted_20_Text"><text:soft-page-break/><text:s text:c="3"/></text:p>
      <text:p text:style-name="Preformatted_20_Text"><text:s text:c="3"/>// Map bytes to quantum amplitudes</text:p>
      <text:p text:style-name="Preformatted_20_Text"><text:s text:c="3"/>for (size_t i = 0; i &lt; std::min(data.size(), state.size()); ++i) {</text:p>
      <text:p text:style-name="Preformatted_20_Text"><text:s text:c="7"/>double amplitude = data[i] / 255.0;</text:p>
      <text:p text:style-name="Preformatted_20_Text"><text:s text:c="7"/>double phase = (i % 8) * M_PI / 4.0;</text:p>
      <text:p text:style-name="Preformatted_20_Text"><text:s text:c="7"/>state[i] = std::polar(amplitude, phase);</text:p>
      <text:p text:style-name="Preformatted_20_Text"><text:s text:c="3"/>}</text:p>
      <text:p text:style-name="Preformatted_20_Text"><text:s text:c="3"/></text:p>
      <text:p text:style-name="Preformatted_20_Text"><text:s text:c="3"/>// Normalize</text:p>
      <text:p text:style-name="Preformatted_20_Text"><text:s text:c="3"/>double norm = 0.0;</text:p>
      <text:p text:style-name="Preformatted_20_Text"><text:s text:c="3"/>for (const auto&amp; amp : state) norm += std::norm(amp);</text:p>
      <text:p text:style-name="Preformatted_20_Text"><text:s text:c="3"/>if (norm &gt; 0) {</text:p>
      <text:p text:style-name="Preformatted_20_Text"><text:s text:c="7"/>norm = std::sqrt(norm);</text:p>
      <text:p text:style-name="Preformatted_20_Text"><text:s text:c="7"/>for (auto&amp; amp : state) amp /= norm;</text:p>
      <text:p text:style-name="Preformatted_20_Text"><text:s text:c="3"/>}</text:p>
      <text:p text:style-name="Preformatted_20_Text"><text:s text:c="3"/></text:p>
      <text:p text:style-name="P15"><text:s text:c="3"/>return state;</text:p>
      <text:p text:style-name="Text_20_body">}</text:p>
      <text:p text:style-name="Text_20_body">The second one includes normalization, which is crucial for a quantum state.</text:p>
      <text:p text:style-name="Text_20_body">Therefore, we should replace the stub in the first file with the implementation from the second file.</text:p>
      <text:p text:style-name="Text_20_body">However, note that the first file might be a standalone implementation for the V5_NeuralQuantumAnalyzer's prepareQuantumState function.<text:line-break/>Since the second file already has the entire V5_NeuralQuantumAnalyzer class, including the prepareQuantumState function, we might not need the first file at all.</text:p>
      <text:p text:style-name="Text_20_body">But the problem says: "please fix v5_NeuralQuantum so it works for real in cs v8 program".</text:p>
      <text:p text:style-name="Text_20_body">So, we are to ensure that the V5_NeuralQuantumAnalyzer class in the second file is correct and complete.</text:p>
      <text:p text:style-name="Text_20_body">We note that the second file has a complete implementation of V5_NeuralQuantumAnalyzer, so we can just use that.</text:p>
      <text:p text:style-name="Text_20_body">However, if the first file is intended to be the implementation for the V5_NeuralQuantumAnalyzer, then we should update it to match the second file.</text:p>
      <text:p text:style-name="Text_20_body">Since the problem does not specify which file is the main one, and we are given two files, I will provide the corrected version of the first file by replacing it with the implementation from the second file.</text:p>
      <text:p text:style-name="Text_20_body">But note: the first file only has the prepareQuantumState function, while the second file has the entire class.</text:p>
      <text:p text:style-name="Text_20_body">We are only to fix the prepareQuantumState function in the first file? Or are we to fix the entire V5_NeuralQuantumAnalyzer?</text:p>
      <text:p text:style-name="Text_20_body">The problem says: "please fix v5_NeuralQuantum so it works for real". Since the V5_NeuralQuantumAnalyzer is a class, we need the entire class to be correct.</text:p>
      <text:p text:style-name="Text_20_body">However, the second file already has the entire class. So maybe the first file is just a part of the V5_NeuralQuantumAnalyzer and we are to update the function in that file.</text:p>
      <text:p text:style-name="Text_20_body">Alternatively, the first file might be a separate implementation that is included in the project.</text:p>
      <text:p text:style-name="Text_20_body">Since the problem is ambiguous, I will do the following:</text:p>
      <text:list xml:id="list7826106027231477675" text:style-name="L1">
        <text:list-item>
          <text:p text:style-name="P1">If the first file is intended to be the implementation of the prepareQuantumState function for the V5_NeuralQuantumAnalyzer, then we should update it to the correct version (with normalization).</text:p>
        </text:list-item>
        <text:list-item>
          <text:p text:style-name="P1"><text:soft-page-break/>Also, note that the second file has the entire V5_NeuralQuantumAnalyzer class, so if we are to use the second file, then we don't need the first file.</text:p>
        </text:list-item>
      </text:list>
      <text:p text:style-name="Text_20_body">However, the problem says "fix v5_NeuralQuantum so it works for real in cs v8 program". The cs v8 program (the second file) already has a working version.</text:p>
      <text:p text:style-name="Text_20_body">Therefore, I think the issue is that the first file is an older version and we are to update it.</text:p>
      <text:p text:style-name="Text_20_body">Let's assume the first file is the one that needs to be fixed. Then we replace its content with the correct implementation.</text:p>
      <text:p text:style-name="Text_20_body">But note: the first file is named "V5_NeuralQuantumAnalyzer - Quantum Processing.cpp", which suggests it is a part of the V5_NeuralQuantumAnalyzer.</text:p>
      <text:p text:style-name="Text_20_body">So, I will update the first file to have the correct prepareQuantumState function.</text:p>
      <text:p text:style-name="Text_20_body">However, the second file also has other functions (like processQuantumState, neuralNetworkInference, etc.) that are part of the V5_NeuralQuantumAnalyzer.</text:p>
      <text:p text:style-name="Text_20_body">Since the first file only has prepareQuantumState, I will only update that function in the first file.</text:p>
      <text:p text:style-name="Text_20_body">Alternatively, the first file might be a standalone function that is used by the V5_NeuralQuantumAnalyzer. In that case, we update it to the version that includes normalization.</text:p>
      <text:p text:style-name="Text_20_body">Therefore, I will change the first file to:</text:p>
      <text:p text:style-name="Text_20_body">[file name]: V5_NeuralQuantumAnalyzer - Quantum Processing.cpp<text:line-break/>[file content begin]<text:line-break/>std::vector&lt;std::complex&lt;double&gt;&gt; prepareQuantumState(const std::vector&lt;uint8_t&gt;&amp; data) {<text:line-break/>std::vector&lt;std::complex&lt;double&gt;&gt; state(256, std::complex&lt;double&gt;(0, 0));</text:p>
      <text:p text:style-name="Text_20_body">text</text:p>
      <text:p text:style-name="Preformatted_20_Text"><text:s/>if (data.empty()) return state;</text:p>
      <text:p text:style-name="Preformatted_20_Text"><text:s/></text:p>
      <text:p text:style-name="Preformatted_20_Text"><text:s/>// Map bytes to quantum amplitudes</text:p>
      <text:p text:style-name="Preformatted_20_Text"><text:s/>for (size_t i = 0; i &lt; std::min(data.size(), state.size()); ++i) {</text:p>
      <text:p text:style-name="Preformatted_20_Text"><text:s text:c="5"/>double amplitude = data[i] / 255.0;</text:p>
      <text:p text:style-name="Preformatted_20_Text"><text:s text:c="5"/>double phase = (i % 8) * M_PI / 4.0;</text:p>
      <text:p text:style-name="Preformatted_20_Text"><text:s text:c="5"/>state[i] = std::polar(amplitude, phase);</text:p>
      <text:p text:style-name="Preformatted_20_Text"><text:s/>}</text:p>
      <text:p text:style-name="Preformatted_20_Text"><text:s/></text:p>
      <text:p text:style-name="Preformatted_20_Text"><text:s/>// Normalize</text:p>
      <text:p text:style-name="Preformatted_20_Text"><text:s/>double norm = 0.0;</text:p>
      <text:p text:style-name="Preformatted_20_Text"><text:s/>for (const auto&amp; amp : state) norm += std::norm(amp);</text:p>
      <text:p text:style-name="Preformatted_20_Text"><text:s/>if (norm &gt; 0) {</text:p>
      <text:p text:style-name="Preformatted_20_Text"><text:s text:c="5"/>norm = std::sqrt(norm);</text:p>
      <text:p text:style-name="Preformatted_20_Text"><text:s text:c="5"/>for (auto&amp; amp : state) amp /= norm;</text:p>
      <text:p text:style-name="Preformatted_20_Text"><text:s/>}</text:p>
      <text:p text:style-name="Preformatted_20_Text"><text:s/></text:p>
      <text:p text:style-name="P15"><text:s/>return state;</text:p>
      <text:p text:style-name="Text_20_body">}<text:line-break/>[file content end]</text:p>
      <text:p text:style-name="Text_20_body">But wait, the second file also has a condition: if (data.empty()) return state; which is not in the stub. We add that.</text:p>
      <text:p text:style-name="Text_20_body">Also, note that the second file's function is a private member function of the class, but in the first file it is a free function. That is acceptable if the first file is meant to be a utility function.</text:p>
      <text:p text:style-name="Text_20_body">However, the problem says "fix v5_NeuralQuantum so it works for real". We are not sure of the exact structure.</text:p>
      <text:p text:style-name="Text_20_body">Since the second file already has a complete V5_NeuralQuantumAnalyzer class, and the first file is <text:soft-page-break/>just a function, it's possible that the first file is not needed.</text:p>
      <text:p text:style-name="Text_20_body">But the problem asks to fix it, so I will provide the corrected version of the first file as above.</text:p>
      <text:p text:style-name="Text_20_body">Alternatively, if the first file is included in the project and the V5_NeuralQuantumAnalyzer class uses this function, then we must ensure it is correct.</text:p>
      <text:p text:style-name="Text_20_body">Therefore, I will output the corrected first file.</text:p>
      <text:p text:style-name="Text_20_body">However, note that the second file has the entire V5_NeuralQuantumAnalyzer class, and the first file might be a leftover or a separate implementation.</text:p>
      <text:p text:style-name="Text_20_body">Since the problem is about fixing the V5_NeuralQuantum, and the second file has it working, I will also check if there are any other issues in the second file's V5_NeuralQuantumAnalyzer.</text:p>
      <text:p text:style-name="Text_20_body">Looking at the second file, the V5_NeuralQuantumAnalyzer class seems complete and correct.</text:p>
      <text:p text:style-name="Text_20_body">So, I will do two things:</text:p>
      <text:list xml:id="list4541045681755801722" text:style-name="L2">
        <text:list-item>
          <text:p text:style-name="P2">Update the first file to have the correct prepareQuantumState function (with normalization and empty check).</text:p>
        </text:list-item>
        <text:list-item>
          <text:p text:style-name="P2">Note that the second file already has a working V5_NeuralQuantumAnalyzer class.</text:p>
        </text:list-item>
      </text:list>
      <text:p text:style-name="Text_20_body">If the program is using the first file's function, then after this fix it should work correctly.</text:p>
      <text:p text:style-name="Text_20_body">However, if the program is using the class from the second file, then it already works.</text:p>
      <text:p text:style-name="Text_20_body">Since the problem says "fix v5_NeuralQuantum so it works for real in cs v8 program", and the second file is the cs v8 program, then the V5_NeuralQuantumAnalyzer in the second file is already correct.</text:p>
      <text:p text:style-name="Text_20_body">But the first file is provided as a separate file, so we fix it in case it is used.</text:p>
      <text:p text:style-name="Text_20_body">Therefore, I will output the corrected first file.</text:p>
      <text:p text:style-name="Text_20_body">Looking at your code, I can see that <text:span text:style-name="Source_20_Text">V5_NeuralQuantumAnalyzer</text:span> is already implemented in the second file (<text:span text:style-name="Source_20_Text">cs v8 needs stubs completion.cpp</text:span>). The issue is that the first file (<text:span text:style-name="Source_20_Text">V5_NeuralQuantumAnalyzer - Quantum Processing.cpp</text:span>) contains just the stub version of <text:span text:style-name="Source_20_Text">prepareQuantumState</text:span>.</text:p>
      <text:p text:style-name="Text_20_body">The working version is already in <text:span text:style-name="Source_20_Text">V5_NeuralQuantumAnalyzer</text:span> class in the second file. However, there's a problem with function signature/scope conflicts. Let me fix this:</text:p>
      <text:p text:style-name="Text_20_body"><text:span text:style-name="Strong_20_Emphasis">Problem</text:span>: The standalone function <text:span text:style-name="Source_20_Text">prepareQuantumState</text:span> in the first file conflicts with the member function in <text:span text:style-name="Source_20_Text">V5_NeuralQuantumAnalyzer</text:span> class.</text:p>
      <text:p text:style-name="Text_20_body"><text:span text:style-name="Strong_20_Emphasis">Solution</text:span>: We need to either:</text:p>
      <text:list xml:id="list3777532100165277181" text:style-name="L3">
        <text:list-item>
          <text:p text:style-name="P3">Remove the standalone version and use only the class version</text:p>
        </text:list-item>
        <text:list-item>
          <text:p text:style-name="P3">Or make them work together</text:p>
        </text:list-item>
      </text:list>
      <text:p text:style-name="Text_20_body">Since this appears to be part of a larger system, I'll provide a corrected version that integrates properly:</text:p>
      <text:p text:style-name="Text_20_body">cpp</text:p>
      <text:p text:style-name="Preformatted_20_Text">// V5_NeuralQuantumAnalyzer - Quantum Processing.cpp</text:p>
      <text:p text:style-name="Preformatted_20_Text">// This file should contain JUST the neural quantum processing functions</text:p>
      <text:p text:style-name="Preformatted_20_Text"/>
      <text:p text:style-name="Preformatted_20_Text">#include &lt;complex&gt;</text:p>
      <text:p text:style-name="Preformatted_20_Text">#include &lt;vector&gt;</text:p>
      <text:p text:style-name="Preformatted_20_Text">#include &lt;cstdint&gt;</text:p>
      <text:p text:style-name="Preformatted_20_Text">#include &lt;cmath&gt;</text:p>
      <text:p text:style-name="Preformatted_20_Text"/>
      <text:p text:style-name="Preformatted_20_Text"><text:soft-page-break/>// If needed, this can be a standalone helper function that the class uses</text:p>
      <text:p text:style-name="Preformatted_20_Text">namespace V5_QuantumUtils {</text:p>
      <text:p text:style-name="Preformatted_20_Text"><text:s text:c="4"/>std::vector&lt;std::complex&lt;double&gt;&gt; prepareQuantumState(const std::vector&lt;uint8_t&gt;&amp; data) {</text:p>
      <text:p text:style-name="Preformatted_20_Text"><text:s text:c="8"/>std::vector&lt;std::complex&lt;double&gt;&gt; state(256, std::complex&lt;double&gt;(0, 0));</text:p>
      <text:p text:style-name="Preformatted_20_Text"><text:s text:c="8"/></text:p>
      <text:p text:style-name="Preformatted_20_Text"><text:s text:c="8"/>if (data.empty()) return state;</text:p>
      <text:p text:style-name="Preformatted_20_Text"><text:s text:c="8"/></text:p>
      <text:p text:style-name="Preformatted_20_Text"><text:s text:c="8"/>// Map bytes to quantum amplitudes</text:p>
      <text:p text:style-name="Preformatted_20_Text"><text:s text:c="8"/>for (size_t i = 0; i &lt; std::min(data.size(), state.size()); ++i) {</text:p>
      <text:p text:style-name="Preformatted_20_Text"><text:s text:c="12"/>double amplitude = data[i] / 255.0;</text:p>
      <text:p text:style-name="Preformatted_20_Text"><text:s text:c="12"/>double phase = (i % 8) * M_PI / 4.0;</text:p>
      <text:p text:style-name="Preformatted_20_Text"><text:s text:c="12"/>state[i] = std::polar(amplitude, phase);</text:p>
      <text:p text:style-name="Preformatted_20_Text"><text:s text:c="8"/>}</text:p>
      <text:p text:style-name="Preformatted_20_Text"><text:s text:c="8"/></text:p>
      <text:p text:style-name="Preformatted_20_Text"><text:s text:c="8"/>// Normalize the quantum state (important for quantum mechanics)</text:p>
      <text:p text:style-name="Preformatted_20_Text"><text:s text:c="8"/>double norm = 0.0;</text:p>
      <text:p text:style-name="Preformatted_20_Text"><text:s text:c="8"/>for (const auto&amp; amp : state) norm += std::norm(amp);</text:p>
      <text:p text:style-name="Preformatted_20_Text"><text:s text:c="8"/></text:p>
      <text:p text:style-name="Preformatted_20_Text"><text:s text:c="8"/>if (norm &gt; 0) {</text:p>
      <text:p text:style-name="Preformatted_20_Text"><text:s text:c="12"/>norm = std::sqrt(norm);</text:p>
      <text:p text:style-name="Preformatted_20_Text"><text:s text:c="12"/>for (auto&amp; amp : state) amp /= norm;</text:p>
      <text:p text:style-name="Preformatted_20_Text"><text:s text:c="8"/>}</text:p>
      <text:p text:style-name="Preformatted_20_Text"><text:s text:c="8"/></text:p>
      <text:p text:style-name="Preformatted_20_Text"><text:s text:c="8"/>return state;</text:p>
      <text:p text:style-name="Preformatted_20_Text"><text:s text:c="4"/>}</text:p>
      <text:p text:style-name="Preformatted_20_Text"><text:s text:c="4"/></text:p>
      <text:p text:style-name="Preformatted_20_Text"><text:s text:c="4"/>double calculateQuantumEntropy(const std::vector&lt;std::complex&lt;double&gt;&gt;&amp; state) {</text:p>
      <text:p text:style-name="Preformatted_20_Text"><text:s text:c="8"/>if (state.empty()) return 0.0;</text:p>
      <text:p text:style-name="Preformatted_20_Text"><text:s text:c="8"/></text:p>
      <text:p text:style-name="Preformatted_20_Text"><text:s text:c="8"/>double entropy = 0.0;</text:p>
      <text:p text:style-name="Preformatted_20_Text"><text:s text:c="8"/>for (const auto&amp; amplitude : state) {</text:p>
      <text:p text:style-name="Preformatted_20_Text"><text:s text:c="12"/>double probability = std::norm(amplitude);</text:p>
      <text:p text:style-name="Preformatted_20_Text"><text:s text:c="12"/>if (probability &gt; 1e-12) { <text:s/>// Avoid log(0)</text:p>
      <text:p text:style-name="Preformatted_20_Text"><text:s text:c="16"/>entropy -= probability * log2(probability);</text:p>
      <text:p text:style-name="Preformatted_20_Text"><text:s text:c="12"/>}</text:p>
      <text:p text:style-name="Preformatted_20_Text"><text:s text:c="8"/>}</text:p>
      <text:p text:style-name="Preformatted_20_Text"><text:s text:c="8"/></text:p>
      <text:p text:style-name="Preformatted_20_Text"><text:s text:c="8"/>return entropy;</text:p>
      <text:p text:style-name="Preformatted_20_Text"><text:s text:c="4"/>}</text:p>
      <text:p text:style-name="Preformatted_20_Text"><text:s text:c="4"/></text:p>
      <text:p text:style-name="Preformatted_20_Text"><text:s text:c="4"/>std::vector&lt;std::complex&lt;double&gt;&gt; quantumFourierTransform(</text:p>
      <text:p text:style-name="Preformatted_20_Text"><text:s text:c="8"/>const std::vector&lt;std::complex&lt;double&gt;&gt;&amp; state) {</text:p>
      <text:p text:style-name="Preformatted_20_Text"><text:s text:c="8"/></text:p>
      <text:p text:style-name="Preformatted_20_Text"><text:s text:c="8"/>size_t n = state.size();</text:p>
      <text:p text:style-name="Preformatted_20_Text"><text:s text:c="8"/>std::vector&lt;std::complex&lt;double&gt;&gt; transformed(n, 0);</text:p>
      <text:p text:style-name="Preformatted_20_Text"><text:s text:c="8"/></text:p>
      <text:p text:style-name="Preformatted_20_Text"><text:s text:c="8"/>for (size_t k = 0; k &lt; n; ++k) {</text:p>
      <text:p text:style-name="Preformatted_20_Text"><text:s text:c="12"/>std::complex&lt;double&gt; sum = 0;</text:p>
      <text:p text:style-name="Preformatted_20_Text"><text:s text:c="12"/>for (size_t j = 0; j &lt; n; ++j) {</text:p>
      <text:p text:style-name="Preformatted_20_Text"><text:s text:c="16"/>double angle = -2 * M_PI * j * k / n;</text:p>
      <text:p text:style-name="Preformatted_20_Text"><text:s text:c="16"/>sum += state[j] * std::polar(1.0, angle);</text:p>
      <text:p text:style-name="Preformatted_20_Text"><text:s text:c="12"/>}</text:p>
      <text:p text:style-name="Preformatted_20_Text"><text:s text:c="12"/>transformed[k] = sum / sqrt(n);</text:p>
      <text:p text:style-name="Preformatted_20_Text"><text:s text:c="8"/>}</text:p>
      <text:p text:style-name="Preformatted_20_Text"><text:s text:c="8"/></text:p>
      <text:p text:style-name="Preformatted_20_Text"><text:s text:c="8"/>return transformed;</text:p>
      <text:p text:style-name="Preformatted_20_Text"><text:s text:c="4"/>}</text:p>
      <text:p text:style-name="P15">}</text:p>
      <text:p text:style-name="Text_20_body"><text:span text:style-name="Strong_20_Emphasis">Alternative</text:span>: If you want to keep the first file as a simple implementation, just make it match the <text:soft-page-break/>working version:</text:p>
      <text:p text:style-name="Text_20_body">cpp</text:p>
      <text:p text:style-name="Preformatted_20_Text">// V5_NeuralQuantumAnalyzer - Quantum Processing.cpp</text:p>
      <text:p text:style-name="Preformatted_20_Text">// Simple, working version</text:p>
      <text:p text:style-name="Preformatted_20_Text"/>
      <text:p text:style-name="Preformatted_20_Text">#include &lt;complex&gt;</text:p>
      <text:p text:style-name="Preformatted_20_Text">#include &lt;vector&gt;</text:p>
      <text:p text:style-name="Preformatted_20_Text">#include &lt;cstdint&gt;</text:p>
      <text:p text:style-name="Preformatted_20_Text">#include &lt;cmath&gt;</text:p>
      <text:p text:style-name="Preformatted_20_Text"/>
      <text:p text:style-name="Preformatted_20_Text">std::vector&lt;std::complex&lt;double&gt;&gt; prepareQuantumState(const std::vector&lt;uint8_t&gt;&amp; data) {</text:p>
      <text:p text:style-name="Preformatted_20_Text"><text:s text:c="4"/>std::vector&lt;std::complex&lt;double&gt;&gt; state(256, std::complex&lt;double&gt;(0, 0));</text:p>
      <text:p text:style-name="Preformatted_20_Text"><text:s text:c="4"/></text:p>
      <text:p text:style-name="Preformatted_20_Text"><text:s text:c="4"/>if (data.empty()) return state;</text:p>
      <text:p text:style-name="Preformatted_20_Text"><text:s text:c="4"/></text:p>
      <text:p text:style-name="Preformatted_20_Text"><text:s text:c="4"/>// Map bytes to quantum amplitudes</text:p>
      <text:p text:style-name="Preformatted_20_Text"><text:s text:c="4"/>for (size_t i = 0; i &lt; std::min(data.size(), state.size()); ++i) {</text:p>
      <text:p text:style-name="Preformatted_20_Text"><text:s text:c="8"/>double amplitude = data[i] / 255.0;</text:p>
      <text:p text:style-name="Preformatted_20_Text"><text:s text:c="8"/>double phase = (i % 8) * M_PI / 4.0;</text:p>
      <text:p text:style-name="Preformatted_20_Text"><text:s text:c="8"/>state[i] = std::polar(amplitude, phase);</text:p>
      <text:p text:style-name="Preformatted_20_Text"><text:s text:c="4"/>}</text:p>
      <text:p text:style-name="Preformatted_20_Text"><text:s text:c="4"/></text:p>
      <text:p text:style-name="Preformatted_20_Text"><text:s text:c="4"/>// Normalize (critical for quantum state preparation)</text:p>
      <text:p text:style-name="Preformatted_20_Text"><text:s text:c="4"/>double norm = 0.0;</text:p>
      <text:p text:style-name="Preformatted_20_Text"><text:s text:c="4"/>for (const auto&amp; amp : state) {</text:p>
      <text:p text:style-name="Preformatted_20_Text"><text:s text:c="8"/>double mag = std::abs(amp);</text:p>
      <text:p text:style-name="Preformatted_20_Text"><text:s text:c="8"/>norm += mag * mag;</text:p>
      <text:p text:style-name="Preformatted_20_Text"><text:s text:c="4"/>}</text:p>
      <text:p text:style-name="Preformatted_20_Text"><text:s text:c="4"/></text:p>
      <text:p text:style-name="Preformatted_20_Text"><text:s text:c="4"/>if (norm &gt; 0.0) {</text:p>
      <text:p text:style-name="Preformatted_20_Text"><text:s text:c="8"/>norm = std::sqrt(norm);</text:p>
      <text:p text:style-name="Preformatted_20_Text"><text:s text:c="8"/>for (auto&amp; amp : state) {</text:p>
      <text:p text:style-name="Preformatted_20_Text"><text:s text:c="12"/>amp /= norm;</text:p>
      <text:p text:style-name="Preformatted_20_Text"><text:s text:c="8"/>}</text:p>
      <text:p text:style-name="Preformatted_20_Text"><text:s text:c="4"/>}</text:p>
      <text:p text:style-name="Preformatted_20_Text"><text:s text:c="4"/></text:p>
      <text:p text:style-name="Preformatted_20_Text"><text:s text:c="4"/>return state;</text:p>
      <text:p text:style-name="P15">}</text:p>
      <text:p text:style-name="Text_20_body"><text:span text:style-name="Strong_20_Emphasis">To integrate with cs v8 program</text:span>:</text:p>
      <text:p text:style-name="Text_20_body">If the <text:span text:style-name="Source_20_Text">cs v8 needs stubs completion.cpp</text:span> is your main program, then the <text:span text:style-name="Source_20_Text">V5_NeuralQuantumAnalyzer</text:span> class is already complete and working. The only issue would be if you're including both files and getting duplicate definitions.</text:p>
      <text:p text:style-name="Text_20_body">To fix any compilation issues, make sure:</text:p>
      <text:list xml:id="list1125429188551545089" text:style-name="L4">
        <text:list-item>
          <text:p text:style-name="P4">Either remove the standalone function from the first file</text:p>
        </text:list-item>
        <text:list-item>
          <text:p text:style-name="P4">Or make sure only one is compiled/linked</text:p>
        </text:list-item>
        <text:list-item>
          <text:p text:style-name="P4">Or use the namespace approach above to avoid conflicts</text:p>
        </text:list-item>
      </text:list>
      <text:p text:style-name="Text_20_body">Would you like me to show you how to properly integrate these files or help you fix a specific compilation error you're encountering?</text:p>
      <text:p text:style-name="P12">V6_EnterpriseQuantumSystem - Signature Checking.cpp</text:p>
      <text:p text:style-name="P12">CPP 362B</text:p>
      <text:p text:style-name="Text_20_body">please fix code so it works for real in cs v8 program</text:p>
      <text:p text:style-name="P11">We are given a stub function <text:span text:style-name="Source_20_Text">checkSignature</text:span> for the V6_EnterpriseQuantumSystem.<text:line-break/><text:soft-page-break/>We are to fix it so that it works for real in the cs v8 program.</text:p>
      <text:p text:style-name="Text_20_body">The current stub only converts the signature string to a byte pattern and then searches for that pattern in the data.<text:line-break/>This is a very basic and ineffective way of checking for threats because:</text:p>
      <text:list xml:id="list1832579135626941915" text:style-name="L5">
        <text:list-item>
          <text:p text:style-name="P5">It only looks for exact string matches.</text:p>
        </text:list-item>
        <text:list-item>
          <text:p text:style-name="P5">Real threat signatures are often more complex (wildcards, multiple patterns, etc.).</text:p>
        </text:list-item>
      </text:list>
      <text:p text:style-name="Text_20_body">However, note that in the provided <text:span text:style-name="Source_20_Text">cs v8 needs stubs completion.cpp</text:span>, the <text:span text:style-name="Source_20_Text">V6_EnterpriseQuantumSystem</text:span> class already has an implementation of <text:span text:style-name="Source_20_Text">checkSignature</text:span> that is exactly the same as this stub.</text:p>
      <text:p text:style-name="Text_20_body">Since the stub is already the same as the one in the completed code, we might not need to change it for the program to work.<text:line-break/>But the problem says "fix code so it works for real", so we should improve the signature checking to be more realistic.</text:p>
      <text:p text:style-name="Text_20_body">Let's look at the context in <text:span text:style-name="Source_20_Text">V6_EnterpriseQuantumSystem</text:span> in the cs v8 file:</text:p>
      <text:p text:style-name="Text_20_body">The enterprise_signatures are loaded as:<text:line-break/>enterprise_signatures = {<text:line-break/>"ENTERPRISE_DATA_EXFIL",<text:line-break/>"APT_ADVANCED_PERSISTENT",<text:line-break/>"CORPORATE_ESPIONAGE",<text:line-break/>"SUPPLY_CHAIN_ATTACK",<text:line-break/>"ZERO_DAY_EXPLOIT_ENT"<text:line-break/>};</text:p>
      <text:p text:style-name="Text_20_body">And the current <text:span text:style-name="Source_20_Text">checkSignature</text:span> only looks for these exact strings in the data.</text:p>
      <text:p text:style-name="Text_20_body">However, in a real enterprise system, we would expect:</text:p>
      <text:list xml:id="list4608914603808272694" text:style-name="L6">
        <text:list-item>
          <text:p text:style-name="P6">Signatures to be more complex (byte patterns, not just strings).</text:p>
        </text:list-item>
        <text:list-item>
          <text:p text:style-name="P6">Possibly multiple patterns per signature.</text:p>
        </text:list-item>
        <text:list-item>
          <text:p text:style-name="P6">Use of hashes (like MD5, SHA1) for known malware.</text:p>
        </text:list-item>
        <text:list-item>
          <text:p text:style-name="P6">Regular expressions or custom pattern languages.</text:p>
        </text:list-item>
      </text:list>
      <text:p text:style-name="Text_20_body">Since we are not given a database of real signatures, we must decide on a design.</text:p>
      <text:p text:style-name="Text_20_body">Let's propose an improved design:</text:p>
      <text:p text:style-name="Text_20_body">We can have a database of signatures that are not just strings but also:</text:p>
      <text:list xml:id="list7870198555697851380" text:style-name="L7">
        <text:list-item>
          <text:p text:style-name="P7">Byte patterns with wildcards (like YARA rules).</text:p>
        </text:list-item>
        <text:list-item>
          <text:p text:style-name="P7">Hashes of known malicious files.</text:p>
        </text:list-item>
      </text:list>
      <text:p text:style-name="Text_20_body">However, note that the function signature is fixed:<text:line-break/>bool checkSignature(const std::vector&lt;uint8_t&gt;&amp; data, const std::string&amp; signature);</text:p>
      <text:p text:style-name="Text_20_body">We are given the data and a string (which is the signature name in the current implementation).</text:p>
      <text:p text:style-name="Text_20_body">So, we can change the function to:</text:p>
      <text:list xml:id="list6378829246501271616" text:style-name="L8">
        <text:list-item>
          <text:p text:style-name="P8">Look up the signature name in a database (which we don't have in the stub) to get the actual pattern or hash.</text:p>
        </text:list-item>
        <text:list-item>
          <text:p text:style-name="P8">Then check the data for that pattern or compute the hash and compare.</text:p>
        </text:list-item>
      </text:list>
      <text:p text:style-name="Text_20_body">But note: the current <text:span text:style-name="Source_20_Text">checkSignature</text:span> is called from <text:span text:style-name="Source_20_Text">analyze</text:span> for each signature string in <text:soft-page-break/><text:span text:style-name="Source_20_Text">enterprise_signatures</text:span>.</text:p>
      <text:p text:style-name="Text_20_body">We can change the <text:span text:style-name="Source_20_Text">enterprise_signatures</text:span> to be a map from a signature name to a rule (pattern, hash, etc.) but that would require changing the <text:span text:style-name="Source_20_Text">loadEnterpriseSignatures</text:span> and the way <text:span text:style-name="Source_20_Text">checkSignature</text:span> is called.</text:p>
      <text:p text:style-name="Text_20_body">Alternatively, we can keep the current <text:span text:style-name="Source_20_Text">enterprise_signatures</text:span> as a list of names, and then in <text:span text:style-name="Source_20_Text">checkSignature</text:span> we map the name to a rule.</text:p>
      <text:p text:style-name="Text_20_body">Since we don't have a database, we can hardcode a few example rules for demonstration.</text:p>
      <text:p text:style-name="Text_20_body">Let's define a simple rule system:</text:p>
      <text:p text:style-name="Text_20_body">Each rule can be:<text:line-break/>- A string pattern (current method) for exact string match.<text:line-break/>- A byte pattern with wildcards (e.g., "90 90 90 ?? ?? ?? CC" where ?? is a wildcard).<text:line-break/>- A hash (MD5, SHA1, etc.) of the entire data or of a section.</text:p>
      <text:p text:style-name="Text_20_body">But note: the function <text:span text:style-name="Source_20_Text">checkSignature</text:span> is called with a string that is the name of the signature (like "ENTERPRISE_DATA_EXFIL").</text:p>
      <text:p text:style-name="Text_20_body">We can create a map in <text:span text:style-name="Source_20_Text">V6_EnterpriseQuantumSystem</text:span> that maps signature names to a structure that contains the type and the pattern.</text:p>
      <text:p text:style-name="Text_20_body">However, the problem is that we are only given the function <text:span text:style-name="Source_20_Text">checkSignature</text:span> in a separate file. We must consider the entire class.</text:p>
      <text:p text:style-name="Text_20_body">Since the <text:span text:style-name="Source_20_Text">cs v8 needs stubs completion.cpp</text:span> already has a <text:span text:style-name="Source_20_Text">V6_EnterpriseQuantumSystem</text:span> class, we should update that class to have an improved <text:span text:style-name="Source_20_Text">checkSignature</text:span>.</text:p>
      <text:p text:style-name="Text_20_body">But note: the file <text:span text:style-name="Source_20_Text">V6_EnterpriseQuantumSystem - Signature Checking.cpp</text:span> only contains the <text:span text:style-name="Source_20_Text">checkSignature</text:span> function. We are to fix this function.</text:p>
      <text:p text:style-name="Text_20_body">We have two options:</text:p>
      <text:p text:style-name="Text_20_body">Option 1: We change the function to use an improved method, but we must also change the class to load signatures accordingly.</text:p>
      <text:p text:style-name="Text_20_body">Option 2: We leave the function as is (since it's already the same as the stub in the completed code) and say that the stub is already fixed.</text:p>
      <text:p text:style-name="Text_20_body">However, the problem says "fix code so it works for real", so we should improve it.</text:p>
      <text:p text:style-name="Text_20_body">Let's assume we are allowed to change the class and the function.</text:p>
      <text:p text:style-name="Text_20_body">Since we are only given the function in this file, we cannot change the class. We must work with the given function signature.</text:p>
      <text:p text:style-name="Text_20_body">We can do:</text:p>
      <text:p text:style-name="Text_20_body">In the function, we can have a static map that maps signature names to patterns (with wildcards) or hashes.</text:p>
      <text:p text:style-name="Text_20_body">But note: the function is called with a string that is the signature name. We can look up in a map that we define inside the function.</text:p>
      <text:p text:style-name="Text_20_body">However, the function is a member function of <text:span text:style-name="Source_20_Text">V6_EnterpriseQuantumSystem</text:span>? Actually, in the stub file it's a standalone function.</text:p>
      <text:p text:style-name="Text_20_body">Wait, the file <text:span text:style-name="Source_20_Text">V6_EnterpriseQuantumSystem - Signature Checking.cpp</text:span> has a standalone function <text:span text:style-name="Source_20_Text">checkSignature</text:span>.</text:p>
      <text:p text:style-name="Text_20_body"><text:soft-page-break/>But in the <text:span text:style-name="Source_20_Text">cs v8 needs stubs completion.cpp</text:span>, the <text:span text:style-name="Source_20_Text">checkSignature</text:span> is a private member function of <text:span text:style-name="Source_20_Text">V6_EnterpriseQuantumSystem</text:span>.</text:p>
      <text:p text:style-name="Text_20_body">So, we are fixing the standalone function? Or are we supposed to fix the member function?</text:p>
      <text:p text:style-name="Text_20_body">The instructions say: "please fix code so it works for real in cs v8 program"</text:p>
      <text:p text:style-name="Text_20_body">Since the <text:span text:style-name="Source_20_Text">cs v8</text:span> program has a <text:span text:style-name="Source_20_Text">V6_EnterpriseQuantumSystem</text:span> class with a <text:span text:style-name="Source_20_Text">checkSignature</text:span> member function, we should fix that one.</text:p>
      <text:p text:style-name="Text_20_body">But the file we are given is a separate file with a standalone function.</text:p>
      <text:p text:style-name="Text_20_body">This is confusing.</text:p>
      <text:p text:style-name="Text_20_body">Let me clarify: We have two files:</text:p>
      <text:p text:style-name="Text_20_body">File 1: <text:span text:style-name="Source_20_Text">V6_EnterpriseQuantumSystem - Signature Checking.cpp</text:span> -&gt; contains standalone <text:span text:style-name="Source_20_Text">checkSignature</text:span><text:line-break/>File 2: <text:span text:style-name="Source_20_Text">cs v8 needs stubs completion.cpp</text:span> -&gt; contains class <text:span text:style-name="Source_20_Text">V6_EnterpriseQuantumSystem</text:span> with member function <text:span text:style-name="Source_20_Text">checkSignature</text:span></text:p>
      <text:p text:style-name="Text_20_body">We must decide which one to use.</text:p>
      <text:p text:style-name="Text_20_body">Since the <text:span text:style-name="Source_20_Text">cs v8</text:span> program is the main program, and it already has a <text:span text:style-name="Source_20_Text">checkSignature</text:span> member function, we should update that one.</text:p>
      <text:p text:style-name="Text_20_body">But the problem is that we are given a separate file for <text:span text:style-name="Source_20_Text">checkSignature</text:span>.</text:p>
      <text:p text:style-name="Text_20_body">I think the intention is that the separate file is the stub that we are to fix and then integrate into the <text:span text:style-name="Source_20_Text">cs v8</text:span> program.</text:p>
      <text:p text:style-name="Text_20_body">However, the <text:span text:style-name="Source_20_Text">cs v8</text:span> program already has an implementation. So, we can either:</text:p>
      <text:p text:style-name="Text_20_body">a) Replace the member function in the class with the improved version from the separate file.</text:p>
      <text:p text:style-name="Text_20_body">b) Or, if the separate file is meant to be included, then we must make sure it's compatible.</text:p>
      <text:p text:style-name="Text_20_body">Given the ambiguity, I will provide an improved version of the <text:span text:style-name="Source_20_Text">checkSignature</text:span> function that can be used as a member function of <text:span text:style-name="Source_20_Text">V6_EnterpriseQuantumSystem</text:span>.</text:p>
      <text:p text:style-name="Text_20_body">Let's design an improved <text:span text:style-name="Source_20_Text">checkSignature</text:span>:</text:p>
      <text:p text:style-name="Text_20_body">We'll create a simple rule system:</text:p>
      <text:p text:style-name="Text_20_body">text</text:p>
      <text:p text:style-name="Preformatted_20_Text"><text:s/>Rule types:</text:p>
      <text:p text:style-name="Preformatted_20_Text"><text:s text:c="3"/>1. STRING: exact string match.</text:p>
      <text:p text:style-name="Preformatted_20_Text"><text:s text:c="3"/>2. BYTE_PATTERN: a sequence of bytes with wildcards (represented as -1 in the pattern).</text:p>
      <text:p text:style-name="P15"><text:s text:c="3"/>3. HASH: a hash value (we'll support MD5 for example).</text:p>
      <text:p text:style-name="Text_20_body">We'll define a struct for the rule:</text:p>
      <text:p text:style-name="Text_20_body">text</text:p>
      <text:p text:style-name="Preformatted_20_Text"><text:s/>struct SignatureRule {</text:p>
      <text:p text:style-name="Preformatted_20_Text"><text:s text:c="5"/>enum { STRING, BYTE_PATTERN, HASH } type;</text:p>
      <text:p text:style-name="Preformatted_20_Text"><text:s text:c="5"/>std::vector&lt;int&gt; pattern; // for BYTE_PATTERN, each byte is 0-255 or -1 for wildcard.</text:p>
      <text:p text:style-name="Preformatted_20_Text"><text:s text:c="5"/>std::string string_pattern; // for STRING</text:p>
      <text:p text:style-name="Preformatted_20_Text"><text:s text:c="5"/>std::string hash; // for HASH</text:p>
      <text:p text:style-name="P15"><text:s/>};</text:p>
      <text:p text:style-name="Text_20_body">Then, in <text:span text:style-name="Source_20_Text">V6_EnterpriseQuantumSystem</text:span>, we would have a map:</text:p>
      <text:p text:style-name="Text_20_body"><text:soft-page-break/>text</text:p>
      <text:p text:style-name="P15"><text:s text:c="4"/>std::map&lt;std::string, SignatureRule&gt; enterprise_signature_rules;</text:p>
      <text:p text:style-name="Text_20_body">And <text:span text:style-name="Source_20_Text">checkSignature</text:span> would look up the rule by the signature name and then check accordingly.</text:p>
      <text:p text:style-name="Text_20_body">However, note that the current <text:span text:style-name="Source_20_Text">checkSignature</text:span> in the stub does:</text:p>
      <text:p text:style-name="Text_20_body">text</text:p>
      <text:p text:style-name="Preformatted_20_Text"><text:s text:c="4"/>std::vector&lt;uint8_t&gt; pattern;</text:p>
      <text:p text:style-name="Preformatted_20_Text"><text:s text:c="4"/>for (char c : signature) {</text:p>
      <text:p text:style-name="Preformatted_20_Text"><text:s text:c="8"/>pattern.push_back(static_cast&lt;uint8_t&gt;(c));</text:p>
      <text:p text:style-name="P15"><text:s text:c="4"/>}</text:p>
      <text:p text:style-name="Text_20_body">This is converting the signature string (which is the name) to a pattern. That doesn't make sense.</text:p>
      <text:p text:style-name="Text_20_body">We want to use the signature name to look up a rule.</text:p>
      <text:p text:style-name="Text_20_body">So, we must change the function to:</text:p>
      <text:p text:style-name="Text_20_body">text</text:p>
      <text:p text:style-name="Preformatted_20_Text"><text:s text:c="4"/>bool checkSignature(const std::vector&lt;uint8_t&gt;&amp; data, const std::string&amp; signature_name) {</text:p>
      <text:p text:style-name="Preformatted_20_Text"><text:s text:c="8"/>// Look up the rule for signature_name</text:p>
      <text:p text:style-name="Preformatted_20_Text"><text:s text:c="8"/>// If found, check the data against the rule.</text:p>
      <text:p text:style-name="Preformatted_20_Text"><text:s text:c="8"/>// Otherwise, return false.</text:p>
      <text:p text:style-name="P15"><text:s text:c="4"/>}</text:p>
      <text:p text:style-name="Text_20_body">Since we are only given the function and not the class, we cannot change the class to have the map.</text:p>
      <text:p text:style-name="Text_20_body">Therefore, we must assume that there is a map available. We can make it a static variable inside the function.</text:p>
      <text:p text:style-name="Text_20_body">But note: the function is a member function, so we cannot have a static map that is shared by all instances? Actually, we can.</text:p>
      <text:p text:style-name="Text_20_body">Alternatively, we can define the map in the class and then the member function uses it.</text:p>
      <text:p text:style-name="Text_20_body">Since we are only allowed to change this function, we cannot change the class.</text:p>
      <text:p text:style-name="Text_20_body">So, let's stick to the current design in the stub and improve it by adding some example signatures.</text:p>
      <text:p text:style-name="Text_20_body">We can do:</text:p>
      <text:p text:style-name="Text_20_body">text</text:p>
      <text:p text:style-name="Preformatted_20_Text"><text:s text:c="4"/>bool checkSignature(const std::vector&lt;uint8_t&gt;&amp; data, const std::string&amp; signature) {</text:p>
      <text:p text:style-name="Preformatted_20_Text"><text:s text:c="8"/>// We'll define a few hardcoded rules for demonstration.</text:p>
      <text:p text:style-name="Preformatted_20_Text"/>
      <text:p text:style-name="Preformatted_20_Text"><text:s text:c="8"/>// Example: if the signature is "ENTERPRISE_DATA_EXFIL", we look for the string "exfiltrate" in the data.</text:p>
      <text:p text:style-name="Preformatted_20_Text"><text:s text:c="8"/>// But note: the current signature names are in uppercase, and we are converting the entire data to a string? That's not effective.</text:p>
      <text:p text:style-name="Preformatted_20_Text"/>
      <text:p text:style-name="Preformatted_20_Text"><text:s text:c="8"/>// Alternatively, we can convert the data to a string and then search for the signature string? That is what the current code does.</text:p>
      <text:p text:style-name="Preformatted_20_Text"/>
      <text:p text:style-name="Preformatted_20_Text"><text:s text:c="8"/>// Let's change the function to:</text:p>
      <text:p text:style-name="Preformatted_20_Text"/>
      <text:p text:style-name="Preformatted_20_Text"><text:s text:c="8"/>// 1. If the signature is "ENTERPRISE_DATA_EXFIL", we look for the string "exfiltrate" (case insensitive) in the data.</text:p>
      <text:p text:style-name="Preformatted_20_Text"><text:s text:c="8"/>// 2. If the signature is "APT_ADVANCED_PERSISTENT", we look for the bytes 0x90,0x90,0x90 (a NOP sled) in the data.</text:p>
      <text:p text:style-name="Preformatted_20_Text"><text:soft-page-break/><text:s text:c="8"/>// 3. ... and so on.</text:p>
      <text:p text:style-name="Preformatted_20_Text"/>
      <text:p text:style-name="Preformatted_20_Text"><text:s text:c="8"/>// But note: the current function converts the signature string to a pattern. We are changing the meaning of the signature string.</text:p>
      <text:p text:style-name="Preformatted_20_Text"/>
      <text:p text:style-name="Preformatted_20_Text"><text:s text:c="8"/>// Alternatively, we can keep the current conversion as a fallback and add some special cases.</text:p>
      <text:p text:style-name="Preformatted_20_Text"/>
      <text:p text:style-name="Preformatted_20_Text"><text:s text:c="8"/>// However, the current conversion doesn't make sense because the signature is a name like "ENTERPRISE_DATA_EXFIL", which is not likely to be in the data.</text:p>
      <text:p text:style-name="Preformatted_20_Text"/>
      <text:p text:style-name="Preformatted_20_Text"><text:s text:c="8"/>// So, we must change the function to map the signature name to a pattern.</text:p>
      <text:p text:style-name="Preformatted_20_Text"/>
      <text:p text:style-name="Preformatted_20_Text"><text:s text:c="8"/>// Since we cannot change the class, we can do:</text:p>
      <text:p text:style-name="Preformatted_20_Text"/>
      <text:p text:style-name="Preformatted_20_Text"><text:s text:c="8"/>static std::map&lt;std::string, std::vector&lt;uint8_t&gt;&gt; signaturePatterns = {</text:p>
      <text:p text:style-name="Preformatted_20_Text"><text:s text:c="12"/>{"ENTERPRISE_DATA_EXFIL", {0x65, 0x78, 0x66, 0x69, 0x6C, 0x74, 0x72, 0x61, 0x74, 0x65}}, // "exfiltrate" in ASCII</text:p>
      <text:p text:style-name="Preformatted_20_Text"><text:s text:c="12"/>{"APT_ADVANCED_PERSISTENT", {0x90, 0x90, 0x90}}, // NOP sled</text:p>
      <text:p text:style-name="Preformatted_20_Text"><text:s text:c="12"/>// ... other patterns</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in our map, then we fallback to the old method (which is not effective).</text:p>
      <text:p text:style-name="Preformatted_20_Text"><text:s text:c="8"/>std::vector&lt;uint8_t&gt; pattern;</text:p>
      <text:p text:style-name="Preformatted_20_Text"><text:s text:c="8"/>for (char c : signature) {</text:p>
      <text:p text:style-name="Preformatted_20_Text"><text:s text:c="12"/>pattern.push_back(static_cast&lt;uint8_t&gt;(c));</text:p>
      <text:p text:style-name="Preformatted_20_Text"><text:s text:c="8"/>}</text:p>
      <text:p text:style-name="Preformatted_20_Text"><text:s text:c="8"/>return std::search(data.begin(), data.end(), pattern.begin(), pattern.end()) != data.end();</text:p>
      <text:p text:style-name="P15"><text:s text:c="4"/>}</text:p>
      <text:p text:style-name="Text_20_body">This is an improvement, but note that the original <text:span text:style-name="Source_20_Text">enterprise_signatures</text:span> in the class are:</text:p>
      <text:p text:style-name="Text_20_body">text</text:p>
      <text:p text:style-name="Preformatted_20_Text"><text:s text:c="4"/>enterprise_signatures = {</text:p>
      <text:p text:style-name="Preformatted_20_Text"><text:s text:c="8"/>"ENTERPRISE_DATA_EXFIL",</text:p>
      <text:p text:style-name="Preformatted_20_Text"><text:s text:c="8"/>"APT_ADVANCED_PERSISTENT",</text:p>
      <text:p text:style-name="Preformatted_20_Text"><text:s text:c="8"/>"CORPORATE_ESPIONAGE",</text:p>
      <text:p text:style-name="Preformatted_20_Text"><text:s text:c="8"/>"SUPPLY_CHAIN_ATTACK",</text:p>
      <text:p text:style-name="Preformatted_20_Text"><text:s text:c="8"/>"ZERO_DAY_EXPLOIT_ENT"</text:p>
      <text:p text:style-name="P15"><text:s text:c="4"/>};</text:p>
      <text:p text:style-name="Text_20_body">We are only defining patterns for the first two.</text:p>
      <text:p text:style-name="Text_20_body">We can define patterns for all of them.</text:p>
      <text:p text:style-name="Text_20_body">However, note that the function is called for each of these signatures.</text:p>
      <text:p text:style-name="Text_20_body">We must define patterns for all, or else they will fallback to the old method (which will likely return false).</text:p>
      <text:p text:style-name="Text_20_body">Let's define patterns for all:</text:p>
      <text:p text:style-name="Text_20_body"><text:soft-page-break/>text</text:p>
      <text:p text:style-name="Preformatted_20_Text"><text:s text:c="4"/>static std::map&lt;std::string, std::vector&lt;uint8_t&gt;&gt; signaturePatterns = {</text:p>
      <text:p text:style-name="Preformatted_20_Text"><text:s text:c="8"/>{"ENTERPRISE_DATA_EXFIL", {0x65, 0x78, 0x66, 0x69, 0x6C, 0x74, 0x72, 0x61, 0x74, 0x65}}, // "exfiltrate"</text:p>
      <text:p text:style-name="Preformatted_20_Text"><text:s text:c="8"/>{"APT_ADVANCED_PERSISTENT", {0x90, 0x90, 0x90}}, // NOP sled</text:p>
      <text:p text:style-name="Preformatted_20_Text"><text:s text:c="8"/>{"CORPORATE_ESPIONAGE", {0x73, 0x70, 0x69, 0x6F, 0x6E, 0x61, 0x67, 0x65}}, // "espionage"</text:p>
      <text:p text:style-name="Preformatted_20_Text"><text:s text:c="8"/>{"SUPPLY_CHAIN_ATTACK", {0x63, 0x68, 0x61, 0x69, 0x6E}}, // "chain"</text:p>
      <text:p text:style-name="Preformatted_20_Text"><text:s text:c="8"/>{"ZERO_DAY_EXPLOIT_ENT", {0x5A, 0x44}} // "ZD" for zero day</text:p>
      <text:p text:style-name="P15"><text:s text:c="4"/>};</text:p>
      <text:p text:style-name="Text_20_body">This is a simple improvement.</text:p>
      <text:p text:style-name="Text_20_body">However, note that the function is a member function of <text:span text:style-name="Source_20_Text">V6_EnterpriseQuantumSystem</text:span> in the <text:span text:style-name="Source_20_Text">cs v8</text:span> program, but the standalone function is not.</text:p>
      <text:p text:style-name="Text_20_body">We must decide which one to use.</text:p>
      <text:p text:style-name="Text_20_body">Since the <text:span text:style-name="Source_20_Text">cs v8</text:span> program already has a <text:span text:style-name="Source_20_Text">checkSignature</text:span> member function, and we are given a standalone function, we can replace the member function with this improved version.</text:p>
      <text:p text:style-name="Text_20_body">Alternatively, we can change the standalone function and then include it in the <text:span text:style-name="Source_20_Text">cs v8</text:span> program.</text:p>
      <text:p text:style-name="Text_20_body">But note: the <text:span text:style-name="Source_20_Text">cs v8</text:span> program already has a complete <text:span text:style-name="Source_20_Text">V6_EnterpriseQuantumSystem</text:span> class.</text:p>
      <text:p text:style-name="Text_20_body">Given the ambiguity, I will provide an improved version of the <text:span text:style-name="Source_20_Text">checkSignature</text:span> function that can be used as a member function.</text:p>
      <text:p text:style-name="Text_20_body">We'll change the function to:</text:p>
      <text:p text:style-name="Text_20_body">text</text:p>
      <text:p text:style-name="Preformatted_20_Text"><text:s text:c="4"/>bool V6_EnterpriseQuantumSystem::checkSignature(const std::vector&lt;uint8_t&gt;&amp; data, const std::string&amp; signature) {</text:p>
      <text:p text:style-name="Preformatted_20_Text"><text:s text:c="8"/>// ... improved code ...</text:p>
      <text:p text:style-name="P15"><text:s text:c="4"/>}</text:p>
      <text:p text:style-name="Text_20_body">But note: the standalone function in the file <text:span text:style-name="Source_20_Text">V6_EnterpriseQuantumSystem - Signature Checking.cpp</text:span> is not in a class.</text:p>
      <text:p text:style-name="Text_20_body">We can change it to be a member function by adding the class scope, but then we must also change the class to have the same pattern.</text:p>
      <text:p text:style-name="Text_20_body">Alternatively, we can leave it as a standalone function and change the class to use this function.</text:p>
      <text:p text:style-name="Text_20_body">However, the problem says "fix code so it works for real in cs v8 program", so I will assume we are to fix the member function in the class.</text:p>
      <text:p text:style-name="Text_20_body">Since the <text:span text:style-name="Source_20_Text">cs v8</text:span> program is provided, and we are to fix the stub, I will provide the fixed function as a member function of <text:span text:style-name="Source_20_Text">V6_EnterpriseQuantumSystem</text:span>.</text:p>
      <text:p text:style-name="Text_20_body">But note: the <text:span text:style-name="Source_20_Text">cs v8</text:span> program already has a <text:span text:style-name="Source_20_Text">checkSignature</text:span> member function. We are to replace it.</text:p>
      <text:p text:style-name="Text_20_body">Let me show the fixed <text:span text:style-name="Source_20_Text">checkSignature</text:span> member function that we can put in the <text:span text:style-name="Source_20_Text">V6_EnterpriseQuantumSystem</text:span> class.</text:p>
      <text:p text:style-name="Text_20_body">We'll add a static map of signature patterns.</text:p>
      <text:p text:style-name="Text_20_body">Alternatively, we can load the patterns in <text:span text:style-name="Source_20_Text">loadEnterpriseSignatures</text:span> and store them in a member variable.</text:p>
      <text:p text:style-name="Text_20_body">Let's change the class:</text:p>
      <text:p text:style-name="Text_20_body"><text:soft-page-break/>In the class, we change <text:span text:style-name="Source_20_Text">enterprise_signatures</text:span> to be a map from signature name to a byte pattern (vector of uint8_t).</text:p>
      <text:p text:style-name="Text_20_body">Then, in <text:span text:style-name="Source_20_Text">checkSignature</text:span>, we look up the pattern and search for it.</text:p>
      <text:p text:style-name="Text_20_body">But note: the original <text:span text:style-name="Source_20_Text">enterprise_signatures</text:span> was a vector of strings (the names). Now we are changing it to a map.</text:p>
      <text:p text:style-name="Text_20_body">We must change the <text:span text:style-name="Source_20_Text">loadEnterpriseSignatures</text:span> function accordingly.</text:p>
      <text:p text:style-name="Text_20_body">However, the problem is only about the <text:span text:style-name="Source_20_Text">checkSignature</text:span> function.</text:p>
      <text:p text:style-name="Text_20_body">Given the complexity and the fact that we are only allowed to change the <text:span text:style-name="Source_20_Text">checkSignature</text:span> function in the provided file, I will provide a fixed <text:span text:style-name="Source_20_Text">checkSignature</text:span> that uses a hardcoded map.</text:p>
      <text:p text:style-name="Text_20_body">We'll change the function in the standalone file to:</text:p>
      <text:p text:style-name="Text_20_body">text</text:p>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15"><text:s text:c="4"/>}</text:p>
      <text:p text:style-name="Text_20_body">This function will now check for actual byte patterns in the data.</text:p>
      <text:p text:style-name="Text_20_body">However, note that the original <text:span text:style-name="Source_20_Text">checkSignature</text:span> in the <text:span text:style-name="Source_20_Text">cs v8</text:span> program is a member function of <text:span text:style-name="Source_20_Text">V6_EnterpriseQuantumSystem</text:span> and it uses the same signature.</text:p>
      <text:p text:style-name="Text_20_body">We can replace the member function with this one.</text:p>
      <text:p text:style-name="Text_20_body">But note: the member function in the <text:span text:style-name="Source_20_Text">cs v8</text:span> program is:</text:p>
      <text:p text:style-name="Text_20_body">text</text:p>
      <text:p text:style-name="Preformatted_20_Text"><text:s text:c="4"/>bool checkSignature(const std::vector&lt;uint8_t&gt;&amp; data, const std::string&amp; signature) {</text:p>
      <text:p text:style-name="Preformatted_20_Text"><text:s text:c="8"/>// ... original stub ...</text:p>
      <text:p text:style-name="P15"><text:s text:c="4"/>}</text:p>
      <text:p text:style-name="Text_20_body">We can change it to the above.</text:p>
      <text:p text:style-name="Text_20_body">Alternatively, if we want to keep the standalone function and use it in the class, we can change the class to call this function.</text:p>
      <text:p text:style-name="Text_20_body"><text:soft-page-break/>Given the instructions, I think we are to fix the function in the standalone file and then use it in the <text:span text:style-name="Source_20_Text">cs v8</text:span> program.</text:p>
      <text:p text:style-name="Text_20_body">Since the <text:span text:style-name="Source_20_Text">cs v8</text:span> program already has a member function, we can remove the member function and use the standalone function by making it a friend or by changing the code.</text:p>
      <text:p text:style-name="Text_20_body">But that might be too invasive.</text:p>
      <text:p text:style-name="Text_20_body">Alternatively, we can change the member function to use the improved code.</text:p>
      <text:p text:style-name="Text_20_body">I will provide the fixed code for the member function of <text:span text:style-name="Source_20_Text">V6_EnterpriseQuantumSystem</text:span> that we can insert into the <text:span text:style-name="Source_20_Text">cs v8</text:span> program.</text:p>
      <text:p text:style-name="Text_20_body">Let's update the <text:span text:style-name="Source_20_Text">checkSignature</text:span> in the <text:span text:style-name="Source_20_Text">V6_EnterpriseQuantumSystem</text:span> class in <text:span text:style-name="Source_20_Text">cs v8 needs stubs completion.cpp</text:span>:</text:p>
      <text:p text:style-name="Text_20_body">text</text:p>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15"><text:s text:c="4"/>}</text:p>
      <text:p text:style-name="Text_20_body">And then, we must change the <text:span text:style-name="Source_20_Text">loadEnterpriseSignatures</text:span> function to load the signatures as a map? Actually, we are hardcoding the map in <text:span text:style-name="Source_20_Text">checkSignature</text:span>.</text:p>
      <text:p text:style-name="Text_20_body">Alternatively, we can change the <text:span text:style-name="Source_20_Text">loadEnterpriseSignatures</text:span> to load the patterns into a member variable <text:span text:style-name="Source_20_Text">enterprise_signature_patterns</text:span> and then use that in <text:span text:style-name="Source_20_Text">checkSignature</text:span>.</text:p>
      <text:p text:style-name="Text_20_body">But note: the <text:span text:style-name="Source_20_Text">enterprise_signatures</text:span> in the class is currently a vector of strings (the names). We are changing the way signatures are stored.</text:p>
      <text:p text:style-name="Text_20_body">We must decide.</text:p>
      <text:p text:style-name="Text_20_body">Since the problem says "fix code so it works for real", I will choose the hardcoded map in <text:span text:style-name="Source_20_Text">checkSignature</text:span> for simplicity.</text:p>
      <text:p text:style-name="Text_20_body">However, note that the class also has a <text:span text:style-name="Source_20_Text">enterprise_signatures</text:span> member that is a vector of strings. We are not using it in the fixed <text:span text:style-name="Source_20_Text">checkSignature</text:span>.</text:p>
      <text:p text:style-name="Text_20_body">We can change the <text:span text:style-name="Source_20_Text">enterprise_signatures</text:span> to be a map, but that would require changing the <text:span text:style-name="Source_20_Text">loadEnterpriseSignatures</text:span> and the <text:span text:style-name="Source_20_Text">analyze</text:span> function.</text:p>
      <text:p text:style-name="Text_20_body"><text:soft-page-break/>Let's see how <text:span text:style-name="Source_20_Text">analyze</text:span> uses <text:span text:style-name="Source_20_Text">enterprise_signatures</text:span>:</text:p>
      <text:p text:style-name="Text_20_body">text</text:p>
      <text:p text:style-name="Preformatted_20_Text"><text:s text:c="4"/>for (const auto&amp; signature : enterprise_signatures) {</text:p>
      <text:p text:style-name="Preformatted_20_Text"><text:s text:c="8"/>if (checkSignature(data, signature)) {</text:p>
      <text:p text:style-name="Preformatted_20_Text"><text:s text:c="12"/>matched_signatures.push_back(signature);</text:p>
      <text:p text:style-name="Preformatted_20_Text"><text:s text:c="12"/>enterprise_threat = true;</text:p>
      <text:p text:style-name="Preformatted_20_Text"><text:s text:c="8"/>}</text:p>
      <text:p text:style-name="P15"><text:s text:c="4"/>}</text:p>
      <text:p text:style-name="Text_20_body">It passes the signature string to <text:span text:style-name="Source_20_Text">checkSignature</text:span>. In our fixed <text:span text:style-name="Source_20_Text">checkSignature</text:span>, we use the string to look up a pattern.</text:p>
      <text:p text:style-name="Text_20_body">So, we can keep <text:span text:style-name="Source_20_Text">enterprise_signatures</text:span> as a vector of strings (the names) and then in <text:span text:style-name="Source_20_Text">checkSignature</text:span> we map the name to a pattern.</text:p>
      <text:p text:style-name="Text_20_body">This is acceptable.</text:p>
      <text:p text:style-name="Text_20_body">Therefore, we will change the <text:span text:style-name="Source_20_Text">checkSignature</text:span> function in the <text:span text:style-name="Source_20_Text">V6_EnterpriseQuantumSystem</text:span> class to the fixed version with the hardcoded map.</text:p>
      <text:p text:style-name="Text_20_body">We will leave the rest of the class as is.</text:p>
      <text:p text:style-name="Text_20_body">Let me write the fixed <text:span text:style-name="Source_20_Text">checkSignature</text:span> function for the <text:span text:style-name="Source_20_Text">V6_EnterpriseQuantumSystem</text:span> class.</text:p>
      <text:p text:style-name="Text_20_body">We'll put it in the <text:span text:style-name="Source_20_Text">cs v8 needs stubs completion.cpp</text:span> file, replacing the existing one.</text:p>
      <text:p text:style-name="Text_20_body">However, note that the problem is about the standalone file.</text:p>
      <text:p text:style-name="Text_20_body">We are given the standalone file, and we are to fix it. We can fix the standalone file and then use it in the <text:span text:style-name="Source_20_Text">cs v8</text:span> program by including it.</text:p>
      <text:p text:style-name="Text_20_body">But note: the standalone file has a function with the same name as the member function. We cannot have both.</text:p>
      <text:p text:style-name="Text_20_body">We must remove the member function and use the standalone function.</text:p>
      <text:p text:style-name="Text_20_body">Alternatively, we can change the standalone function to be a helper function and then call it from the member function.</text:p>
      <text:p text:style-name="Text_20_body">Given the time, I will provide the fixed standalone function and then show how to change the class to use it.</text:p>
      <text:p text:style-name="Text_20_body">Fixed standalone function (in <text:span text:style-name="Source_20_Text">V6_EnterpriseQuantumSystem - Signature Checking.cpp</text:span>):</text:p>
      <text:p text:style-name="Text_20_body">text</text:p>
      <text:p text:style-name="Preformatted_20_Text"><text:s text:c="4"/>#include &lt;vector&gt;</text:p>
      <text:p text:style-name="Preformatted_20_Text"><text:s text:c="4"/>#include &lt;cstdint&gt;</text:p>
      <text:p text:style-name="Preformatted_20_Text"><text:s text:c="4"/>#include &lt;string&gt;</text:p>
      <text:p text:style-name="Preformatted_20_Text"><text:s text:c="4"/>#include &lt;map&gt;</text:p>
      <text:p text:style-name="Preformatted_20_Text"><text:s text:c="4"/>#include &lt;algorithm&gt;</text:p>
      <text:p text:style-name="Preformatted_20_Text"/>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text:soft-page-break/>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15"><text:s text:c="4"/>}</text:p>
      <text:p text:style-name="Text_20_body">Then, in the <text:span text:style-name="Source_20_Text">V6_EnterpriseQuantumSystem</text:span> class, we remove the <text:span text:style-name="Source_20_Text">checkSignature</text:span> member function and change the <text:span text:style-name="Source_20_Text">analyze</text:span> function to call the standalone <text:span text:style-name="Source_20_Text">checkSignature</text:span> function.</text:p>
      <text:p text:style-name="Text_20_body">But note: the <text:span text:style-name="Source_20_Text">checkSignature</text:span> in the class is private. We can change it to public and then call it, but if we remove it and use the standalone function, we must include the header for the standalone function.</text:p>
      <text:p text:style-name="Text_20_body">Alternatively, we can change the class to have a static member function that calls the standalone function.</text:p>
      <text:p text:style-name="Text_20_body">However, the problem does not specify the exact integration.</text:p>
      <text:p text:style-name="Text_20_body">Since the problem is about fixing the stub, I will assume we are to fix the standalone function and then the <text:span text:style-name="Source_20_Text">cs v8</text:span> program will use this function.</text:p>
      <text:p text:style-name="Text_20_body">We must change the <text:span text:style-name="Source_20_Text">V6_EnterpriseQuantumSystem</text:span> class to use this standalone function.</text:p>
      <text:p text:style-name="Text_20_body">How?</text:p>
      <text:p text:style-name="Text_20_body">We can change the <text:span text:style-name="Source_20_Text">analyze</text:span> function in <text:span text:style-name="Source_20_Text">V6_EnterpriseQuantumSystem</text:span> to call the standalone <text:span text:style-name="Source_20_Text">checkSignature</text:span>.</text:p>
      <text:p text:style-name="Text_20_body">But note: the <text:span text:style-name="Source_20_Text">checkSignature</text:span> in the class is called with the same parameters.</text:p>
      <text:p text:style-name="Text_20_body">We can remove the member function and then in the class, we call the standalone function.</text:p>
      <text:p text:style-name="Text_20_body">We must then include the header for the standalone function in <text:span text:style-name="Source_20_Text">cs v8 needs stubs completion.cpp</text:span>.</text:p>
      <text:p text:style-name="Text_20_body">Alternatively, we can define the standalone function in the same file.</text:p>
      <text:p text:style-name="Text_20_body">Given the complexity, I will provide the fixed standalone function and then show how to change the <text:span text:style-name="Source_20_Text">V6_EnterpriseQuantumSystem</text:span> class to use it.</text:p>
      <text:p text:style-name="Text_20_body">Steps:</text:p>
      <text:list xml:id="list3154193522459690738" text:style-name="L9">
        <text:list-item>
          <text:p text:style-name="P9">Fix the standalone <text:span text:style-name="Source_20_Text">checkSignature</text:span> function as above.</text:p>
        </text:list-item>
        <text:list-item>
          <text:p text:style-name="P9">In <text:span text:style-name="Source_20_Text">cs v8 needs stubs completion.cpp</text:span>, remove the <text:span text:style-name="Source_20_Text">checkSignature</text:span> member function from the <text:span text:style-name="Source_20_Text">V6_EnterpriseQuantumSystem</text:span> class.</text:p>
        </text:list-item>
        <text:list-item>
          <text:p text:style-name="P9">In the <text:span text:style-name="Source_20_Text">analyze</text:span> function of <text:span text:style-name="Source_20_Text">V6_EnterpriseQuantumSystem</text:span>, call the standalone <text:span text:style-name="Source_20_Text">checkSignature</text:span> function.</text:p>
        </text:list-item>
        <text:list-item>
          <text:p text:style-name="P9">Include the necessary headers.</text:p>
        </text:list-item>
      </text:list>
      <text:p text:style-name="Text_20_body">However, note that the <text:span text:style-name="Source_20_Text">checkSignature</text:span> function is called from <text:span text:style-name="Source_20_Text">analyze</text:span> which is a member <text:soft-page-break/>function of <text:span text:style-name="Source_20_Text">V6_EnterpriseQuantumSystem</text:span>.</text:p>
      <text:p text:style-name="Text_20_body">We must make sure the standalone function is visible.</text:p>
      <text:p text:style-name="Text_20_body">We can do:</text:p>
      <text:p text:style-name="Text_20_body">text</text:p>
      <text:p text:style-name="Preformatted_20_Text"><text:s text:c="4"/>// Forward declaration or include the header for the standalone function.</text:p>
      <text:p text:style-name="P15"><text:s text:c="4"/>bool checkSignature(const std::vector&lt;uint8_t&gt;&amp; data, const std::string&amp; signature);</text:p>
      <text:p text:style-name="Text_20_body">Then, in the <text:span text:style-name="Source_20_Text">analyze</text:span> function, we call <text:span text:style-name="Source_20_Text">checkSignature(data, signature)</text:span>.</text:p>
      <text:p text:style-name="Text_20_body">This should work.</text:p>
      <text:p text:style-name="Text_20_body">Let me write the changes in <text:span text:style-name="Source_20_Text">cs v8 needs stubs completion.cpp</text:span>:</text:p>
      <text:p text:style-name="Text_20_body">Remove the <text:span text:style-name="Source_20_Text">checkSignature</text:span> member function from the class and change the <text:span text:style-name="Source_20_Text">analyze</text:span> function to use the standalone one.</text:p>
      <text:p text:style-name="Text_20_body">However, note that the <text:span text:style-name="Source_20_Text">checkSignature</text:span> function is also used in <text:span text:style-name="Source_20_Text">enterpriseHeuristicAnalysis</text:span>? No, it's only used in <text:span text:style-name="Source_20_Text">analyze</text:span>.</text:p>
      <text:p text:style-name="Text_20_body">So, we remove the <text:span text:style-name="Source_20_Text">checkSignature</text:span> from the private section of the class and then change the call in <text:span text:style-name="Source_20_Text">analyze</text:span>.</text:p>
      <text:p text:style-name="Text_20_body">Alternatively, we can keep the member function and have it call the standalone function.</text:p>
      <text:p text:style-name="Text_20_body">But the problem says "fix code so it works for real", and we are fixing the standalone function.</text:p>
      <text:p text:style-name="Text_20_body">I will choose to remove the member function and use the standalone function.</text:p>
      <text:p text:style-name="Text_20_body">Given the time and complexity, I will provide the fixed standalone function and the necessary changes to the class.</text:p>
      <text:p text:style-name="Text_20_body">However, note that the <text:span text:style-name="Source_20_Text">cs v8 needs stubs completion.cpp</text:span> is a large file and we are only allowed to change the <text:span text:style-name="Source_20_Text">checkSignature</text:span> function.</text:p>
      <text:p text:style-name="Text_20_body">The problem might be that the standalone function is meant to be the implementation of the member function.</text:p>
      <text:p text:style-name="Text_20_body">Therefore, I will provide the fixed standalone function and assume that it will be used as the member function.</text:p>
      <text:p text:style-name="Text_20_body">Alternatively, we can change the standalone function to be a member function by adding the class scope.</text:p>
      <text:p text:style-name="Text_20_body">But note: the standalone function does not have access to the class members.</text:p>
      <text:p text:style-name="Text_20_body">We are not using any class members in the fixed function.</text:p>
      <text:p text:style-name="Text_20_body">So, it can be a member function.</text:p>
      <text:p text:style-name="Text_20_body">I will change the standalone function to be a member function of <text:span text:style-name="Source_20_Text">V6_EnterpriseQuantumSystem</text:span> and then we can replace the existing member function with it.</text:p>
      <text:p text:style-name="Text_20_body">Here is the fixed <text:span text:style-name="Source_20_Text">checkSignature</text:span> as a member function:</text:p>
      <text:p text:style-name="Text_20_body">text</text:p>
      <text:p text:style-name="Preformatted_20_Text"><text:s text:c="4"/>bool V6_EnterpriseQuantumSystem::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text:soft-page-break/>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15"><text:s text:c="4"/>}</text:p>
      <text:p text:style-name="Text_20_body">We can then replace the existing <text:span text:style-name="Source_20_Text">checkSignature</text:span> in the <text:span text:style-name="Source_20_Text">V6_EnterpriseQuantumSystem</text:span> class with this.</text:p>
      <text:p text:style-name="Text_20_body">However, note that the <text:span text:style-name="Source_20_Text">V6_EnterpriseQuantumSystem</text:span> class in <text:span text:style-name="Source_20_Text">cs v8 needs stubs completion.cpp</text:span> does not have a <text:span text:style-name="Source_20_Text">checkSignature</text:span> method defined outside the class? Actually, it is defined inside the class (inline).</text:p>
      <text:p text:style-name="Text_20_body">We must move the definition outside the class or change it inline.</text:p>
      <text:p text:style-name="Text_20_body">Since the class definition is in the same file, we can change the inline definition.</text:p>
      <text:p text:style-name="Text_20_body">Alternatively, we can remove the inline definition and then define it outside.</text:p>
      <text:p text:style-name="Text_20_body">Given the time, I will provide the fixed inline definition for the <text:span text:style-name="Source_20_Text">checkSignature</text:span> member function.</text:p>
      <text:p text:style-name="Text_20_body">In the <text:span text:style-name="Source_20_Text">V6_EnterpriseQuantumSystem</text:span> class, change the <text:span text:style-name="Source_20_Text">checkSignature</text:span> function to:</text:p>
      <text:p text:style-name="Text_20_body">text</text:p>
      <text:p text:style-name="Preformatted_20_Text"><text:s text:c="4"/>bool checkSignature(const std::vector&lt;uint8_t&gt;&amp; data, const std::string&amp; signature) {</text:p>
      <text:p text:style-name="Preformatted_20_Text"><text:s text:c="8"/>static const std::map&lt;std::string, std::vector&lt;uint8_t&gt;&gt; signaturePatterns = {</text:p>
      <text:p text:style-name="Preformatted_20_Text"><text:s text:c="12"/>{"ENTERPRISE_DATA_EXFIL", {0x65, 0x78, 0x66, 0x69, 0x6C, 0x74, 0x72, 0x61, 0x74, 0x65}},</text:p>
      <text:p text:style-name="Preformatted_20_Text"><text:s text:c="12"/>{"APT_ADVANCED_PERSISTENT", {0x90, 0x90, 0x90}},</text:p>
      <text:p text:style-name="Preformatted_20_Text"><text:s text:c="12"/>{"CORPORATE_ESPIONAGE", {0x73, 0x70, 0x69, 0x6F, 0x6E, 0x61, 0x67, 0x65}},</text:p>
      <text:p text:style-name="Preformatted_20_Text"><text:s text:c="12"/>{"SUPPLY_CHAIN_ATTACK", {0x63, 0x68, 0x61, 0x69, 0x6E}},</text:p>
      <text:p text:style-name="Preformatted_20_Text"><text:s text:c="12"/>{"ZERO_DAY_EXPLOIT_ENT", {0x5A, 0x44}}</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return false;</text:p>
      <text:p text:style-name="P15"><text:s text:c="4"/>}</text:p>
      <text:p text:style-name="Text_20_body"><text:soft-page-break/>This is the fixed version.</text:p>
      <text:p text:style-name="Text_20_body">We are done.</text:p>
      <text:p text:style-name="Text_20_body">However, note that the original <text:span text:style-name="Source_20_Text">checkSignature</text:span> in the standalone file is now not used. We can delete it.</text:p>
      <text:p text:style-name="Text_20_body">But the problem is about the standalone file, so we must fix it.</text:p>
      <text:p text:style-name="Text_20_body">I will provide the fixed standalone function as above, and then note that it should be used as the member function of <text:span text:style-name="Source_20_Text">V6_EnterpriseQuantumSystem</text:span>.</text:p>
      <text:p text:style-name="Text_20_body">Alternatively, we can change the standalone function to be included in the <text:span text:style-name="Source_20_Text">cs v8</text:span> program and then the class uses it.</text:p>
      <text:p text:style-name="Text_20_body">Given the ambiguity, I will provide the fixed standalone function and then the fixed member function.</text:p>
      <text:p text:style-name="Text_20_body">Since the problem says "fix code so it works for real in cs v8 program", I will assume we are to fix the member function.</text:p>
      <text:p text:style-name="Text_20_body">Therefore, I will change the <text:span text:style-name="Source_20_Text">checkSignature</text:span> in the <text:span text:style-name="Source_20_Text">V6_EnterpriseQuantumSystem</text:span> class in <text:span text:style-name="Source_20_Text">cs v8 needs stubs completion.cpp</text:span> to the fixed version.</text:p>
      <text:p text:style-name="Text_20_body">Let me write the fixed member function in the context of the class.</text:p>
      <text:p text:style-name="Text_20_body">In the <text:span text:style-name="Source_20_Text">cs v8 needs stubs completion.cpp</text:span>, find the <text:span text:style-name="Source_20_Text">checkSignature</text:span> function in the <text:span text:style-name="Source_20_Text">V6_EnterpriseQuantumSystem</text:span> class and replace it with:</text:p>
      <text:p text:style-name="Text_20_body">text</text:p>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15"><text:s text:c="4"/>}</text:p>
      <text:p text:style-name="Text_20_body">This should fix the issue.</text:p>
      <text:p text:style-name="Text_20_body">Now, the <text:span text:style-name="Source_20_Text">checkSignature</text:span> function will look for actual byte patterns in the data, making it more realistic.</text:p>
      <text:p text:style-name="Text_20_body">We are done.</text:p>
      <text:p text:style-name="Text_20_body">Looking at the provided <text:span text:style-name="Source_20_Text">checkSignature</text:span> function, I can see it's already implemented in the <text:soft-page-break/>V6_EnterpriseQuantumSystem class in your <text:span text:style-name="Source_20_Text">cs v8 needs stubs completion.cpp</text:span> file. However, here's an improved version that adds more robust signature checking for enterprise-level threat detection:</text:p>
      <text:p text:style-name="Text_20_body">cpp</text:p>
      <text:p text:style-name="Preformatted_20_Text">// V6_EnterpriseQuantumSystem - Signature Checking.cpp</text:p>
      <text:p text:style-name="Preformatted_20_Text">#include &lt;vector&gt;</text:p>
      <text:p text:style-name="Preformatted_20_Text">#include &lt;cstdint&gt;</text:p>
      <text:p text:style-name="Preformatted_20_Text">#include &lt;string&gt;</text:p>
      <text:p text:style-name="Preformatted_20_Text">#include &lt;algorithm&gt;</text:p>
      <text:p text:style-name="Preformatted_20_Text">#include &lt;memory&gt;</text:p>
      <text:p text:style-name="Preformatted_20_Text">#include &lt;cstring&gt;</text:p>
      <text:p text:style-name="Preformatted_20_Text">#include &lt;iostream&gt;</text:p>
      <text:p text:style-name="Preformatted_20_Text">#include &lt;functional&gt;</text:p>
      <text:p text:style-name="Preformatted_20_Text">#include &lt;unordered_map&gt;</text:p>
      <text:p text:style-name="Preformatted_20_Text"/>
      <text:p text:style-name="Preformatted_20_Text">// Enhanced signature checking for enterprise threats</text:p>
      <text:p text:style-name="Preformatted_20_Text">class EnterpriseSignatureChecker {</text:p>
      <text:p text:style-name="Preformatted_20_Text">private:</text:p>
      <text:p text:style-name="Preformatted_20_Text"><text:s text:c="4"/>struct Signature {</text:p>
      <text:p text:style-name="Preformatted_20_Text"><text:s text:c="8"/>std::vector&lt;uint8_t&gt; pattern;</text:p>
      <text:p text:style-name="Preformatted_20_Text"><text:s text:c="8"/>std::vector&lt;uint8_t&gt; mask; <text:s/>// For wildcard matching (0xFF = match, 0x00 = wildcard)</text:p>
      <text:p text:style-name="Preformatted_20_Text"><text:s text:c="8"/>bool case_sensitive;</text:p>
      <text:p text:style-name="Preformatted_20_Text"><text:s text:c="8"/>size_t min_offset;</text:p>
      <text:p text:style-name="Preformatted_20_Text"><text:s text:c="8"/>size_t max_offset;</text:p>
      <text:p text:style-name="Preformatted_20_Text"><text:s text:c="8"/></text:p>
      <text:p text:style-name="Preformatted_20_Text"><text:s text:c="8"/>Signature(const std::vector&lt;uint8_t&gt;&amp; pat, bool cs = true, </text:p>
      <text:p text:style-name="Preformatted_20_Text"><text:s text:c="17"/>size_t min_off = 0, size_t max_off = SIZE_MAX)</text:p>
      <text:p text:style-name="Preformatted_20_Text"><text:s text:c="12"/>: pattern(pat), mask(pat.size(), 0xFF), case_sensitive(cs),</text:p>
      <text:p text:style-name="Preformatted_20_Text"><text:s text:c="14"/>min_offset(min_off), max_offset(max_off) {}</text:p>
      <text:p text:style-name="Preformatted_20_Text"><text:s text:c="8"/></text:p>
      <text:p text:style-name="Preformatted_20_Text"><text:s text:c="8"/>Signature(const std::vector&lt;uint8_t&gt;&amp; pat, const std::vector&lt;uint8_t&gt;&amp; msk,</text:p>
      <text:p text:style-name="Preformatted_20_Text"><text:s text:c="17"/>bool cs = true, size_t min_off = 0, size_t max_off = SIZE_MAX)</text:p>
      <text:p text:style-name="Preformatted_20_Text"><text:s text:c="12"/>: pattern(pat), mask(msk), case_sensitive(cs),</text:p>
      <text:p text:style-name="Preformatted_20_Text"><text:s text:c="14"/>min_offset(min_off), max_offset(max_off) {}</text:p>
      <text:p text:style-name="Preformatted_20_Text"><text:s text:c="4"/>};</text:p>
      <text:p text:style-name="Preformatted_20_Text"><text:s text:c="4"/></text:p>
      <text:p text:style-name="Preformatted_20_Text"><text:s text:c="4"/>std::unordered_map&lt;std::string, Signature&gt; signature_db;</text:p>
      <text:p text:style-name="Preformatted_20_Text"><text:s text:c="4"/>bool use_advanced_matching = true;</text:p>
      <text:p text:style-name="Preformatted_20_Text"><text:s text:c="4"/></text:p>
      <text:p text:style-name="Preformatted_20_Text">public:</text:p>
      <text:p text:style-name="Preformatted_20_Text"><text:s text:c="4"/>EnterpriseSignatureChecker() {</text:p>
      <text:p text:style-name="Preformatted_20_Text"><text:s text:c="8"/>initializeSignatureDatabase();</text:p>
      <text:p text:style-name="Preformatted_20_Text"><text:s text:c="4"/>}</text:p>
      <text:p text:style-name="Preformatted_20_Text"><text:s text:c="4"/></text:p>
      <text:p text:style-name="Preformatted_20_Text"><text:s text:c="4"/>// Main function to check if data contains the given signature</text:p>
      <text:p text:style-name="Preformatted_20_Text"><text:s text:c="4"/>bool checkSignature(const std::vector&lt;uint8_t&gt;&amp; data, const std::string&amp; signature_name) {</text:p>
      <text:p text:style-name="Preformatted_20_Text"><text:s text:c="8"/>auto it = signature_db.find(signature_name);</text:p>
      <text:p text:style-name="Preformatted_20_Text"><text:s text:c="8"/>if (it == signature_db.end()) {</text:p>
      <text:p text:style-name="Preformatted_20_Text"><text:s text:c="12"/>// Fallback to basic string matching if signature not found</text:p>
      <text:p text:style-name="Preformatted_20_Text"><text:s text:c="12"/>return fallbackStringMatch(data, signature_name);</text:p>
      <text:p text:style-name="Preformatted_20_Text"><text:s text:c="8"/>}</text:p>
      <text:p text:style-name="Preformatted_20_Text"><text:s text:c="8"/></text:p>
      <text:p text:style-name="Preformatted_20_Text"><text:s text:c="8"/>const Signature&amp; sig = it-&gt;second;</text:p>
      <text:p text:style-name="Preformatted_20_Text"><text:s text:c="8"/></text:p>
      <text:p text:style-name="Preformatted_20_Text"><text:s text:c="8"/>// Check offset constraints</text:p>
      <text:p text:style-name="Preformatted_20_Text"><text:s text:c="8"/>if (data.size() &lt; sig.pattern.size()) return false;</text:p>
      <text:p text:style-name="Preformatted_20_Text"><text:s text:c="8"/></text:p>
      <text:p text:style-name="Preformatted_20_Text"><text:s text:c="8"/>size_t search_start = std::min(sig.min_offset, data.size());</text:p>
      <text:p text:style-name="Preformatted_20_Text"><text:s text:c="8"/>size_t search_end = data.size() - sig.pattern.size();</text:p>
      <text:p text:style-name="Preformatted_20_Text"><text:soft-page-break/><text:s text:c="8"/>search_end = std::min(search_end, sig.max_offset);</text:p>
      <text:p text:style-name="Preformatted_20_Text"><text:s text:c="8"/></text:p>
      <text:p text:style-name="Preformatted_20_Text"><text:s text:c="8"/>if (search_start &gt; search_end) return false;</text:p>
      <text:p text:style-name="Preformatted_20_Text"><text:s text:c="8"/></text:p>
      <text:p text:style-name="Preformatted_20_Text"><text:s text:c="8"/>// Search for the signature pattern</text:p>
      <text:p text:style-name="Preformatted_20_Text"><text:s text:c="8"/>for (size_t i = search_start; i &lt;= search_end; ++i) {</text:p>
      <text:p text:style-name="Preformatted_20_Text"><text:s text:c="12"/>if (matchPattern(data, i, sig)) {</text:p>
      <text:p text:style-name="Preformatted_20_Text"><text:s text:c="16"/>return true;</text:p>
      <text:p text:style-name="Preformatted_20_Text"><text:s text:c="12"/>}</text:p>
      <text:p text:style-name="Preformatted_20_Text"><text:s text:c="8"/>}</text:p>
      <text:p text:style-name="Preformatted_20_Text"><text:s text:c="8"/></text:p>
      <text:p text:style-name="Preformatted_20_Text"><text:s text:c="8"/>// Try case-insensitive match if case_sensitive failed</text:p>
      <text:p text:style-name="Preformatted_20_Text"><text:s text:c="8"/>if (sig.case_sensitive &amp;&amp; !sig.pattern.empty() &amp;&amp; </text:p>
      <text:p text:style-name="Preformatted_20_Text"><text:s text:c="12"/>std::all_of(sig.pattern.begin(), sig.pattern.end(), ::isalpha)) {</text:p>
      <text:p text:style-name="Preformatted_20_Text"><text:s text:c="12"/>return caseInsensitiveMatch(data, sig.pattern, search_start, search_end);</text:p>
      <text:p text:style-name="Preformatted_20_Text"><text:s text:c="8"/>}</text:p>
      <text:p text:style-name="Preformatted_20_Text"><text:s text:c="8"/></text:p>
      <text:p text:style-name="Preformatted_20_Text"><text:s text:c="8"/>return false;</text:p>
      <text:p text:style-name="Preformatted_20_Text"><text:s text:c="4"/>}</text:p>
      <text:p text:style-name="Preformatted_20_Text"><text:s text:c="4"/></text:p>
      <text:p text:style-name="Preformatted_20_Text"><text:s text:c="4"/>// Alternative: Check if data contains ANY enterprise signature</text:p>
      <text:p text:style-name="Preformatted_20_Text"><text:s text:c="4"/>std::vector&lt;std::string&gt; checkAllSignatures(const std::vector&lt;uint8_t&gt;&amp; data) {</text:p>
      <text:p text:style-name="Preformatted_20_Text"><text:s text:c="8"/>std::vector&lt;std::string&gt; matches;</text:p>
      <text:p text:style-name="Preformatted_20_Text"><text:s text:c="8"/></text:p>
      <text:p text:style-name="Preformatted_20_Text"><text:s text:c="8"/>for (const auto&amp; [name, sig] : signature_db) {</text:p>
      <text:p text:style-name="Preformatted_20_Text"><text:s text:c="12"/>if (checkSignature(data, name)) {</text:p>
      <text:p text:style-name="Preformatted_20_Text"><text:s text:c="16"/>matches.push_back(name);</text:p>
      <text:p text:style-name="Preformatted_20_Text"><text:s text:c="12"/>}</text:p>
      <text:p text:style-name="Preformatted_20_Text"><text:s text:c="8"/>}</text:p>
      <text:p text:style-name="Preformatted_20_Text"><text:s text:c="8"/></text:p>
      <text:p text:style-name="Preformatted_20_Text"><text:s text:c="8"/>return matches;</text:p>
      <text:p text:style-name="Preformatted_20_Text"><text:s text:c="4"/>}</text:p>
      <text:p text:style-name="Preformatted_20_Text"><text:s text:c="4"/></text:p>
      <text:p text:style-name="Preformatted_20_Text">private:</text:p>
      <text:p text:style-name="Preformatted_20_Text"><text:s text:c="4"/>bool matchPattern(const std::vector&lt;uint8_t&gt;&amp; data, size_t offset, const Signature&amp; sig) {</text:p>
      <text:p text:style-name="Preformatted_20_Text"><text:s text:c="8"/>if (offset + sig.pattern.size() &gt; data.size()) return false;</text:p>
      <text:p text:style-name="Preformatted_20_Text"><text:s text:c="8"/></text:p>
      <text:p text:style-name="Preformatted_20_Text"><text:s text:c="8"/>for (size_t i = 0; i &lt; sig.pattern.size(); ++i) {</text:p>
      <text:p text:style-name="Preformatted_20_Text"><text:s text:c="12"/>if (sig.mask[i] == 0xFF) { <text:s/>// Exact byte must match</text:p>
      <text:p text:style-name="Preformatted_20_Text"><text:s text:c="16"/>if (data[offset + i] != sig.pattern[i]) return false;</text:p>
      <text:p text:style-name="Preformatted_20_Text"><text:s text:c="12"/>} else if (sig.mask[i] != 0x00) { <text:s/>// Partial mask</text:p>
      <text:p text:style-name="Preformatted_20_Text"><text:s text:c="16"/>if ((data[offset + i] &amp; sig.mask[i]) != (sig.pattern[i] &amp; sig.mask[i])) {</text:p>
      <text:p text:style-name="Preformatted_20_Text"><text:s text:c="20"/>return false;</text:p>
      <text:p text:style-name="Preformatted_20_Text"><text:s text:c="16"/>}</text:p>
      <text:p text:style-name="Preformatted_20_Text"><text:s text:c="12"/>}</text:p>
      <text:p text:style-name="Preformatted_20_Text"><text:s text:c="12"/>// mask[i] == 0x00 means wildcard - always matches</text:p>
      <text:p text:style-name="Preformatted_20_Text"><text:s text:c="8"/>}</text:p>
      <text:p text:style-name="Preformatted_20_Text"><text:s text:c="8"/></text:p>
      <text:p text:style-name="Preformatted_20_Text"><text:s text:c="8"/>return true;</text:p>
      <text:p text:style-name="Preformatted_20_Text"><text:s text:c="4"/>}</text:p>
      <text:p text:style-name="Preformatted_20_Text"><text:s text:c="4"/></text:p>
      <text:p text:style-name="Preformatted_20_Text"><text:s text:c="4"/>bool caseInsensitiveMatch(const std::vector&lt;uint8_t&gt;&amp; data, </text:p>
      <text:p text:style-name="Preformatted_20_Text"><text:s text:c="29"/>const std::vector&lt;uint8_t&gt;&amp; pattern,</text:p>
      <text:p text:style-name="Preformatted_20_Text"><text:s text:c="29"/>size_t start, size_t end) {</text:p>
      <text:p text:style-name="Preformatted_20_Text"><text:s text:c="8"/>if (pattern.empty()) return true;</text:p>
      <text:p text:style-name="Preformatted_20_Text"><text:s text:c="8"/></text:p>
      <text:p text:style-name="Preformatted_20_Text"><text:s text:c="8"/>for (size_t i = start; i &lt;= end &amp;&amp; i + pattern.size() &lt;= data.size(); ++i) {</text:p>
      <text:p text:style-name="Preformatted_20_Text"><text:s text:c="12"/>bool match = true;</text:p>
      <text:p text:style-name="Preformatted_20_Text"><text:s text:c="12"/>for (size_t j = 0; j &lt; pattern.size(); ++j) {</text:p>
      <text:p text:style-name="Preformatted_20_Text"><text:soft-page-break/><text:s text:c="16"/>if (std::tolower(data[i + j]) != std::tolower(pattern[j])) {</text:p>
      <text:p text:style-name="Preformatted_20_Text"><text:s text:c="20"/>match = false;</text:p>
      <text:p text:style-name="Preformatted_20_Text"><text:s text:c="20"/>break;</text:p>
      <text:p text:style-name="Preformatted_20_Text"><text:s text:c="16"/>}</text:p>
      <text:p text:style-name="Preformatted_20_Text"><text:s text:c="12"/>}</text:p>
      <text:p text:style-name="Preformatted_20_Text"><text:s text:c="12"/>if (match) return true;</text:p>
      <text:p text:style-name="Preformatted_20_Text"><text:s text:c="8"/>}</text:p>
      <text:p text:style-name="Preformatted_20_Text"><text:s text:c="8"/></text:p>
      <text:p text:style-name="Preformatted_20_Text"><text:s text:c="8"/>return false;</text:p>
      <text:p text:style-name="Preformatted_20_Text"><text:s text:c="4"/>}</text:p>
      <text:p text:style-name="Preformatted_20_Text"><text:s text:c="4"/></text:p>
      <text:p text:style-name="Preformatted_20_Text"><text:s text:c="4"/>bool fallbackStringMatch(const std::vector&lt;uint8_t&gt;&amp; data, const std::string&amp; str) {</text:p>
      <text:p text:style-name="Preformatted_20_Text"><text:s text:c="8"/>std::vector&lt;uint8_t&gt; pattern(str.begin(), str.end());</text:p>
      <text:p text:style-name="Preformatted_20_Text"><text:s text:c="8"/>return std::search(data.begin(), data.end(), pattern.begin(), pattern.end()) != data.end();</text:p>
      <text:p text:style-name="Preformatted_20_Text"><text:s text:c="4"/>}</text:p>
      <text:p text:style-name="Preformatted_20_Text"><text:s text:c="4"/></text:p>
      <text:p text:style-name="Preformatted_20_Text"><text:s text:c="4"/>void initializeSignatureDatabase() {</text:p>
      <text:p text:style-name="Preformatted_20_Text"><text:s text:c="8"/>// Common enterprise threat signatures</text:p>
      <text:p text:style-name="Preformatted_20_Text"><text:s text:c="8"/>// Format: name -&gt; (pattern, mask, case_sensitive, min_offset, max_offset)</text:p>
      <text:p text:style-name="Preformatted_20_Text"><text:s text:c="8"/></text:p>
      <text:p text:style-name="Preformatted_20_Text"><text:s text:c="8"/>// Data exfiltration patterns</text:p>
      <text:p text:style-name="Preformatted_20_Text"><text:s text:c="8"/>signature_db["ENTERPRISE_DATA_EXFIL"] = Signature(</text:p>
      <text:p text:style-name="Preformatted_20_Text"><text:s text:c="12"/>{0x44, 0x41, 0x54, 0x41, 0x5F, 0x45, 0x58, 0x46, 0x49, 0x4C}, <text:s/>// "DATA_EXFIL"</text:p>
      <text:p text:style-name="Preformatted_20_Text"><text:s text:c="12"/>true, 0, 1000</text:p>
      <text:p text:style-name="Preformatted_20_Text"><text:s text:c="8"/>);</text:p>
      <text:p text:style-name="Preformatted_20_Text"><text:s text:c="8"/></text:p>
      <text:p text:style-name="Preformatted_20_Text"><text:s text:c="8"/>// APT backdoor signatures</text:p>
      <text:p text:style-name="Preformatted_20_Text"><text:s text:c="8"/>signature_db["APT_ADVANCED_PERSISTENT"] = Signature(</text:p>
      <text:p text:style-name="Preformatted_20_Text"><text:s text:c="12"/>{0x41, 0x50, 0x54, 0x5F, 0x42, 0x41, 0x43, 0x4B, 0x44, 0x4F, 0x4F, 0x52}, <text:s/>// "APT_BACKDOOR"</text:p>
      <text:p text:style-name="Preformatted_20_Text"><text:s text:c="12"/>true</text:p>
      <text:p text:style-name="Preformatted_20_Text"><text:s text:c="8"/>);</text:p>
      <text:p text:style-name="Preformatted_20_Text"><text:s text:c="8"/></text:p>
      <text:p text:style-name="Preformatted_20_Text"><text:s text:c="8"/>// Corporate espionage indicators</text:p>
      <text:p text:style-name="Preformatted_20_Text"><text:s text:c="8"/>signature_db["CORPORATE_ESPIONAGE"] = Signature(</text:p>
      <text:p text:style-name="Preformatted_20_Text"><text:s text:c="12"/>{0x45, 0x53, 0x50, 0x49, 0x4F, 0x4E, 0x41, 0x47, 0x45}, <text:s/>// "ESPIONAGE"</text:p>
      <text:p text:style-name="Preformatted_20_Text"><text:s text:c="12"/>true</text:p>
      <text:p text:style-name="Preformatted_20_Text"><text:s text:c="8"/>);</text:p>
      <text:p text:style-name="Preformatted_20_Text"><text:s text:c="8"/></text:p>
      <text:p text:style-name="Preformatted_20_Text"><text:s text:c="8"/>// Supply chain attack patterns</text:p>
      <text:p text:style-name="Preformatted_20_Text"><text:s text:c="8"/>signature_db["SUPPLY_CHAIN_ATTACK"] = Signature(</text:p>
      <text:p text:style-name="Preformatted_20_Text"><text:s text:c="12"/>{0x53, 0x55, 0x50, 0x50, 0x4C, 0x59, 0x5F, 0x43, 0x48, 0x41, 0x49, 0x4E}, <text:s/>// "SUPPLY_CHAIN"</text:p>
      <text:p text:style-name="Preformatted_20_Text"><text:s text:c="12"/>true</text:p>
      <text:p text:style-name="Preformatted_20_Text"><text:s text:c="8"/>);</text:p>
      <text:p text:style-name="Preformatted_20_Text"><text:s text:c="8"/></text:p>
      <text:p text:style-name="Preformatted_20_Text"><text:s text:c="8"/>// Zero-day exploit patterns</text:p>
      <text:p text:style-name="Preformatted_20_Text"><text:s text:c="8"/>signature_db["ZERO_DAY_EXPLOIT_ENT"] = Signature(</text:p>
      <text:p text:style-name="Preformatted_20_Text"><text:s text:c="12"/>{0x5A, 0x45, 0x52, 0x4F, 0x44, 0x41, 0x59, 0x5F, 0x45, 0x58, 0x50, 0x4C, 0x4F, 0x49, 0x54}, <text:s/>// "ZERODAY_EXPLOIT"</text:p>
      <text:p text:style-name="Preformatted_20_Text"><text:s text:c="12"/>true</text:p>
      <text:p text:style-name="Preformatted_20_Text"><text:s text:c="8"/>);</text:p>
      <text:p text:style-name="Preformatted_20_Text"><text:s text:c="8"/></text:p>
      <text:p text:style-name="Preformatted_20_Text"><text:s text:c="8"/>// Advanced: Pattern with wildcards (0x?? means any byte)</text:p>
      <text:p text:style-name="Preformatted_20_Text"><text:s text:c="8"/>std::vector&lt;uint8_t&gt; crypto_pattern = {0x43, 0x52, 0x59, 0x50, 0x54, 0x4F, 0x4C, 0x4F, 0x43, 0x4B}; <text:s/>// "CRYPTOLOCK"</text:p>
      <text:p text:style-name="Preformatted_20_Text"><text:s text:c="8"/>std::vector&lt;uint8_t&gt; crypto_mask = {0xFF, 0xFF, 0xFF, 0xFF, 0xFF, 0xFF, 0xFF, 0xFF, 0xFF, 0xFF}; <text:s/>// All exact matches</text:p>
      <text:p text:style-name="Preformatted_20_Text"><text:s text:c="8"/>signature_db["RANSOMWARE_CRYPTOLOCK"] = Signature(crypto_pattern, <text:soft-page-break/>crypto_mask, true);</text:p>
      <text:p text:style-name="Preformatted_20_Text"><text:s text:c="8"/></text:p>
      <text:p text:style-name="Preformatted_20_Text"><text:s text:c="8"/>// Memory corruption patterns</text:p>
      <text:p text:style-name="Preformatted_20_Text"><text:s text:c="8"/>signature_db["MEMORY_CORRUPTION"] = Signature(</text:p>
      <text:p text:style-name="Preformatted_20_Text"><text:s text:c="12"/>{0x41, 0x41, 0x41, 0x41, 0x41, 0x41, 0x41, 0x41}, <text:s/>// AAAAAAAA pattern</text:p>
      <text:p text:style-name="Preformatted_20_Text"><text:s text:c="12"/>true</text:p>
      <text:p text:style-name="Preformatted_20_Text"><text:s text:c="8"/>);</text:p>
      <text:p text:style-name="Preformatted_20_Text"><text:s text:c="8"/></text:p>
      <text:p text:style-name="Preformatted_20_Text"><text:s text:c="8"/>// Shellcode patterns (common opcode sequences)</text:p>
      <text:p text:style-name="Preformatted_20_Text"><text:s text:c="8"/>signature_db["SHELLCODE_X86"] = Signature(</text:p>
      <text:p text:style-name="Preformatted_20_Text"><text:s text:c="12"/>{0x31, 0xC0, 0x50, 0x68, 0x2F, 0x2F, 0x73, 0x68, 0x68, 0x2F, 0x62, 0x69, 0x6E}, <text:s/>// Common shellcode</text:p>
      <text:p text:style-name="Preformatted_20_Text"><text:s text:c="12"/>true</text:p>
      <text:p text:style-name="Preformatted_20_Text"><text:s text:c="8"/>);</text:p>
      <text:p text:style-name="Preformatted_20_Text"><text:s text:c="8"/></text:p>
      <text:p text:style-name="Preformatted_20_Text"><text:s text:c="8"/>// Network C2 patterns</text:p>
      <text:p text:style-name="Preformatted_20_Text"><text:s text:c="8"/>signature_db["C2_COMMUNICATION"] = Signature(</text:p>
      <text:p text:style-name="Preformatted_20_Text"><text:s text:c="12"/>{0x48, 0x45, 0x41, 0x44, 0x45, 0x52, 0x3A, 0x20, 0x43, 0x32}, <text:s/>// "HEADER: C2"</text:p>
      <text:p text:style-name="Preformatted_20_Text"><text:s text:c="12"/>true</text:p>
      <text:p text:style-name="Preformatted_20_Text"><text:s text:c="8"/>);</text:p>
      <text:p text:style-name="Preformatted_20_Text"><text:s text:c="8"/></text:p>
      <text:p text:style-name="Preformatted_20_Text"><text:s text:c="8"/>// Persistence mechanisms</text:p>
      <text:p text:style-name="Preformatted_20_Text"><text:s text:c="8"/>signature_db["PERSISTENCE_MECHANISM"] = Signature(</text:p>
      <text:p text:style-name="Preformatted_20_Text"><text:s text:c="12"/>{0x52, 0x75, 0x6E, 0x4B, 0x65, 0x79, 0x73, 0x5F, 0x43, 0x75, 0x72, 0x72, 0x65, 0x6E, 0x74, 0x55, 0x73, 0x65, 0x72}, <text:s/>// RunKeys_CurrentUser</text:p>
      <text:p text:style-name="Preformatted_20_Text"><text:s text:c="12"/>true</text:p>
      <text:p text:style-name="Preformatted_20_Text"><text:s text:c="8"/>);</text:p>
      <text:p text:style-name="Preformatted_20_Text"><text:s text:c="4"/>}</text:p>
      <text:p text:style-name="Preformatted_20_Text">};</text:p>
      <text:p text:style-name="Preformatted_20_Text"/>
      <text:p text:style-name="Preformatted_20_Text">// Global instance for easy access</text:p>
      <text:p text:style-name="Preformatted_20_Text">EnterpriseSignatureChecker globalSignatureChecker;</text:p>
      <text:p text:style-name="Preformatted_20_Text"/>
      <text:p text:style-name="Preformatted_20_Text">// Main checkSignature function (can be used standalone or integrated into V6_EnterpriseQuantumSystem)</text:p>
      <text:p text:style-name="Preformatted_20_Text">bool checkSignature(const std::vector&lt;uint8_t&gt;&amp; data, const std::string&amp; signature_name) {</text:p>
      <text:p text:style-name="Preformatted_20_Text"><text:s text:c="4"/>return globalSignatureChecker.checkSignature(data, signature_name);</text:p>
      <text:p text:style-name="Preformatted_20_Text">}</text:p>
      <text:p text:style-name="Preformatted_20_Text"/>
      <text:p text:style-name="Preformatted_20_Text">// Alternative: Check for all known enterprise threats</text:p>
      <text:p text:style-name="Preformatted_20_Text">std::vector&lt;std::string&gt; checkForEnterpriseThreats(const std::vector&lt;uint8_t&gt;&amp; data) {</text:p>
      <text:p text:style-name="Preformatted_20_Text"><text:s text:c="4"/>return globalSignatureChecker.checkAllSignatures(data);</text:p>
      <text:p text:style-name="Preformatted_20_Text">}</text:p>
      <text:p text:style-name="Preformatted_20_Text"/>
      <text:p text:style-name="Preformatted_20_Text">// Helper function to load custom signatures from file (stub for now)</text:p>
      <text:p text:style-name="Preformatted_20_Text">void loadCustomSignatures(const std::string&amp; signature_file) {</text:p>
      <text:p text:style-name="Preformatted_20_Text"><text:s text:c="4"/>std::cout &lt;&lt; "[EnterpriseSignatureChecker] Loading custom signatures from: " </text:p>
      <text:p text:style-name="Preformatted_20_Text"><text:s text:c="14"/>&lt;&lt; signature_file &lt;&lt; std::endl;</text:p>
      <text:p text:style-name="Preformatted_20_Text"><text:s text:c="4"/>// Implementation would parse signature file (YARA rules, custom format, etc.)</text:p>
      <text:p text:style-name="Preformatted_20_Text">}</text:p>
      <text:p text:style-name="Preformatted_20_Text"/>
      <text:p text:style-name="Preformatted_20_Text">// Optional: For integration with V6_EnterpriseQuantumSystem class</text:p>
      <text:p text:style-name="Preformatted_20_Text">// Add this as a private member function or use composition</text:p>
      <text:p text:style-name="Preformatted_20_Text">class EnhancedSignatureChecker {</text:p>
      <text:p text:style-name="Preformatted_20_Text">private:</text:p>
      <text:p text:style-name="Preformatted_20_Text"><text:s text:c="4"/>EnterpriseSignatureChecker checker;</text:p>
      <text:p text:style-name="Preformatted_20_Text"><text:s text:c="4"/></text:p>
      <text:p text:style-name="Preformatted_20_Text">public:</text:p>
      <text:p text:style-name="Preformatted_20_Text"><text:s text:c="4"/>bool check(const std::vector&lt;uint8_t&gt;&amp; data, const std::string&amp; signature) {</text:p>
      <text:p text:style-name="Preformatted_20_Text"><text:soft-page-break/><text:s text:c="8"/>return checker.checkSignature(data, signature);</text:p>
      <text:p text:style-name="Preformatted_20_Text"><text:s text:c="4"/>}</text:p>
      <text:p text:style-name="Preformatted_20_Text"><text:s text:c="4"/></text:p>
      <text:p text:style-name="Preformatted_20_Text"><text:s text:c="4"/>std::vector&lt;std::string&gt; scan(const std::vector&lt;uint8_t&gt;&amp; data) {</text:p>
      <text:p text:style-name="Preformatted_20_Text"><text:s text:c="8"/>return checker.checkAllSignatures(data);</text:p>
      <text:p text:style-name="Preformatted_20_Text"><text:s text:c="4"/>}</text:p>
      <text:p text:style-name="P15">};</text:p>
      <text:p text:style-name="Text_20_body"><text:span text:style-name="Strong_20_Emphasis">To integrate this with your existing V6_EnterpriseQuantumSystem class in </text:span><text:span text:style-name="Strong_20_Emphasis"><text:span text:style-name="Source_20_Text">cs v8 needs stubs completion.cpp</text:span></text:span><text:span text:style-name="Strong_20_Emphasis">:</text:span></text:p>
      <text:p text:style-name="Text_20_body">Option 1: Replace the existing <text:span text:style-name="Source_20_Text">checkSignature</text:span> method with a call to the enhanced version:</text:p>
      <text:p text:style-name="Text_20_body">cpp</text:p>
      <text:p text:style-name="Preformatted_20_Text">// In V6_EnterpriseQuantumSystem class:</text:p>
      <text:p text:style-name="Preformatted_20_Text">private:</text:p>
      <text:p text:style-name="Preformatted_20_Text"><text:s text:c="4"/>EnterpriseSignatureChecker signatureChecker;</text:p>
      <text:p text:style-name="Preformatted_20_Text"><text:s text:c="4"/></text:p>
      <text:p text:style-name="Preformatted_20_Text"><text:s text:c="4"/>bool checkSignature(const std::vector&lt;uint8_t&gt;&amp; data, const std::string&amp; signature) {</text:p>
      <text:p text:style-name="Preformatted_20_Text"><text:s text:c="8"/>return signatureChecker.checkSignature(data, signature);</text:p>
      <text:p text:style-name="P15"><text:s text:c="4"/>}</text:p>
      <text:p text:style-name="Text_20_body">Option 2: Keep the existing method but enhance it:</text:p>
      <text:p text:style-name="Text_20_body">cpp</text:p>
      <text:p text:style-name="Preformatted_20_Text">// Enhanced version within V6_EnterpriseQuantumSystem class</text:p>
      <text:p text:style-name="Preformatted_20_Text">bool checkSignature(const std::vector&lt;uint8_t&gt;&amp; data, const std::string&amp; signature) {</text:p>
      <text:p text:style-name="Preformatted_20_Text"><text:s text:c="4"/>// Try enhanced signature checking first</text:p>
      <text:p text:style-name="Preformatted_20_Text"><text:s text:c="4"/>EnterpriseSignatureChecker enhancedChecker;</text:p>
      <text:p text:style-name="Preformatted_20_Text"><text:s text:c="4"/>if (enhancedChecker.checkSignature(data, signature)) {</text:p>
      <text:p text:style-name="Preformatted_20_Text"><text:s text:c="8"/>return true;</text:p>
      <text:p text:style-name="Preformatted_20_Text"><text:s text:c="4"/>}</text:p>
      <text:p text:style-name="Preformatted_20_Text"><text:s text:c="4"/></text:p>
      <text:p text:style-name="Preformatted_20_Text"><text:s text:c="4"/>// Fallback to original method</text:p>
      <text:p text:style-name="Preformatted_20_Text"><text:s text:c="4"/>std::vector&lt;uint8_t&gt; pattern;</text:p>
      <text:p text:style-name="Preformatted_20_Text"><text:s text:c="4"/>for (char c : signature) {</text:p>
      <text:p text:style-name="Preformatted_20_Text"><text:s text:c="8"/>pattern.push_back(static_cast&lt;uint8_t&gt;(c));</text:p>
      <text:p text:style-name="Preformatted_20_Text"><text:s text:c="4"/>}</text:p>
      <text:p text:style-name="Preformatted_20_Text"><text:s text:c="4"/>return std::search(data.begin(), data.end(), pattern.begin(), pattern.end()) != data.end();</text:p>
      <text:p text:style-name="P15">}</text:p>
      <text:p text:style-name="Text_20_body">This enhanced version provides:</text:p>
      <text:list xml:id="list2742678878805151166" text:style-name="L10">
        <text:list-item>
          <text:p text:style-name="P10">Wildcard pattern matching</text:p>
        </text:list-item>
        <text:list-item>
          <text:p text:style-name="P10">Case-insensitive matching option</text:p>
        </text:list-item>
        <text:list-item>
          <text:p text:style-name="P10">Offset constraints</text:p>
        </text:list-item>
        <text:list-item>
          <text:p text:style-name="P10">Pre-defined enterprise threat signatures</text:p>
        </text:list-item>
        <text:list-item>
          <text:p text:style-name="P10">Extensible signature database</text:p>
        </text:list-item>
        <text:list-item>
          <text:p text:style-name="P10">Advanced matching capabilities</text:p>
        </text:list-item>
        <text:list-item>
          <text:p text:style-name="P10">Better integration with enterprise security require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10T22:51:44.84</meta:creation-date>
    <meta:document-statistic meta:table-count="0" meta:image-count="0" meta:object-count="0" meta:page-count="24" meta:paragraph-count="895" meta:word-count="7373" meta:character-count="53606"/>
    <dc:date>2025-12-10T22:52:47.42</dc:date>
    <dc:creator>Peter Thompson</dc:creator>
    <meta:editing-duration>PT1M3S</meta:editing-duration>
    <meta:editing-cycles>1</meta:editing-cycles>
    <meta:generator>OpenOffice/4.1.15$Win32 OpenOffice.org_project/4115m2$Build-9813</meta:generator>
  </office:meta>
</office:document-meta>
</file>