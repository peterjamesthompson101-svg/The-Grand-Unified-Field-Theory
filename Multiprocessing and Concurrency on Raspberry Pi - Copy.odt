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928cm"/>
    </style:style>
    <style:style style:name="Table1.C" style:family="table-column">
      <style:table-column-properties style:column-width="1.815cm"/>
    </style:style>
    <style:style style:name="Table1.D" style:family="table-column">
      <style:table-column-properties style:column-width="1.669cm"/>
    </style:style>
    <style:style style:name="Table1.E" style:family="table-column">
      <style:table-column-properties style:column-width="2.84cm"/>
    </style:style>
    <style:style style:name="Table1.F" style:family="table-column">
      <style:table-column-properties style:column-width="4.73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left="0.265cm" fo:margin-right="0cm" fo:text-indent="0cm" style:auto-text-indent="false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ltiprocessing and Concurrency on Raspberry Pi</text:p>
      <text:p text:style-name="P3">programs that run on raspberry pi 5 which allows multiple processes at once (python allows 1 at a time)?</text:p>
      <text:p text:style-name="P2">You're right that by default Python runs single-threaded, but there are several ways to run multiple processes concurrently on Raspberry Pi 5 (or any system). Here are the main approaches:</text:p>
      <text:h text:style-name="Heading_20_2" text:outline-level="2">1. <text:span text:style-name="Strong_20_Emphasis">Python's Built-in Options</text:span></text:h>
      <text:h text:style-name="Heading_20_3" text:outline-level="3"><text:span text:style-name="Strong_20_Emphasis">Multiprocessing</text:span> (True parallel execution - uses multiple CPU cores)</text:h>
      <text:p text:style-name="Text_20_body">python</text:p>
      <text:p text:style-name="Preformatted_20_Text">import multiprocessing</text:p>
      <text:p text:style-name="Preformatted_20_Text">import time</text:p>
      <text:p text:style-name="Preformatted_20_Text"/>
      <text:p text:style-name="Preformatted_20_Text">def worker(name):</text:p>
      <text:p text:style-name="Preformatted_20_Text"><text:s text:c="4"/>print(f"Worker {name} starting")</text:p>
      <text:p text:style-name="Preformatted_20_Text"><text:s text:c="4"/>time.sleep(2)</text:p>
      <text:p text:style-name="Preformatted_20_Text"><text:s text:c="4"/>print(f"Worker {name} finished")</text:p>
      <text:p text:style-name="Preformatted_20_Text"/>
      <text:p text:style-name="Preformatted_20_Text">if __name__ == "__main__":</text:p>
      <text:p text:style-name="Preformatted_20_Text"><text:s text:c="4"/>processes = []</text:p>
      <text:p text:style-name="Preformatted_20_Text"><text:s text:c="4"/>for i in range(4):</text:p>
      <text:p text:style-name="Preformatted_20_Text"><text:s text:c="8"/>p = multiprocessing.Process(target=worker, args=(i,))</text:p>
      <text:p text:style-name="Preformatted_20_Text"><text:s text:c="8"/>processes.append(p)</text:p>
      <text:p text:style-name="Preformatted_20_Text"><text:s text:c="8"/>p.start()</text:p>
      <text:p text:style-name="Preformatted_20_Text"><text:s text:c="4"/></text:p>
      <text:p text:style-name="Preformatted_20_Text"><text:s text:c="4"/>for p in processes:</text:p>
      <text:p text:style-name="P4"><text:s text:c="8"/>p.join()</text:p>
      <text:h text:style-name="Heading_20_3" text:outline-level="3"><text:span text:style-name="Strong_20_Emphasis">Threading</text:span> (Concurrent but not truly parallel for CPU-bound tasks due to GIL)</text:h>
      <text:p text:style-name="Text_20_body">python</text:p>
      <text:p text:style-name="Preformatted_20_Text">import threading</text:p>
      <text:p text:style-name="Preformatted_20_Text">import time</text:p>
      <text:p text:style-name="Preformatted_20_Text"/>
      <text:p text:style-name="Preformatted_20_Text">def worker(name):</text:p>
      <text:p text:style-name="Preformatted_20_Text"><text:s text:c="4"/>print(f"Worker {name} starting")</text:p>
      <text:p text:style-name="Preformatted_20_Text"><text:s text:c="4"/>time.sleep(2)</text:p>
      <text:p text:style-name="Preformatted_20_Text"><text:s text:c="4"/>print(f"Worker {name} finished")</text:p>
      <text:p text:style-name="Preformatted_20_Text"/>
      <text:p text:style-name="Preformatted_20_Text">threads = []</text:p>
      <text:p text:style-name="Preformatted_20_Text">for i in range(4):</text:p>
      <text:p text:style-name="Preformatted_20_Text"><text:s text:c="4"/>t = threading.Thread(target=worker, args=(i,))</text:p>
      <text:p text:style-name="Preformatted_20_Text"><text:s text:c="4"/>threads.append(t)</text:p>
      <text:p text:style-name="Preformatted_20_Text"><text:s text:c="4"/>t.start()</text:p>
      <text:p text:style-name="Preformatted_20_Text"/>
      <text:p text:style-name="Preformatted_20_Text">for t in threads:</text:p>
      <text:p text:style-name="P4"><text:s text:c="4"/>t.join()</text:p>
      <text:h text:style-name="Heading_20_3" text:outline-level="3"><text:span text:style-name="Strong_20_Emphasis">Asyncio</text:span> (Single-threaded concurrency for I/O-bound tasks)</text:h>
      <text:p text:style-name="Text_20_body">python</text:p>
      <text:p text:style-name="Preformatted_20_Text">import asyncio</text:p>
      <text:p text:style-name="Preformatted_20_Text">import time</text:p>
      <text:p text:style-name="Preformatted_20_Text"/>
      <text:p text:style-name="Preformatted_20_Text"><text:soft-page-break/>async def worker(name):</text:p>
      <text:p text:style-name="Preformatted_20_Text"><text:s text:c="4"/>print(f"Worker {name} starting")</text:p>
      <text:p text:style-name="Preformatted_20_Text"><text:s text:c="4"/>await asyncio.sleep(2)</text:p>
      <text:p text:style-name="Preformatted_20_Text"><text:s text:c="4"/>print(f"Worker {name} finished")</text:p>
      <text:p text:style-name="Preformatted_20_Text"/>
      <text:p text:style-name="Preformatted_20_Text">async def main():</text:p>
      <text:p text:style-name="Preformatted_20_Text"><text:s text:c="4"/>tasks = []</text:p>
      <text:p text:style-name="Preformatted_20_Text"><text:s text:c="4"/>for i in range(4):</text:p>
      <text:p text:style-name="Preformatted_20_Text"><text:s text:c="8"/>tasks.append(asyncio.create_task(worker(i)))</text:p>
      <text:p text:style-name="Preformatted_20_Text"><text:s text:c="4"/>await asyncio.gather(*tasks)</text:p>
      <text:p text:style-name="Preformatted_20_Text"/>
      <text:p text:style-name="P4">asyncio.run(main())</text:p>
      <text:h text:style-name="Heading_20_2" text:outline-level="2">2. <text:span text:style-name="Strong_20_Emphasis">Using Subprocess Module</text:span> (Run external programs)</text:h>
      <text:p text:style-name="Text_20_body">python</text:p>
      <text:p text:style-name="Preformatted_20_Text">import subprocess</text:p>
      <text:p text:style-name="Preformatted_20_Text">import time</text:p>
      <text:p text:style-name="Preformatted_20_Text"/>
      <text:p text:style-name="Preformatted_20_Text"># Run multiple external commands</text:p>
      <text:p text:style-name="Preformatted_20_Text">processes = [</text:p>
      <text:p text:style-name="Preformatted_20_Text"><text:s text:c="4"/>subprocess.Popen(["python3", "script1.py"]),</text:p>
      <text:p text:style-name="Preformatted_20_Text"><text:s text:c="4"/>subprocess.Popen(["python3", "script2.py"]),</text:p>
      <text:p text:style-name="Preformatted_20_Text"><text:s text:c="4"/>subprocess.Popen(["python3", "script3.py"])</text:p>
      <text:p text:style-name="Preformatted_20_Text">]</text:p>
      <text:p text:style-name="Preformatted_20_Text"/>
      <text:p text:style-name="Preformatted_20_Text"># Wait for all to complete</text:p>
      <text:p text:style-name="Preformatted_20_Text">for p in processes:</text:p>
      <text:p text:style-name="P4"><text:s text:c="4"/>p.wait()</text:p>
      <text:h text:style-name="Heading_20_2" text:outline-level="2">3. <text:span text:style-name="Strong_20_Emphasis">Using Concurrent.Futures</text:span> (Simplified interface)</text:h>
      <text:p text:style-name="Text_20_body">python</text:p>
      <text:p text:style-name="Preformatted_20_Text">from concurrent.futures import ProcessPoolExecutor, ThreadPoolExecutor</text:p>
      <text:p text:style-name="Preformatted_20_Text">import time</text:p>
      <text:p text:style-name="Preformatted_20_Text"/>
      <text:p text:style-name="Preformatted_20_Text">def task(name):</text:p>
      <text:p text:style-name="Preformatted_20_Text"><text:s text:c="4"/>print(f"Task {name} starting")</text:p>
      <text:p text:style-name="Preformatted_20_Text"><text:s text:c="4"/>time.sleep(2)</text:p>
      <text:p text:style-name="Preformatted_20_Text"><text:s text:c="4"/>return f"Task {name} completed"</text:p>
      <text:p text:style-name="Preformatted_20_Text"/>
      <text:p text:style-name="Preformatted_20_Text"># Using multiple processes (parallel)</text:p>
      <text:p text:style-name="Preformatted_20_Text">with ProcessPoolExecutor(max_workers=4) as executor:</text:p>
      <text:p text:style-name="Preformatted_20_Text"><text:s text:c="4"/>results = list(executor.map(task, range(4)))</text:p>
      <text:p text:style-name="Preformatted_20_Text"/>
      <text:p text:style-name="Preformatted_20_Text"># Using multiple threads</text:p>
      <text:p text:style-name="Preformatted_20_Text">with ThreadPoolExecutor(max_workers=4) as executor:</text:p>
      <text:p text:style-name="P4"><text:s text:c="4"/>results = list(executor.map(task, range(4)))</text:p>
      <text:h text:style-name="Heading_20_2" text:outline-level="2">4. <text:span text:style-name="Strong_20_Emphasis">Using External Process Managers</text:span></text:h>
      <text:h text:style-name="Heading_20_3" text:outline-level="3"><text:span text:style-name="Strong_20_Emphasis">Supervisor</text:span> (Process control system)</text:h>
      <text:p text:style-name="Text_20_body">bash</text:p>
      <text:p text:style-name="Preformatted_20_Text"># Install</text:p>
      <text:p text:style-name="Preformatted_20_Text"><text:soft-page-break/>sudo apt install supervisor</text:p>
      <text:p text:style-name="Preformatted_20_Text"/>
      <text:p text:style-name="Preformatted_20_Text"># Configure in /etc/supervisor/conf.d/myapp.conf</text:p>
      <text:p text:style-name="Preformatted_20_Text">[program:script1]</text:p>
      <text:p text:style-name="Preformatted_20_Text">command=python3 /home/pi/script1.py</text:p>
      <text:p text:style-name="Preformatted_20_Text">autostart=true</text:p>
      <text:p text:style-name="Preformatted_20_Text">autorestart=true</text:p>
      <text:p text:style-name="Preformatted_20_Text"/>
      <text:p text:style-name="Preformatted_20_Text">[program:script2]</text:p>
      <text:p text:style-name="Preformatted_20_Text">command=python3 /home/pi/script2.py</text:p>
      <text:p text:style-name="Preformatted_20_Text">autostart=true</text:p>
      <text:p text:style-name="P4">autorestart=true</text:p>
      <text:h text:style-name="Heading_20_3" text:outline-level="3"><text:span text:style-name="Strong_20_Emphasis">Systemd Services</text:span> (Run multiple Python scripts as services)</text:h>
      <text:p text:style-name="Text_20_body">bash</text:p>
      <text:p text:style-name="Preformatted_20_Text"># Create service file: /etc/systemd/system/myscript1.service</text:p>
      <text:p text:style-name="Preformatted_20_Text">[Unit]</text:p>
      <text:p text:style-name="Preformatted_20_Text">Description=My Python Script 1</text:p>
      <text:p text:style-name="Preformatted_20_Text"/>
      <text:p text:style-name="Preformatted_20_Text">[Service]</text:p>
      <text:p text:style-name="Preformatted_20_Text">ExecStart=/usr/bin/python3 /home/pi/script1.py</text:p>
      <text:p text:style-name="Preformatted_20_Text">Restart=always</text:p>
      <text:p text:style-name="Preformatted_20_Text">User=pi</text:p>
      <text:p text:style-name="Preformatted_20_Text"/>
      <text:p text:style-name="Preformatted_20_Text">[Install]</text:p>
      <text:p text:style-name="Preformatted_20_Text">WantedBy=multi-user.target</text:p>
      <text:p text:style-name="Preformatted_20_Text"/>
      <text:p text:style-name="Preformatted_20_Text"># Create multiple services and enable them</text:p>
      <text:p text:style-name="Preformatted_20_Text">sudo systemctl enable myscript1.service</text:p>
      <text:p text:style-name="P4">sudo systemctl enable myscript2.service</text:p>
      <text:h text:style-name="Heading_20_2" text:outline-level="2">5. <text:span text:style-name="Strong_20_Emphasis">Message Queues for Coordination</text:span></text:h>
      <text:h text:style-name="Heading_20_3" text:outline-level="3"><text:span text:style-name="Strong_20_Emphasis">Using Redis + RQ</text:span> (Redis Queue)</text:h>
      <text:p text:style-name="Text_20_body">python</text:p>
      <text:p text:style-name="Preformatted_20_Text"># Install: pip install rq redis</text:p>
      <text:p text:style-name="Preformatted_20_Text"># Worker script</text:p>
      <text:p text:style-name="Preformatted_20_Text">from rq import Queue</text:p>
      <text:p text:style-name="Preformatted_20_Text">from redis import Redis</text:p>
      <text:p text:style-name="Preformatted_20_Text">from mytasks import my_function</text:p>
      <text:p text:style-name="Preformatted_20_Text"/>
      <text:p text:style-name="Preformatted_20_Text">redis_conn = Redis()</text:p>
      <text:p text:style-name="Preformatted_20_Text">q = Queue(connection=redis_conn)</text:p>
      <text:p text:style-name="Preformatted_20_Text"/>
      <text:p text:style-name="Preformatted_20_Text"># Enqueue tasks</text:p>
      <text:p text:style-name="Preformatted_20_Text">for i in range(10):</text:p>
      <text:p text:style-name="Preformatted_20_Text"><text:s text:c="4"/>q.enqueue(my_function, i)</text:p>
      <text:p text:style-name="Preformatted_20_Text"/>
      <text:p text:style-name="Preformatted_20_Text"># Run workers in separate terminals</text:p>
      <text:p text:style-name="P4"># rq worker</text:p>
      <text:h text:style-name="Heading_20_3" text:outline-level="3"><text:span text:style-name="Strong_20_Emphasis">Using Celery</text:span> (Distributed task queue)</text:h>
      <text:p text:style-name="Text_20_body">python</text:p>
      <text:p text:style-name="Preformatted_20_Text"><text:soft-page-break/># Install: pip install celery redis</text:p>
      <text:p text:style-name="Preformatted_20_Text"># tasks.py</text:p>
      <text:p text:style-name="Preformatted_20_Text">from celery import Celery</text:p>
      <text:p text:style-name="Preformatted_20_Text"/>
      <text:p text:style-name="Preformatted_20_Text">app = Celery('tasks', broker='redis://localhost:6379/0')</text:p>
      <text:p text:style-name="Preformatted_20_Text"/>
      <text:p text:style-name="Preformatted_20_Text">@app.task</text:p>
      <text:p text:style-name="Preformatted_20_Text">def add(x, y):</text:p>
      <text:p text:style-name="Preformatted_20_Text"><text:s text:c="4"/>return x + y</text:p>
      <text:p text:style-name="Preformatted_20_Text"/>
      <text:p text:style-name="P4"># Start worker: celery -A tasks worker --loglevel=info</text:p>
      <text:h text:style-name="Heading_20_2" text:outline-level="2">6. <text:span text:style-name="Strong_20_Emphasis">Full-Fledged Solutions for Raspberry Pi</text:span></text:h>
      <text:h text:style-name="Heading_20_3" text:outline-level="3"><text:span text:style-name="Strong_20_Emphasis">Docker Compose</text:span> (Containerized applications)</text:h>
      <text:p text:style-name="Text_20_body">yaml</text:p>
      <text:p text:style-name="Preformatted_20_Text"># docker-compose.yml</text:p>
      <text:p text:style-name="Preformatted_20_Text">version: '3'</text:p>
      <text:p text:style-name="Preformatted_20_Text">services:</text:p>
      <text:p text:style-name="Preformatted_20_Text"><text:s text:c="2"/>script1:</text:p>
      <text:p text:style-name="Preformatted_20_Text"><text:s text:c="4"/>image: python:3.9</text:p>
      <text:p text:style-name="Preformatted_20_Text"><text:s text:c="4"/>command: python /app/script1.py</text:p>
      <text:p text:style-name="Preformatted_20_Text"><text:s text:c="4"/></text:p>
      <text:p text:style-name="Preformatted_20_Text"><text:s text:c="2"/>script2:</text:p>
      <text:p text:style-name="Preformatted_20_Text"><text:s text:c="4"/>image: python:3.9</text:p>
      <text:p text:style-name="Preformatted_20_Text"><text:s text:c="4"/>command: python /app/script2.py</text:p>
      <text:p text:style-name="Preformatted_20_Text"><text:s text:c="4"/></text:p>
      <text:p text:style-name="Preformatted_20_Text"><text:s text:c="2"/>script3:</text:p>
      <text:p text:style-name="Preformatted_20_Text"><text:s text:c="4"/>image: python:3.9</text:p>
      <text:p text:style-name="P4"><text:s text:c="4"/>command: python /app/script3.py</text:p>
      <text:h text:style-name="Heading_20_3" text:outline-level="3"><text:span text:style-name="Strong_20_Emphasis">Kubernetes on Raspberry Pi</text:span> (k3s - lightweight Kubernetes)</text:h>
      <text:p text:style-name="Text_20_body">bash</text:p>
      <text:p text:style-name="Preformatted_20_Text"># Install k3s</text:p>
      <text:p text:style-name="Preformatted_20_Text">curl -sfL https://get.k3s.io | sh -</text:p>
      <text:p text:style-name="Preformatted_20_Text"/>
      <text:p text:style-name="P4"># Deploy multiple pods running Python scripts</text:p>
      <text:h text:style-name="Heading_20_2" text:outline-level="2"><text:span text:style-name="Strong_20_Emphasis">Recommendation for Raspberry Pi 5:</text:span></text:h>
      <text:list xml:id="list1751393080946035934" text:style-name="L1">
        <text:list-item>
          <text:p text:style-name="P1"><text:span text:style-name="Strong_20_Emphasis">For CPU-intensive tasks</text:span>: Use <text:span text:style-name="Source_20_Text">multiprocessing</text:span> or <text:span text:style-name="Source_20_Text">ProcessPoolExecutor</text:span> (Pi 5 has 4 cores)</text:p>
        </text:list-item>
        <text:list-item>
          <text:p text:style-name="P1"><text:span text:style-name="Strong_20_Emphasis">For I/O-bound tasks</text:span>: Use <text:span text:style-name="Source_20_Text">asyncio</text:span> or <text:span text:style-name="Source_20_Text">ThreadPoolExecutor</text:span></text:p>
        </text:list-item>
        <text:list-item>
          <text:p text:style-name="P1"><text:span text:style-name="Strong_20_Emphasis">For persistent background services</text:span>: Use <text:span text:style-name="Source_20_Text">systemd</text:span> or <text:span text:style-name="Source_20_Text">Supervisor</text:span></text:p>
        </text:list-item>
        <text:list-item>
          <text:p text:style-name="P1"><text:span text:style-name="Strong_20_Emphasis">For complex distributed systems</text:span>: Use <text:span text:style-name="Source_20_Text">Celery</text:span> or message queues</text:p>
        </text:list-item>
        <text:list-item>
          <text:p text:style-name="P1"><text:span text:style-name="Strong_20_Emphasis">For isolation</text:span>: Use Docker containers</text:p>
        </text:list-item>
      </text:list>
      <text:p text:style-name="Text_20_body">The Raspberry Pi 5's quad-core Cortex-A76 processor (with 4 performance cores) is quite capable of handling multiple processes simultaneously. The choice depends on your specific use case - whether you need true parallelism, just concurrency, or persistent background services.</text:p>
      <text:p text:style-name="Text_20_body"><text:soft-page-break/>I need a alternate to python that runs multiple processes at the same time</text:p>
      <text:p text:style-name="P2">For <text:span text:style-name="Strong_20_Emphasis">true parallel execution</text:span> on Raspberry Pi 5 where multiple processes run <text:span text:style-name="Strong_20_Emphasis">simultaneously</text:span>, here are the best alternatives to Python:</text:p>
      <text:h text:style-name="Heading_20_2" text:outline-level="2">1. <text:span text:style-name="Strong_20_Emphasis">C/C++</text:span> (Native, Fast, True Parallelism)</text:h>
      <text:p text:style-name="Text_20_body">Most operating systems and programming languages support multi-processing, but here are the best alternatives that handle it well:</text:p>
      <text:h text:style-name="Heading_20_3" text:outline-level="3"><text:span text:style-name="Strong_20_Emphasis">C with POSIX threads/fork</text:span></text:h>
      <text:p text:style-name="Text_20_body">c</text:p>
      <text:p text:style-name="Preformatted_20_Text">#include &lt;stdio.h&gt;</text:p>
      <text:p text:style-name="Preformatted_20_Text">#include &lt;stdlib.h&gt;</text:p>
      <text:p text:style-name="Preformatted_20_Text">#include &lt;pthread.h&gt;</text:p>
      <text:p text:style-name="Preformatted_20_Text">#include &lt;unistd.h&gt;</text:p>
      <text:p text:style-name="Preformatted_20_Text"/>
      <text:p text:style-name="Preformatted_20_Text">void* worker(void* arg) {</text:p>
      <text:p text:style-name="Preformatted_20_Text"><text:s text:c="4"/>int id = *(int*)arg;</text:p>
      <text:p text:style-name="Preformatted_20_Text"><text:s text:c="4"/>printf("Worker %d starting\n", id);</text:p>
      <text:p text:style-name="Preformatted_20_Text"><text:s text:c="4"/>sleep(2);</text:p>
      <text:p text:style-name="Preformatted_20_Text"><text:s text:c="4"/>printf("Worker %d finished\n", id);</text:p>
      <text:p text:style-name="Preformatted_20_Text"><text:s text:c="4"/>return NULL;</text:p>
      <text:p text:style-name="Preformatted_20_Text">}</text:p>
      <text:p text:style-name="Preformatted_20_Text"/>
      <text:p text:style-name="Preformatted_20_Text">int main() {</text:p>
      <text:p text:style-name="Preformatted_20_Text"><text:s text:c="4"/>pthread_t threads[4];</text:p>
      <text:p text:style-name="Preformatted_20_Text"><text:s text:c="4"/>int ids[4];</text:p>
      <text:p text:style-name="Preformatted_20_Text"><text:s text:c="4"/></text:p>
      <text:p text:style-name="Preformatted_20_Text"><text:s text:c="4"/>for (int i = 0; i &lt; 4; i++) {</text:p>
      <text:p text:style-name="Preformatted_20_Text"><text:s text:c="8"/>ids[i] = i;</text:p>
      <text:p text:style-name="Preformatted_20_Text"><text:s text:c="8"/>pthread_create(&amp;threads[i], NULL, worker, &amp;ids[i]);</text:p>
      <text:p text:style-name="Preformatted_20_Text"><text:s text:c="4"/>}</text:p>
      <text:p text:style-name="Preformatted_20_Text"><text:s text:c="4"/></text:p>
      <text:p text:style-name="Preformatted_20_Text"><text:s text:c="4"/>for (int i = 0; i &lt; 4; i++) {</text:p>
      <text:p text:style-name="Preformatted_20_Text"><text:s text:c="8"/>pthread_join(threads[i], NULL);</text:p>
      <text:p text:style-name="Preformatted_20_Text"><text:s text:c="4"/>}</text:p>
      <text:p text:style-name="Preformatted_20_Text"><text:s text:c="4"/></text:p>
      <text:p text:style-name="Preformatted_20_Text"><text:s text:c="4"/>return 0;</text:p>
      <text:p text:style-name="P4">}</text:p>
      <text:p text:style-name="Text_20_body">Compile: <text:span text:style-name="Source_20_Text">gcc -pthread program.c -o program</text:span></text:p>
      <text:h text:style-name="Heading_20_2" text:outline-level="2">2. <text:span text:style-name="Strong_20_Emphasis">Go (Golang)</text:span> - <text:span text:style-name="Strong_20_Emphasis">Excellent Choice for Raspberry Pi</text:span></text:h>
      <text:p text:style-name="Text_20_body">Go has built-in, simple-to-use goroutines and channels for concurrency:</text:p>
      <text:p text:style-name="Text_20_body">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fmt"</text:p>
      <text:p text:style-name="Preformatted_20_Text"><text:s text:c="4"/>"sync"</text:p>
      <text:p text:style-name="Preformatted_20_Text"><text:s text:c="4"/>"time"</text:p>
      <text:p text:style-name="Preformatted_20_Text">)</text:p>
      <text:p text:style-name="Preformatted_20_Text"/>
      <text:p text:style-name="Preformatted_20_Text">func worker(id int, wg *sync.WaitGroup) {</text:p>
      <text:p text:style-name="Preformatted_20_Text"><text:s text:c="4"/>defer wg.Done()</text:p>
      <text:p text:style-name="Preformatted_20_Text"><text:soft-page-break/><text:s text:c="4"/>fmt.Printf("Worker %d starting\n", id)</text:p>
      <text:p text:style-name="Preformatted_20_Text"><text:s text:c="4"/>time.Sleep(2 * time.Second)</text:p>
      <text:p text:style-name="Preformatted_20_Text"><text:s text:c="4"/>fmt.Printf("Worker %d finished\n", id)</text:p>
      <text:p text:style-name="Preformatted_20_Text">}</text:p>
      <text:p text:style-name="Preformatted_20_Text"/>
      <text:p text:style-name="Preformatted_20_Text">func main() {</text:p>
      <text:p text:style-name="Preformatted_20_Text"><text:s text:c="4"/>var wg sync.WaitGroup</text:p>
      <text:p text:style-name="Preformatted_20_Text"><text:s text:c="4"/></text:p>
      <text:p text:style-name="Preformatted_20_Text"><text:s text:c="4"/>for i := 1; i &lt;= 4; i++ {</text:p>
      <text:p text:style-name="Preformatted_20_Text"><text:s text:c="8"/>wg.Add(1)</text:p>
      <text:p text:style-name="Preformatted_20_Text"><text:s text:c="8"/>go worker(i, &amp;wg)</text:p>
      <text:p text:style-name="Preformatted_20_Text"><text:s text:c="4"/>}</text:p>
      <text:p text:style-name="Preformatted_20_Text"><text:s text:c="4"/></text:p>
      <text:p text:style-name="Preformatted_20_Text"><text:s text:c="4"/>wg.Wait()</text:p>
      <text:p text:style-name="Preformatted_20_Text"><text:s text:c="4"/>fmt.Println("All workers completed")</text:p>
      <text:p text:style-name="P4">}</text:p>
      <text:p text:style-name="Text_20_body">Install: <text:span text:style-name="Source_20_Text">sudo apt install golang</text:span></text:p>
      <text:h text:style-name="Heading_20_2" text:outline-level="2">3. <text:span text:style-name="Strong_20_Emphasis">Rust</text:span> (Memory-safe, High Performance)</text:h>
      <text:p text:style-name="Text_20_body">rust</text:p>
      <text:p text:style-name="Preformatted_20_Text">use std::thread;</text:p>
      <text:p text:style-name="Preformatted_20_Text">use std::time::Duration;</text:p>
      <text:p text:style-name="Preformatted_20_Text"/>
      <text:p text:style-name="Preformatted_20_Text">fn main() {</text:p>
      <text:p text:style-name="Preformatted_20_Text"><text:s text:c="4"/>let handles: Vec&lt;_&gt; = (0..4).map(|i| {</text:p>
      <text:p text:style-name="Preformatted_20_Text"><text:s text:c="8"/>thread::spawn(move || {</text:p>
      <text:p text:style-name="Preformatted_20_Text"><text:s text:c="12"/>println!("Worker {} starting", i);</text:p>
      <text:p text:style-name="Preformatted_20_Text"><text:s text:c="12"/>thread::sleep(Duration::from_secs(2));</text:p>
      <text:p text:style-name="Preformatted_20_Text"><text:s text:c="12"/>println!("Worker {} finished", i);</text:p>
      <text:p text:style-name="Preformatted_20_Text"><text:s text:c="8"/>})</text:p>
      <text:p text:style-name="Preformatted_20_Text"><text:s text:c="4"/>}).collect();</text:p>
      <text:p text:style-name="Preformatted_20_Text"><text:s text:c="4"/></text:p>
      <text:p text:style-name="Preformatted_20_Text"><text:s text:c="4"/>for handle in handles {</text:p>
      <text:p text:style-name="Preformatted_20_Text"><text:s text:c="8"/>handle.join().unwrap();</text:p>
      <text:p text:style-name="Preformatted_20_Text"><text:s text:c="4"/>}</text:p>
      <text:p text:style-name="P4">}</text:p>
      <text:p text:style-name="Text_20_body">Install: <text:span text:style-name="Source_20_Text">curl --proto '=https' --tlsv1.2 -sSf https://sh.rustup.rs | sh</text:span></text:p>
      <text:h text:style-name="Heading_20_2" text:outline-level="2">4. <text:span text:style-name="Strong_20_Emphasis">Java</text:span> (Mature, Platform Independent)</text:h>
      <text:p text:style-name="Text_20_body">java</text:p>
      <text:p text:style-name="Preformatted_20_Text">public class Main {</text:p>
      <text:p text:style-name="Preformatted_20_Text"><text:s text:c="4"/>public static void main(String[] args) throws InterruptedException {</text:p>
      <text:p text:style-name="Preformatted_20_Text"><text:s text:c="8"/>Thread[] threads = new Thread[4];</text:p>
      <text:p text:style-name="Preformatted_20_Text"><text:s text:c="8"/></text:p>
      <text:p text:style-name="Preformatted_20_Text"><text:s text:c="8"/>for (int i = 0; i &lt; 4; i++) {</text:p>
      <text:p text:style-name="Preformatted_20_Text"><text:s text:c="12"/>final int id = i;</text:p>
      <text:p text:style-name="Preformatted_20_Text"><text:s text:c="12"/>threads[i] = new Thread(() -&gt; {</text:p>
      <text:p text:style-name="Preformatted_20_Text"><text:s text:c="16"/>System.out.println("Worker " + id + " starting");</text:p>
      <text:p text:style-name="Preformatted_20_Text"><text:s text:c="16"/>try {</text:p>
      <text:p text:style-name="Preformatted_20_Text"><text:s text:c="20"/>Thread.sleep(2000);</text:p>
      <text:p text:style-name="Preformatted_20_Text"><text:s text:c="16"/>} catch (InterruptedException e) {</text:p>
      <text:p text:style-name="Preformatted_20_Text"><text:s text:c="20"/>e.printStackTrace();</text:p>
      <text:p text:style-name="Preformatted_20_Text"><text:s text:c="16"/>}</text:p>
      <text:p text:style-name="Preformatted_20_Text"><text:s text:c="16"/>System.out.println("Worker " + id + " finished");</text:p>
      <text:p text:style-name="Preformatted_20_Text"><text:soft-page-break/><text:s text:c="12"/>});</text:p>
      <text:p text:style-name="Preformatted_20_Text"><text:s text:c="12"/>threads[i].start();</text:p>
      <text:p text:style-name="Preformatted_20_Text"><text:s text:c="8"/>}</text:p>
      <text:p text:style-name="Preformatted_20_Text"><text:s text:c="8"/></text:p>
      <text:p text:style-name="Preformatted_20_Text"><text:s text:c="8"/>for (Thread t : threads) {</text:p>
      <text:p text:style-name="Preformatted_20_Text"><text:s text:c="12"/>t.join();</text:p>
      <text:p text:style-name="Preformatted_20_Text"><text:s text:c="8"/>}</text:p>
      <text:p text:style-name="Preformatted_20_Text"><text:s text:c="4"/>}</text:p>
      <text:p text:style-name="P4">}</text:p>
      <text:p text:style-name="Text_20_body">Install: <text:span text:style-name="Source_20_Text">sudo apt install default-jdk</text:span></text:p>
      <text:h text:style-name="Heading_20_2" text:outline-level="2">5. <text:span text:style-name="Strong_20_Emphasis">C# with .NET Core / Mono</text:span></text:h>
      <text:p text:style-name="Text_20_body">csharp</text:p>
      <text:p text:style-name="Preformatted_20_Text">using System;</text:p>
      <text:p text:style-name="Preformatted_20_Text">using System.Threading;</text:p>
      <text:p text:style-name="Preformatted_20_Text">using System.Threading.Tasks;</text:p>
      <text:p text:style-name="Preformatted_20_Text"/>
      <text:p text:style-name="Preformatted_20_Text">class Program {</text:p>
      <text:p text:style-name="Preformatted_20_Text"><text:s text:c="4"/>static async Task Main() {</text:p>
      <text:p text:style-name="Preformatted_20_Text"><text:s text:c="8"/>Task[] tasks = new Task[4];</text:p>
      <text:p text:style-name="Preformatted_20_Text"><text:s text:c="8"/></text:p>
      <text:p text:style-name="Preformatted_20_Text"><text:s text:c="8"/>for (int i = 0; i &lt; 4; i++) {</text:p>
      <text:p text:style-name="Preformatted_20_Text"><text:s text:c="12"/>int id = i;</text:p>
      <text:p text:style-name="Preformatted_20_Text"><text:s text:c="12"/>tasks[i] = Task.Run(() =&gt; {</text:p>
      <text:p text:style-name="Preformatted_20_Text"><text:s text:c="16"/>Console.WriteLine($"Worker {id} starting");</text:p>
      <text:p text:style-name="Preformatted_20_Text"><text:s text:c="16"/>Thread.Sleep(2000);</text:p>
      <text:p text:style-name="Preformatted_20_Text"><text:s text:c="16"/>Console.WriteLine($"Worker {id} finished");</text:p>
      <text:p text:style-name="Preformatted_20_Text"><text:s text:c="12"/>});</text:p>
      <text:p text:style-name="Preformatted_20_Text"><text:s text:c="8"/>}</text:p>
      <text:p text:style-name="Preformatted_20_Text"><text:s text:c="8"/></text:p>
      <text:p text:style-name="Preformatted_20_Text"><text:s text:c="8"/>await Task.WhenAll(tasks);</text:p>
      <text:p text:style-name="Preformatted_20_Text"><text:s text:c="4"/>}</text:p>
      <text:p text:style-name="P4">}</text:p>
      <text:p text:style-name="Text_20_body">Install: <text:span text:style-name="Source_20_Text">sudo apt install dotnet-sdk</text:span></text:p>
      <text:h text:style-name="Heading_20_2" text:outline-level="2">6. <text:span text:style-name="Strong_20_Emphasis">Julia</text:span> (Scientific Computing, Easy Parallelism)</text:h>
      <text:p text:style-name="Text_20_body">julia</text:p>
      <text:p text:style-name="Preformatted_20_Text">using Distributed</text:p>
      <text:p text:style-name="Preformatted_20_Text"/>
      <text:p text:style-name="Preformatted_20_Text"># Add 4 worker processes</text:p>
      <text:p text:style-name="Preformatted_20_Text">addprocs(4)</text:p>
      <text:p text:style-name="Preformatted_20_Text"/>
      <text:p text:style-name="Preformatted_20_Text">@everywhere function worker(id)</text:p>
      <text:p text:style-name="Preformatted_20_Text"><text:s text:c="4"/>println("Worker $id starting")</text:p>
      <text:p text:style-name="Preformatted_20_Text"><text:s text:c="4"/>sleep(2)</text:p>
      <text:p text:style-name="Preformatted_20_Text"><text:s text:c="4"/>println("Worker $id finished")</text:p>
      <text:p text:style-name="Preformatted_20_Text">end</text:p>
      <text:p text:style-name="Preformatted_20_Text"/>
      <text:p text:style-name="Preformatted_20_Text"># Run in parallel</text:p>
      <text:p text:style-name="Preformatted_20_Text">@sync for i in 1:4</text:p>
      <text:p text:style-name="Preformatted_20_Text"><text:s text:c="4"/>@async remotecall_fetch(worker, i, i)</text:p>
      <text:p text:style-name="P4">end</text:p>
      <text:p text:style-name="Text_20_body">Install: Download from <text:a xlink:type="simple" xlink:href="https://julialang.org/" office:target-frame-name="_blank" xlink:show="new" text:style-name="Internet_20_link" text:visited-style-name="Visited_20_Internet_20_Link">julialang.org</text:a></text:p>
      <text:h text:style-name="Heading_20_2" text:outline-level="2"><text:soft-page-break/>7. <text:span text:style-name="Strong_20_Emphasis">Node.js with Worker Threads</text:span> (JavaScript)</text:h>
      <text:p text:style-name="Text_20_body">javascript</text:p>
      <text:p text:style-name="Preformatted_20_Text">const { Worker, isMainThread, parentPort, workerData } = require('worker_threads');</text:p>
      <text:p text:style-name="Preformatted_20_Text"/>
      <text:p text:style-name="Preformatted_20_Text">if (isMainThread) {</text:p>
      <text:p text:style-name="Preformatted_20_Text"><text:s text:c="4"/>// Main thread</text:p>
      <text:p text:style-name="Preformatted_20_Text"><text:s text:c="4"/>const workers = [];</text:p>
      <text:p text:style-name="Preformatted_20_Text"><text:s text:c="4"/></text:p>
      <text:p text:style-name="Preformatted_20_Text"><text:s text:c="4"/>for (let i = 0; i &lt; 4; i++) {</text:p>
      <text:p text:style-name="Preformatted_20_Text"><text:s text:c="8"/>const worker = new Worker(__filename, {</text:p>
      <text:p text:style-name="Preformatted_20_Text"><text:s text:c="12"/>workerData: i</text:p>
      <text:p text:style-name="Preformatted_20_Text"><text:s text:c="8"/>});</text:p>
      <text:p text:style-name="Preformatted_20_Text"><text:s text:c="8"/>workers.push(worker);</text:p>
      <text:p text:style-name="Preformatted_20_Text"><text:s text:c="4"/>}</text:p>
      <text:p text:style-name="Preformatted_20_Text">} else {</text:p>
      <text:p text:style-name="Preformatted_20_Text"><text:s text:c="4"/>// Worker thread</text:p>
      <text:p text:style-name="Preformatted_20_Text"><text:s text:c="4"/>console.log(`Worker ${workerData} starting`);</text:p>
      <text:p text:style-name="Preformatted_20_Text"><text:s text:c="4"/>setTimeout(() =&gt; {</text:p>
      <text:p text:style-name="Preformatted_20_Text"><text:s text:c="8"/>console.log(`Worker ${workerData} finished`);</text:p>
      <text:p text:style-name="Preformatted_20_Text"><text:s text:c="8"/>parentPort.postMessage('done');</text:p>
      <text:p text:style-name="Preformatted_20_Text"><text:s text:c="4"/>}, 2000);</text:p>
      <text:p text:style-name="P4">}</text:p>
      <text:p text:style-name="Text_20_body">Install: <text:span text:style-name="Source_20_Text">sudo apt install nodejs</text:span></text:p>
      <text:h text:style-name="Heading_20_2" text:outline-level="2">8. <text:span text:style-name="Strong_20_Emphasis">Bash Scripting with Background Jobs</text:span></text:h>
      <text:p text:style-name="Text_20_body">bash</text:p>
      <text:p text:style-name="Preformatted_20_Text">#!/bin/bash</text:p>
      <text:p text:style-name="Preformatted_20_Text"/>
      <text:p text:style-name="Preformatted_20_Text">worker() {</text:p>
      <text:p text:style-name="Preformatted_20_Text"><text:s text:c="4"/>echo "Worker $1 starting"</text:p>
      <text:p text:style-name="Preformatted_20_Text"><text:s text:c="4"/>sleep 2</text:p>
      <text:p text:style-name="Preformatted_20_Text"><text:s text:c="4"/>echo "Worker $1 finished"</text:p>
      <text:p text:style-name="Preformatted_20_Text">}</text:p>
      <text:p text:style-name="Preformatted_20_Text"/>
      <text:p text:style-name="Preformatted_20_Text"># Run 4 workers in background</text:p>
      <text:p text:style-name="Preformatted_20_Text">for i in {1..4}; do</text:p>
      <text:p text:style-name="Preformatted_20_Text"><text:s text:c="4"/>worker $i &amp;</text:p>
      <text:p text:style-name="Preformatted_20_Text">done</text:p>
      <text:p text:style-name="Preformatted_20_Text"/>
      <text:p text:style-name="Preformatted_20_Text"># Wait for all background jobs</text:p>
      <text:p text:style-name="Preformatted_20_Text">wait</text:p>
      <text:p text:style-name="P4">echo "All workers completed"</text:p>
      <text:h text:style-name="Heading_20_2" text:outline-level="2"><text:span text:style-name="Strong_20_Emphasis">Comparison for Raspberry Pi 5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Language</text:p>
            </table:table-cell>
            <table:table-cell table:style-name="Table1.A1" office:value-type="string">
              <text:p text:style-name="Table_20_Heading">Parallelism Model</text:p>
            </table:table-cell>
            <table:table-cell table:style-name="Table1.A1" office:value-type="string">
              <text:p text:style-name="Table_20_Heading">Memory</text:p>
            </table:table-cell>
            <table:table-cell table:style-name="Table1.A1" office:value-type="string">
              <text:p text:style-name="Table_20_Heading">Speed</text:p>
            </table:table-cell>
            <table:table-cell table:style-name="Table1.A1" office:value-type="string">
              <text:p text:style-name="Table_20_Heading">Learning Curve</text:p>
            </table:table-cell>
            <table:table-cell table:style-name="Table1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Go</text:span></text:p>
          </table:table-cell>
          <table:table-cell table:style-name="Table1.A1" office:value-type="string">
            <text:p text:style-name="Table_20_Contents">Goroutines (lightweight)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Fast</text:p>
          </table:table-cell>
          <table:table-cell table:style-name="Table1.A1" office:value-type="string">
            <text:p text:style-name="Table_20_Contents">Easy</text:p>
          </table:table-cell>
          <table:table-cell table:style-name="Table1.A1" office:value-type="string">
            <text:p text:style-name="Table_20_Contents">Network services, API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/C++</text:span></text:p>
          </table:table-cell>
          <table:table-cell table:style-name="Table1.A1" office:value-type="string">
            <text:p text:style-name="Table_20_Contents">Threads/Processes</text:p>
          </table:table-cell>
          <table:table-cell table:style-name="Table1.A1" office:value-type="string">
            <text:p text:style-name="Table_20_Contents">Very Low</text:p>
          </table:table-cell>
          <table:table-cell table:style-name="Table1.A1" office:value-type="string">
            <text:p text:style-name="Table_20_Contents">Very Fast</text:p>
          </table:table-cell>
          <table:table-cell table:style-name="Table1.A1" office:value-type="string">
            <text:p text:style-name="Table_20_Contents">Hard</text:p>
          </table:table-cell>
          <table:table-cell table:style-name="Table1.A1" office:value-type="string">
            <text:p text:style-name="Table_20_Contents">System programming, driv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ust</text:span></text:p>
          </table:table-cell>
          <table:table-cell table:style-name="Table1.A1" office:value-type="string">
            <text:p text:style-name="Table_20_Contents">Threads (safe)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Very <text:soft-page-break/>Fast</text:p>
          </table:table-cell>
          <table:table-cell table:style-name="Table1.A1" office:value-type="string">
            <text:p text:style-name="Table_20_Contents">Steep</text:p>
          </table:table-cell>
          <table:table-cell table:style-name="Table1.A1" office:value-type="string">
            <text:p text:style-name="Table_20_Contents">Embedded, safety-critic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ava</text:span></text:p>
          </table:table-cell>
          <table:table-cell table:style-name="Table1.A1" office:value-type="string">
            <text:p text:style-name="Table_20_Contents">Thread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Fast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Enterprise, Android ap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#</text:span></text:p>
          </table:table-cell>
          <table:table-cell table:style-name="Table1.A1" office:value-type="string">
            <text:p text:style-name="Table_20_Contents">Tasks/Thread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Fast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Desktop apps, gam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ulia</text:span></text:p>
          </table:table-cell>
          <table:table-cell table:style-name="Table1.A1" office:value-type="string">
            <text:p text:style-name="Table_20_Contents">Distributed processe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Fast</text:p>
          </table:table-cell>
          <table:table-cell table:style-name="Table1.A1" office:value-type="string">
            <text:p text:style-name="Table_20_Contents">Easy</text:p>
          </table:table-cell>
          <table:table-cell table:style-name="Table1.A1" office:value-type="string">
            <text:p text:style-name="Table_20_Contents">Scientific compu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de.js</text:span></text:p>
          </table:table-cell>
          <table:table-cell table:style-name="Table1.A1" office:value-type="string">
            <text:p text:style-name="Table_20_Contents">Worker Thread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Fast</text:p>
          </table:table-cell>
          <table:table-cell table:style-name="Table1.A1" office:value-type="string">
            <text:p text:style-name="Table_20_Contents">Easy</text:p>
          </table:table-cell>
          <table:table-cell table:style-name="Table1.A1" office:value-type="string">
            <text:p text:style-name="Table_20_Contents">Web servers, IoT</text:p>
          </table:table-cell>
        </table:table-row>
      </table:table>
      <text:h text:style-name="Heading_20_2" text:outline-level="2"><text:span text:style-name="Strong_20_Emphasis">Recommended for Raspberry Pi:</text:span></text:h>
      <text:h text:style-name="Heading_20_3" text:outline-level="3"><text:span text:style-name="Strong_20_Emphasis">For beginners / easiest parallel programming:</text:span></text:h>
      <text:p text:style-name="Text_20_body"><text:span text:style-name="Strong_20_Emphasis">Go (Golang)</text:span> - Simple syntax, built-in concurrency, fast compilation, excellent for Raspberry Pi projects</text:p>
      <text:h text:style-name="Heading_20_3" text:outline-level="3"><text:span text:style-name="Strong_20_Emphasis">For performance-critical applications:</text:span></text:h>
      <text:p text:style-name="Text_20_body"><text:span text:style-name="Strong_20_Emphasis">C++</text:span> or <text:span text:style-name="Strong_20_Emphasis">Rust</text:span> - True parallelism, minimal overhead</text:p>
      <text:h text:style-name="Heading_20_3" text:outline-level="3"><text:span text:style-name="Strong_20_Emphasis">For web/network applications:</text:span></text:h>
      <text:p text:style-name="Text_20_body"><text:span text:style-name="Strong_20_Emphasis">Node.js</text:span> or <text:span text:style-name="Strong_20_Emphasis">Go</text:span> - Both handle concurrent connections well</text:p>
      <text:h text:style-name="Heading_20_3" text:outline-level="3"><text:span text:style-name="Strong_20_Emphasis">Installation on Raspberry Pi OS:</text:span></text:h>
      <text:p text:style-name="Text_20_body">bash</text:p>
      <text:p text:style-name="Preformatted_20_Text"># Install Go</text:p>
      <text:p text:style-name="Preformatted_20_Text">sudo apt update</text:p>
      <text:p text:style-name="Preformatted_20_Text">sudo apt install golang</text:p>
      <text:p text:style-name="Preformatted_20_Text"/>
      <text:p text:style-name="Preformatted_20_Text"># Install Rust</text:p>
      <text:p text:style-name="Preformatted_20_Text">curl --proto '=https' --tlsv1.2 -sSf https://sh.rustup.rs | sh</text:p>
      <text:p text:style-name="Preformatted_20_Text"/>
      <text:p text:style-name="Preformatted_20_Text"># Install Java</text:p>
      <text:p text:style-name="Preformatted_20_Text">sudo apt install default-jdk</text:p>
      <text:p text:style-name="Preformatted_20_Text"/>
      <text:p text:style-name="Preformatted_20_Text"># Install Node.js</text:p>
      <text:p text:style-name="Preformatted_20_Text">curl -fsSL https://deb.nodesource.com/setup_18.x | sudo bash -</text:p>
      <text:p text:style-name="P4">sudo apt install nodejs</text:p>
      <text:p text:style-name="Text_20_body"><text:span text:style-name="Strong_20_Emphasis">Go</text:span> is probably your best bet - it's designed for concurrency, compiles to a single binary, and runs efficiently on Raspberry Pi's limited resources while making parallel programming straightforwa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06T16:41:01.72</meta:creation-date>
    <meta:document-statistic meta:table-count="1" meta:image-count="0" meta:object-count="0" meta:page-count="9" meta:paragraph-count="406" meta:word-count="1366" meta:character-count="10584"/>
    <dc:date>2025-12-06T16:41:42.94</dc:date>
    <dc:creator>Peter Thompson</dc:creator>
    <meta:editing-duration>PT42S</meta:editing-duration>
    <meta:editing-cycles>1</meta:editing-cycles>
    <meta:generator>OpenOffice/4.1.15$Win32 OpenOffice.org_project/4115m2$Build-9813</meta:generator>
  </office:meta>
</office:document-meta>
</file>