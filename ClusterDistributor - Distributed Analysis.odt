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Here's the corrected version:</text:p>
      <text:p text:style-name="Text_20_body">cpp</text:p>
      <text:p text:style-name="Preformatted_20_Text">std::vector&lt;ThreatReport&gt; distributeAnalysis(const std::vector&lt;uint8_t&gt;&amp; data) {</text:p>
      <text:p text:style-name="Preformatted_20_Text"><text:s text:c="4"/>std::vector&lt;ThreatReport&gt; results;</text:p>
      <text:p text:style-name="Preformatted_20_Text"><text:s text:c="4"/></text:p>
      <text:p text:style-name="Preformatted_20_Text"><text:s text:c="4"/>if (cluster_nodes.empty()) {</text:p>
      <text:p text:style-name="Preformatted_20_Text"><text:s text:c="8"/>// Local fallback - needs actual distribution logic</text:p>
      <text:p text:style-name="Preformatted_20_Text"><text:s text:c="8"/>ThreatReport local_report;</text:p>
      <text:p text:style-name="Preformatted_20_Text"><text:s text:c="8"/>local_report.engine = "Cluster_Local_Fallback";</text:p>
      <text:p text:style-name="Preformatted_20_Text"><text:s text:c="8"/>local_report.confidence = 0.1;</text:p>
      <text:p text:style-name="Preformatted_20_Text"><text:s text:c="8"/>results.push_back(local_report);</text:p>
      <text:p text:style-name="Preformatted_20_Text"><text:s text:c="8"/>return results;</text:p>
      <text:p text:style-name="Preformatted_20_Text"><text:s text:c="4"/>}</text:p>
      <text:p text:style-name="Preformatted_20_Text"><text:s text:c="4"/></text:p>
      <text:p text:style-name="Preformatted_20_Text"><text:s text:c="4"/>// Create futures for asynchronous analysis on each cluster node</text:p>
      <text:p text:style-name="Preformatted_20_Text"><text:s text:c="4"/>std::vector&lt;std::future&lt;ThreatReport&gt;&gt; futures;</text:p>
      <text:p text:style-name="Preformatted_20_Text"><text:s text:c="4"/>for (size_t i = 0; i &lt; cluster_nodes.size(); ++i) {</text:p>
      <text:p text:style-name="Preformatted_20_Text"><text:s text:c="8"/>futures.push_back(std::async(std::launch::async, </text:p>
      <text:p text:style-name="Preformatted_20_Text"><text:s text:c="12"/>[this, &amp;data, i]() {</text:p>
      <text:p text:style-name="Preformatted_20_Text"><text:s text:c="16"/>return analyzeOnNode(data, cluster_nodes[i], i);</text:p>
      <text:p text:style-name="Preformatted_20_Text"><text:s text:c="12"/>}));</text:p>
      <text:p text:style-name="Preformatted_20_Text"><text:s text:c="4"/>}</text:p>
      <text:p text:style-name="Preformatted_20_Text"><text:s text:c="4"/></text:p>
      <text:p text:style-name="Preformatted_20_Text"><text:s text:c="4"/>// Wait for all futures to complete and collect results</text:p>
      <text:p text:style-name="Preformatted_20_Text"><text:s text:c="4"/>for (auto&amp; future : futures) {</text:p>
      <text:p text:style-name="Preformatted_20_Text"><text:s text:c="8"/>try {</text:p>
      <text:p text:style-name="Preformatted_20_Text"><text:s text:c="12"/>results.push_back(future.get()); <text:s/>// get() waits for completion</text:p>
      <text:p text:style-name="Preformatted_20_Text"><text:s text:c="8"/>} catch (const std::exception&amp; e) {</text:p>
      <text:p text:style-name="Preformatted_20_Text"><text:s text:c="12"/>// Handle node failure - create an error report</text:p>
      <text:p text:style-name="Preformatted_20_Text"><text:s text:c="12"/>ThreatReport error_report;</text:p>
      <text:p text:style-name="Preformatted_20_Text"><text:s text:c="12"/>error_report.engine = "Node_Error";</text:p>
      <text:p text:style-name="Preformatted_20_Text"><text:s text:c="12"/>error_report.confidence = 0.0;</text:p>
      <text:p text:style-name="Preformatted_20_Text"><text:s text:c="12"/>error_report.error_message = e.what();</text:p>
      <text:p text:style-name="Preformatted_20_Text"><text:s text:c="12"/>results.push_back(error_report);</text:p>
      <text:p text:style-name="Preformatted_20_Text"><text:s text:c="8"/>}</text:p>
      <text:p text:style-name="Preformatted_20_Text"><text:s text:c="4"/>}</text:p>
      <text:p text:style-name="Preformatted_20_Text"><text:s text:c="4"/></text:p>
      <text:p text:style-name="Preformatted_20_Text"><text:s text:c="4"/>return results;</text:p>
      <text:p text:style-name="P3">}</text:p>
      <text:p text:style-name="Text_20_body"><text:span text:style-name="Strong_20_Emphasis">Key fixes made:</text:span></text:p>
      <text:list xml:id="list2033622657262332897" text:style-name="L1">
        <text:list-item>
          <text:p text:style-name="P1"><text:span text:style-name="Strong_20_Emphasis">Added result collection</text:span>: The function now waits for each future to complete using <text:span text:style-name="Source_20_Text">future.get()</text:span> and collects the results</text:p>
        </text:list-item>
        <text:list-item>
          <text:p text:style-name="P1"><text:span text:style-name="Strong_20_Emphasis">Added exception handling</text:span>: Added try-catch block to handle potential node failures or communication errors</text:p>
        </text:list-item>
        <text:list-item>
          <text:p text:style-name="P1"><text:span text:style-name="Strong_20_Emphasis">Fixed lambda capture</text:span>: Changed <text:span text:style-name="Source_20_Text">data</text:span> capture to <text:span text:style-name="Source_20_Text">&amp;data</text:span> (by reference) to avoid copying (assuming <text:span text:style-name="Source_20_Text">data</text:span> is safe to share across threads)</text:p>
        </text:list-item>
        <text:list-item>
          <text:p text:style-name="P1"><text:span text:style-name="Strong_20_Emphasis">Error reporting</text:span>: When a node fails, an error report is created and included in the results</text:p>
        </text:list-item>
      </text:list>
      <text:p text:style-name="Text_20_body"><text:span text:style-name="Strong_20_Emphasis">Important considerations for production use:</text:span></text:p>
      <text:list xml:id="list8715980146742215162" text:style-name="L2">
        <text:list-item>
          <text:p text:style-name="P2"><text:span text:style-name="Strong_20_Emphasis">Thread safety</text:span>: Ensure <text:span text:style-name="Source_20_Text">analyzeOnNode</text:span> and any shared data are thread-safe</text:p>
        </text:list-item>
        <text:list-item>
          <text:p text:style-name="P2"><text:span text:style-name="Strong_20_Emphasis">Memory management</text:span>: Consider if <text:span text:style-name="Source_20_Text">data</text:span> should be copied instead of referenced (depends on your use case)</text:p>
        </text:list-item>
        <text:list-item>
          <text:p text:style-name="P2"><text:span text:style-name="Strong_20_Emphasis">Timeout mechanism</text:span>: Add timeout logic to prevent waiting indefinitely for unresponsive nodes</text:p>
        </text:list-item>
        <text:list-item>
          <text:p text:style-name="P2"><text:soft-page-break/><text:span text:style-name="Strong_20_Emphasis">Resource limits</text:span>: Limit concurrent connections if <text:span text:style-name="Source_20_Text">cluster_nodes</text:span> is very large</text:p>
        </text:list-item>
        <text:list-item>
          <text:p text:style-name="P2"><text:span text:style-name="Strong_20_Emphasis">Load balancing</text:span>: Consider distributing work based on node capacity, not just round-robin</text:p>
        </text:list-item>
      </text:list>
      <text:p text:style-name="Text_20_body">For actual cluster communication, you'll need to implement <text:span text:style-name="Source_20_Text">analyzeOnNode</text:span> with proper networking (gRPC/ZeroMQ as mentioned in the comment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12-10T13:55:33.19</meta:creation-date>
    <meta:document-statistic meta:table-count="0" meta:image-count="0" meta:object-count="0" meta:page-count="2" meta:paragraph-count="51" meta:word-count="288" meta:character-count="2424"/>
    <dc:date>2025-12-10T13:56:56.48</dc:date>
    <dc:creator>Peter Thompson</dc:creator>
    <meta:editing-duration>PT1M24S</meta:editing-duration>
    <meta:editing-cycles>1</meta:editing-cycles>
    <meta:generator>OpenOffice/4.1.15$Win32 OpenOffice.org_project/4115m2$Build-9813</meta:generator>
  </office:meta>
</office:document-meta>
</file>