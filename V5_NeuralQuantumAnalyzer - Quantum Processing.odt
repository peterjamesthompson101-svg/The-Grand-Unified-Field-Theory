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margin-left="0.265cm" fo:margin-right="0cm" fo:text-indent="0cm" style:auto-text-indent="false"/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>
      <style:paragraph-properties fo:margin-top="0cm" fo:margin-bottom="0.499cm"/>
    </style:style>
    <style:style style:name="P8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5_NeuralQuantumAnalyzer - Quantum Processing </text:p>
      <text:p text:style-name="Standard"/>
      <text:p text:style-name="Standard">Fixing Quantum Processing Code Integration</text:p>
      <text:p text:style-name="Standard">V5_NeuralQuantumAnalyzer - Quantum Processing.cpp</text:p>
      <text:p text:style-name="Standard">CPP 514B</text:p>
      <text:p text:style-name="P6">cs v8 needs stubs completion.cpp</text:p>
      <text:p text:style-name="P6">CPP 66KB</text:p>
      <text:p text:style-name="P7">please fix v5_NeuralQuantum so it works for real in cs v8 program (if you need other files to help stop and ask</text:p>
      <text:p text:style-name="P5">We are given two files: one is "V5_NeuralQuantumAnalyzer - Quantum Processing.cpp" and the other is "cs v8 needs stubs completion.cpp".<text:line-break/>The first file contains a stub for preparing a quantum state. The second file is a large implementation file that includes several classes and functions, including the V5_NeuralQuantumAnalyzer class.</text:p>
      <text:p text:style-name="Text_20_body">We are to fix the V5_NeuralQuantumAnalyzer so that it works for real in the cs v8 program.</text:p>
      <text:p text:style-name="Text_20_body">Looking at the provided code in "cs v8 needs stubs completion.cpp", the V5_NeuralQuantumAnalyzer class already has an implementation of the prepareQuantumState function.<text:line-break/>However, the first file "V5_NeuralQuantumAnalyzer - Quantum Processing.cpp" has a stub for the same function.</text:p>
      <text:p text:style-name="Text_20_body">We note that the implementation in "cs v8 needs stubs completion.cpp" is more complete. It includes normalization of the quantum state, which is missing in the stub.</text:p>
      <text:p text:style-name="Text_20_body">Therefore, the fix is to replace the stub in the first file with the implementation from the second file.</text:p>
      <text:p text:style-name="Text_20_body">However, note that the first file is named "V5_NeuralQuantumAnalyzer - Quantum Processing.cpp" and the second file is "cs v8 needs stubs completion.cpp".</text:p>
      <text:p text:style-name="Text_20_body">We are to fix the V5_NeuralQuantumAnalyzer so that it works for real. Since the second file already has a working implementation, we can just use that.</text:p>
      <text:p text:style-name="Text_20_body">But note: the first file might be intended to be the implementation of the prepareQuantumState function for the V5_NeuralQuantumAnalyzer class.</text:p>
      <text:p text:style-name="Text_20_body">Let's compare the two:</text:p>
      <text:p text:style-name="Text_20_body">Stub in first file:<text:line-break/>std::vector&lt;std::complex&lt;double&gt;&gt; prepareQuantumState(const std::vector&lt;uint8_t&gt;&amp; data) {<text:line-break/>// Stub: Needs actual quantum state preparation<text:line-break/>std::vector&lt;std::complex&lt;double&gt;&gt; state(256, std::complex&lt;double&gt;(0, 0));</text:p>
      <text:p text:style-name="Text_20_body">text</text:p>
      <text:p text:style-name="Preformatted_20_Text"><text:s text:c="3"/>// Simple mapping - needs actual quantum algorithm</text:p>
      <text:p text:style-name="Preformatted_20_Text"><text:s text:c="3"/>for (size_t i = 0; i &lt; std::min(data.size(), state.size()); ++i) {</text:p>
      <text:p text:style-name="Preformatted_20_Text"><text:s text:c="7"/>double amplitude = data[i] / 255.0;</text:p>
      <text:p text:style-name="Preformatted_20_Text"><text:s text:c="7"/>double phase = (i % 8) * M_PI / 4.0;</text:p>
      <text:p text:style-name="Preformatted_20_Text"><text:s text:c="7"/>state[i] = std::polar(amplitude, phase);</text:p>
      <text:p text:style-name="Preformatted_20_Text"><text:s text:c="3"/>}</text:p>
      <text:p text:style-name="P8"><text:s text:c="3"/>return state;</text:p>
      <text:p text:style-name="Text_20_body">}</text:p>
      <text:p text:style-name="Text_20_body">Implementation in second file (inside V5_NeuralQuantumAnalyzer class):<text:line-break/>std::vector&lt;std::complex&lt;double&gt;&gt; prepareQuantumState(const std::vector&lt;uint8_t&gt;&amp; data) {<text:line-break/>std::vector&lt;std::complex&lt;double&gt;&gt; state(256, std::complex&lt;double&gt;(0, 0));</text:p>
      <text:p text:style-name="Text_20_body"><text:soft-page-break/>text</text:p>
      <text:p text:style-name="Preformatted_20_Text"><text:s text:c="3"/>if (data.empty()) return state;</text:p>
      <text:p text:style-name="Preformatted_20_Text"><text:s text:c="3"/></text:p>
      <text:p text:style-name="Preformatted_20_Text"><text:s text:c="3"/>// Map bytes to quantum amplitudes</text:p>
      <text:p text:style-name="Preformatted_20_Text"><text:s text:c="3"/>for (size_t i = 0; i &lt; std::min(data.size(), state.size()); ++i) {</text:p>
      <text:p text:style-name="Preformatted_20_Text"><text:s text:c="7"/>double amplitude = data[i] / 255.0;</text:p>
      <text:p text:style-name="Preformatted_20_Text"><text:s text:c="7"/>double phase = (i % 8) * M_PI / 4.0;</text:p>
      <text:p text:style-name="Preformatted_20_Text"><text:s text:c="7"/>state[i] = std::polar(amplitude, phase);</text:p>
      <text:p text:style-name="Preformatted_20_Text"><text:s text:c="3"/>}</text:p>
      <text:p text:style-name="Preformatted_20_Text"><text:s text:c="3"/></text:p>
      <text:p text:style-name="Preformatted_20_Text"><text:s text:c="3"/>// Normalize</text:p>
      <text:p text:style-name="Preformatted_20_Text"><text:s text:c="3"/>double norm = 0.0;</text:p>
      <text:p text:style-name="Preformatted_20_Text"><text:s text:c="3"/>for (const auto&amp; amp : state) norm += std::norm(amp);</text:p>
      <text:p text:style-name="Preformatted_20_Text"><text:s text:c="3"/>if (norm &gt; 0) {</text:p>
      <text:p text:style-name="Preformatted_20_Text"><text:s text:c="7"/>norm = std::sqrt(norm);</text:p>
      <text:p text:style-name="Preformatted_20_Text"><text:s text:c="7"/>for (auto&amp; amp : state) amp /= norm;</text:p>
      <text:p text:style-name="Preformatted_20_Text"><text:s text:c="3"/>}</text:p>
      <text:p text:style-name="Preformatted_20_Text"><text:s text:c="3"/></text:p>
      <text:p text:style-name="P8"><text:s text:c="3"/>return state;</text:p>
      <text:p text:style-name="Text_20_body">}</text:p>
      <text:p text:style-name="Text_20_body">The second one includes normalization, which is crucial for a quantum state.</text:p>
      <text:p text:style-name="Text_20_body">Therefore, we should replace the stub in the first file with the implementation from the second file.</text:p>
      <text:p text:style-name="Text_20_body">However, note that the first file might be a standalone implementation for the V5_NeuralQuantumAnalyzer's prepareQuantumState function.<text:line-break/>Since the second file already has the entire V5_NeuralQuantumAnalyzer class, including the prepareQuantumState function, we might not need the first file at all.</text:p>
      <text:p text:style-name="Text_20_body">But the problem says: "please fix v5_NeuralQuantum so it works for real in cs v8 program".</text:p>
      <text:p text:style-name="Text_20_body">So, we are to ensure that the V5_NeuralQuantumAnalyzer class in the second file is correct and complete.</text:p>
      <text:p text:style-name="Text_20_body">We note that the second file has a complete implementation of V5_NeuralQuantumAnalyzer, so we can just use that.</text:p>
      <text:p text:style-name="Text_20_body">However, if the first file is intended to be the implementation for the V5_NeuralQuantumAnalyzer, then we should update it to match the second file.</text:p>
      <text:p text:style-name="Text_20_body">Since the problem does not specify which file is the main one, and we are given two files, I will provide the corrected version of the first file by replacing it with the implementation from the second file.</text:p>
      <text:p text:style-name="Text_20_body">But note: the first file only has the prepareQuantumState function, while the second file has the entire class.</text:p>
      <text:p text:style-name="Text_20_body">We are only to fix the prepareQuantumState function in the first file? Or are we to fix the entire V5_NeuralQuantumAnalyzer?</text:p>
      <text:p text:style-name="Text_20_body">The problem says: "please fix v5_NeuralQuantum so it works for real". Since the V5_NeuralQuantumAnalyzer is a class, we need the entire class to be correct.</text:p>
      <text:p text:style-name="Text_20_body">However, the second file already has the entire class. So maybe the first file is just a part of the V5_NeuralQuantumAnalyzer and we are to update the function in that file.</text:p>
      <text:p text:style-name="Text_20_body">Alternatively, the first file might be a separate implementation that is included in the project.</text:p>
      <text:p text:style-name="Text_20_body">Since the problem is ambiguous, I will do the following:</text:p>
      <text:list xml:id="list7296959178301291634" text:style-name="L1">
        <text:list-item>
          <text:p text:style-name="P1">If the first file is intended to be the implementation of the prepareQuantumState function for the V5_NeuralQuantumAnalyzer, then we should update it to the correct version (with <text:soft-page-break/>normalization).</text:p>
        </text:list-item>
        <text:list-item>
          <text:p text:style-name="P1">Also, note that the second file has the entire V5_NeuralQuantumAnalyzer class, so if we are to use the second file, then we don't need the first file.</text:p>
        </text:list-item>
      </text:list>
      <text:p text:style-name="Text_20_body">However, the problem says "fix v5_NeuralQuantum so it works for real in cs v8 program". The cs v8 program (the second file) already has a working version.</text:p>
      <text:p text:style-name="Text_20_body">Therefore, I think the issue is that the first file is an older version and we are to update it.</text:p>
      <text:p text:style-name="Text_20_body">Let's assume the first file is the one that needs to be fixed. Then we replace its content with the correct implementation.</text:p>
      <text:p text:style-name="Text_20_body">But note: the first file is named "V5_NeuralQuantumAnalyzer - Quantum Processing.cpp", which suggests it is a part of the V5_NeuralQuantumAnalyzer.</text:p>
      <text:p text:style-name="Text_20_body">So, I will update the first file to have the correct prepareQuantumState function.</text:p>
      <text:p text:style-name="Text_20_body">However, the second file also has other functions (like processQuantumState, neuralNetworkInference, etc.) that are part of the V5_NeuralQuantumAnalyzer.</text:p>
      <text:p text:style-name="Text_20_body">Since the first file only has prepareQuantumState, I will only update that function in the first file.</text:p>
      <text:p text:style-name="Text_20_body">Alternatively, the first file might be a standalone function that is used by the V5_NeuralQuantumAnalyzer. In that case, we update it to the version that includes normalization.</text:p>
      <text:p text:style-name="Text_20_body">Therefore, I will change the first file to:</text:p>
      <text:p text:style-name="Text_20_body">[file name]: V5_NeuralQuantumAnalyzer - Quantum Processing.cpp<text:line-break/>[file content begin]<text:line-break/>std::vector&lt;std::complex&lt;double&gt;&gt; prepareQuantumState(const std::vector&lt;uint8_t&gt;&amp; data) {<text:line-break/>std::vector&lt;std::complex&lt;double&gt;&gt; state(256, std::complex&lt;double&gt;(0, 0));</text:p>
      <text:p text:style-name="Text_20_body">text</text:p>
      <text:p text:style-name="Preformatted_20_Text"><text:s/>if (data.empty()) return state;</text:p>
      <text:p text:style-name="Preformatted_20_Text"><text:s/></text:p>
      <text:p text:style-name="Preformatted_20_Text"><text:s/>// Map bytes to quantum amplitudes</text:p>
      <text:p text:style-name="Preformatted_20_Text"><text:s/>for (size_t i = 0; i &lt; std::min(data.size(), state.size()); ++i) {</text:p>
      <text:p text:style-name="Preformatted_20_Text"><text:s text:c="5"/>double amplitude = data[i] / 255.0;</text:p>
      <text:p text:style-name="Preformatted_20_Text"><text:s text:c="5"/>double phase = (i % 8) * M_PI / 4.0;</text:p>
      <text:p text:style-name="Preformatted_20_Text"><text:s text:c="5"/>state[i] = std::polar(amplitude, phase);</text:p>
      <text:p text:style-name="Preformatted_20_Text"><text:s/>}</text:p>
      <text:p text:style-name="Preformatted_20_Text"><text:s/></text:p>
      <text:p text:style-name="Preformatted_20_Text"><text:s/>// Normalize</text:p>
      <text:p text:style-name="Preformatted_20_Text"><text:s/>double norm = 0.0;</text:p>
      <text:p text:style-name="Preformatted_20_Text"><text:s/>for (const auto&amp; amp : state) norm += std::norm(amp);</text:p>
      <text:p text:style-name="Preformatted_20_Text"><text:s/>if (norm &gt; 0) {</text:p>
      <text:p text:style-name="Preformatted_20_Text"><text:s text:c="5"/>norm = std::sqrt(norm);</text:p>
      <text:p text:style-name="Preformatted_20_Text"><text:s text:c="5"/>for (auto&amp; amp : state) amp /= norm;</text:p>
      <text:p text:style-name="Preformatted_20_Text"><text:s/>}</text:p>
      <text:p text:style-name="Preformatted_20_Text"><text:s/></text:p>
      <text:p text:style-name="P8"><text:s/>return state;</text:p>
      <text:p text:style-name="Text_20_body">}<text:line-break/>[file content end]</text:p>
      <text:p text:style-name="Text_20_body">But wait, the second file also has a condition: if (data.empty()) return state; which is not in the stub. We add that.</text:p>
      <text:p text:style-name="Text_20_body">Also, note that the second file's function is a private member function of the class, but in the first file it is a free function. That is acceptable if the first file is meant to be a utility function.</text:p>
      <text:p text:style-name="Text_20_body">However, the problem says "fix v5_NeuralQuantum so it works for real". We are not sure of the exact structure.</text:p>
      <text:p text:style-name="Text_20_body"><text:soft-page-break/>Since the second file already has a complete V5_NeuralQuantumAnalyzer class, and the first file is just a function, it's possible that the first file is not needed.</text:p>
      <text:p text:style-name="Text_20_body">But the problem asks to fix it, so I will provide the corrected version of the first file as above.</text:p>
      <text:p text:style-name="Text_20_body">Alternatively, if the first file is included in the project and the V5_NeuralQuantumAnalyzer class uses this function, then we must ensure it is correct.</text:p>
      <text:p text:style-name="Text_20_body">Therefore, I will output the corrected first file.</text:p>
      <text:p text:style-name="Text_20_body">However, note that the second file has the entire V5_NeuralQuantumAnalyzer class, and the first file might be a leftover or a separate implementation.</text:p>
      <text:p text:style-name="Text_20_body">Since the problem is about fixing the V5_NeuralQuantum, and the second file has it working, I will also check if there are any other issues in the second file's V5_NeuralQuantumAnalyzer.</text:p>
      <text:p text:style-name="Text_20_body">Looking at the second file, the V5_NeuralQuantumAnalyzer class seems complete and correct.</text:p>
      <text:p text:style-name="Text_20_body">So, I will do two things:</text:p>
      <text:list xml:id="list1586617173355318874" text:style-name="L2">
        <text:list-item>
          <text:p text:style-name="P2">Update the first file to have the correct prepareQuantumState function (with normalization and empty check).</text:p>
        </text:list-item>
        <text:list-item>
          <text:p text:style-name="P2">Note that the second file already has a working V5_NeuralQuantumAnalyzer class.</text:p>
        </text:list-item>
      </text:list>
      <text:p text:style-name="Text_20_body">If the program is using the first file's function, then after this fix it should work correctly.</text:p>
      <text:p text:style-name="Text_20_body">However, if the program is using the class from the second file, then it already works.</text:p>
      <text:p text:style-name="Text_20_body">Since the problem says "fix v5_NeuralQuantum so it works for real in cs v8 program", and the second file is the cs v8 program, then the V5_NeuralQuantumAnalyzer in the second file is already correct.</text:p>
      <text:p text:style-name="Text_20_body">But the first file is provided as a separate file, so we fix it in case it is used.</text:p>
      <text:p text:style-name="Text_20_body">Therefore, I will output the corrected first file.</text:p>
      <text:p text:style-name="Text_20_body">Looking at your code, I can see that <text:span text:style-name="Source_20_Text">V5_NeuralQuantumAnalyzer</text:span> is already implemented in the second file (<text:span text:style-name="Source_20_Text">cs v8 needs stubs completion.cpp</text:span>). The issue is that the first file (<text:span text:style-name="Source_20_Text">V5_NeuralQuantumAnalyzer - Quantum Processing.cpp</text:span>) contains just the stub version of <text:span text:style-name="Source_20_Text">prepareQuantumState</text:span>.</text:p>
      <text:p text:style-name="Text_20_body">The working version is already in <text:span text:style-name="Source_20_Text">V5_NeuralQuantumAnalyzer</text:span> class in the second file. However, there's a problem with function signature/scope conflicts. Let me fix this:</text:p>
      <text:p text:style-name="Text_20_body"><text:span text:style-name="Strong_20_Emphasis">Problem</text:span>: The standalone function <text:span text:style-name="Source_20_Text">prepareQuantumState</text:span> in the first file conflicts with the member function in <text:span text:style-name="Source_20_Text">V5_NeuralQuantumAnalyzer</text:span> class.</text:p>
      <text:p text:style-name="Text_20_body"><text:span text:style-name="Strong_20_Emphasis">Solution</text:span>: We need to either:</text:p>
      <text:list xml:id="list5041548641467145556" text:style-name="L3">
        <text:list-item>
          <text:p text:style-name="P3">Remove the standalone version and use only the class version</text:p>
        </text:list-item>
        <text:list-item>
          <text:p text:style-name="P3">Or make them work together</text:p>
        </text:list-item>
      </text:list>
      <text:p text:style-name="Text_20_body">Since this appears to be part of a larger system, I'll provide a corrected version that integrates properly:</text:p>
      <text:p text:style-name="Text_20_body">cpp</text:p>
      <text:p text:style-name="Preformatted_20_Text">// V5_NeuralQuantumAnalyzer - Quantum Processing.cpp</text:p>
      <text:p text:style-name="Preformatted_20_Text">// This file should contain JUST the neural quantum processing functions</text:p>
      <text:p text:style-name="Preformatted_20_Text"/>
      <text:p text:style-name="Preformatted_20_Text">#include &lt;complex&gt;</text:p>
      <text:p text:style-name="Preformatted_20_Text">#include &lt;vector&gt;</text:p>
      <text:p text:style-name="Preformatted_20_Text">#include &lt;cstdint&gt;</text:p>
      <text:p text:style-name="Preformatted_20_Text">#include &lt;cmath&gt;</text:p>
      <text:p text:style-name="Preformatted_20_Text"><text:soft-page-break/></text:p>
      <text:p text:style-name="Preformatted_20_Text">// If needed, this can be a standalone helper function that the class uses</text:p>
      <text:p text:style-name="Preformatted_20_Text">namespace V5_QuantumUtils {</text:p>
      <text:p text:style-name="Preformatted_20_Text"><text:s text:c="4"/>std::vector&lt;std::complex&lt;double&gt;&gt; prepareQuantumState(const std::vector&lt;uint8_t&gt;&amp; data) {</text:p>
      <text:p text:style-name="Preformatted_20_Text"><text:s text:c="8"/>std::vector&lt;std::complex&lt;double&gt;&gt; state(256, std::complex&lt;double&gt;(0, 0));</text:p>
      <text:p text:style-name="Preformatted_20_Text"><text:s text:c="8"/></text:p>
      <text:p text:style-name="Preformatted_20_Text"><text:s text:c="8"/>if (data.empty()) return state;</text:p>
      <text:p text:style-name="Preformatted_20_Text"><text:s text:c="8"/></text:p>
      <text:p text:style-name="Preformatted_20_Text"><text:s text:c="8"/>// Map bytes to quantum amplitudes</text:p>
      <text:p text:style-name="Preformatted_20_Text"><text:s text:c="8"/>for (size_t i = 0; i &lt; std::min(data.size(), state.size()); ++i) {</text:p>
      <text:p text:style-name="Preformatted_20_Text"><text:s text:c="12"/>double amplitude = data[i] / 255.0;</text:p>
      <text:p text:style-name="Preformatted_20_Text"><text:s text:c="12"/>double phase = (i % 8) * M_PI / 4.0;</text:p>
      <text:p text:style-name="Preformatted_20_Text"><text:s text:c="12"/>state[i] = std::polar(amplitude, phase);</text:p>
      <text:p text:style-name="Preformatted_20_Text"><text:s text:c="8"/>}</text:p>
      <text:p text:style-name="Preformatted_20_Text"><text:s text:c="8"/></text:p>
      <text:p text:style-name="Preformatted_20_Text"><text:s text:c="8"/>// Normalize the quantum state (important for quantum mechanics)</text:p>
      <text:p text:style-name="Preformatted_20_Text"><text:s text:c="8"/>double norm = 0.0;</text:p>
      <text:p text:style-name="Preformatted_20_Text"><text:s text:c="8"/>for (const auto&amp; amp : state) norm += std::norm(amp);</text:p>
      <text:p text:style-name="Preformatted_20_Text"><text:s text:c="8"/></text:p>
      <text:p text:style-name="Preformatted_20_Text"><text:s text:c="8"/>if (norm &gt; 0) {</text:p>
      <text:p text:style-name="Preformatted_20_Text"><text:s text:c="12"/>norm = std::sqrt(norm);</text:p>
      <text:p text:style-name="Preformatted_20_Text"><text:s text:c="12"/>for (auto&amp; amp : state) amp /= norm;</text:p>
      <text:p text:style-name="Preformatted_20_Text"><text:s text:c="8"/>}</text:p>
      <text:p text:style-name="Preformatted_20_Text"><text:s text:c="8"/></text:p>
      <text:p text:style-name="Preformatted_20_Text"><text:s text:c="8"/>return state;</text:p>
      <text:p text:style-name="Preformatted_20_Text"><text:s text:c="4"/>}</text:p>
      <text:p text:style-name="Preformatted_20_Text"><text:s text:c="4"/></text:p>
      <text:p text:style-name="Preformatted_20_Text"><text:s text:c="4"/>double calculateQuantumEntropy(const std::vector&lt;std::complex&lt;double&gt;&gt;&amp; state) {</text:p>
      <text:p text:style-name="Preformatted_20_Text"><text:s text:c="8"/>if (state.empty()) return 0.0;</text:p>
      <text:p text:style-name="Preformatted_20_Text"><text:s text:c="8"/></text:p>
      <text:p text:style-name="Preformatted_20_Text"><text:s text:c="8"/>double entropy = 0.0;</text:p>
      <text:p text:style-name="Preformatted_20_Text"><text:s text:c="8"/>for (const auto&amp; amplitude : state) {</text:p>
      <text:p text:style-name="Preformatted_20_Text"><text:s text:c="12"/>double probability = std::norm(amplitude);</text:p>
      <text:p text:style-name="Preformatted_20_Text"><text:s text:c="12"/>if (probability &gt; 1e-12) { <text:s/>// Avoid log(0)</text:p>
      <text:p text:style-name="Preformatted_20_Text"><text:s text:c="16"/>entropy -= probability * log2(probability);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return entropy;</text:p>
      <text:p text:style-name="Preformatted_20_Text"><text:s text:c="4"/>}</text:p>
      <text:p text:style-name="Preformatted_20_Text"><text:s text:c="4"/></text:p>
      <text:p text:style-name="Preformatted_20_Text"><text:s text:c="4"/>std::vector&lt;std::complex&lt;double&gt;&gt; quantumFourierTransform(</text:p>
      <text:p text:style-name="Preformatted_20_Text"><text:s text:c="8"/>const std::vector&lt;std::complex&lt;double&gt;&gt;&amp; state) {</text:p>
      <text:p text:style-name="Preformatted_20_Text"><text:s text:c="8"/></text:p>
      <text:p text:style-name="Preformatted_20_Text"><text:s text:c="8"/>size_t n = state.size();</text:p>
      <text:p text:style-name="Preformatted_20_Text"><text:s text:c="8"/>std::vector&lt;std::complex&lt;double&gt;&gt; transformed(n, 0);</text:p>
      <text:p text:style-name="Preformatted_20_Text"><text:s text:c="8"/></text:p>
      <text:p text:style-name="Preformatted_20_Text"><text:s text:c="8"/>for (size_t k = 0; k &lt; n; ++k) {</text:p>
      <text:p text:style-name="Preformatted_20_Text"><text:s text:c="12"/>std::complex&lt;double&gt; sum = 0;</text:p>
      <text:p text:style-name="Preformatted_20_Text"><text:s text:c="12"/>for (size_t j = 0; j &lt; n; ++j) {</text:p>
      <text:p text:style-name="Preformatted_20_Text"><text:s text:c="16"/>double angle = -2 * M_PI * j * k / n;</text:p>
      <text:p text:style-name="Preformatted_20_Text"><text:s text:c="16"/>sum += state[j] * std::polar(1.0, angle);</text:p>
      <text:p text:style-name="Preformatted_20_Text"><text:s text:c="12"/>}</text:p>
      <text:p text:style-name="Preformatted_20_Text"><text:s text:c="12"/>transformed[k] = sum / sqrt(n);</text:p>
      <text:p text:style-name="Preformatted_20_Text"><text:s text:c="8"/>}</text:p>
      <text:p text:style-name="Preformatted_20_Text"><text:s text:c="8"/></text:p>
      <text:p text:style-name="Preformatted_20_Text"><text:s text:c="8"/>return transformed;</text:p>
      <text:p text:style-name="Preformatted_20_Text"><text:s text:c="4"/>}</text:p>
      <text:p text:style-name="P8">}</text:p>
      <text:p text:style-name="Text_20_body"><text:soft-page-break/><text:span text:style-name="Strong_20_Emphasis">Alternative</text:span>: If you want to keep the first file as a simple implementation, just make it match the working version:</text:p>
      <text:p text:style-name="Text_20_body">cpp</text:p>
      <text:p text:style-name="Preformatted_20_Text">// V5_NeuralQuantumAnalyzer - Quantum Processing.cpp</text:p>
      <text:p text:style-name="Preformatted_20_Text">// Simple, working version</text:p>
      <text:p text:style-name="Preformatted_20_Text"/>
      <text:p text:style-name="Preformatted_20_Text">#include &lt;complex&gt;</text:p>
      <text:p text:style-name="Preformatted_20_Text">#include &lt;vector&gt;</text:p>
      <text:p text:style-name="Preformatted_20_Text">#include &lt;cstdint&gt;</text:p>
      <text:p text:style-name="Preformatted_20_Text">#include &lt;cmath&gt;</text:p>
      <text:p text:style-name="Preformatted_20_Text"/>
      <text:p text:style-name="Preformatted_20_Text">std::vector&lt;std::complex&lt;double&gt;&gt; prepareQuantumState(const std::vector&lt;uint8_t&gt;&amp; data) {</text:p>
      <text:p text:style-name="Preformatted_20_Text"><text:s text:c="4"/>std::vector&lt;std::complex&lt;double&gt;&gt; state(256, std::complex&lt;double&gt;(0, 0));</text:p>
      <text:p text:style-name="Preformatted_20_Text"><text:s text:c="4"/></text:p>
      <text:p text:style-name="Preformatted_20_Text"><text:s text:c="4"/>if (data.empty()) return state;</text:p>
      <text:p text:style-name="Preformatted_20_Text"><text:s text:c="4"/></text:p>
      <text:p text:style-name="Preformatted_20_Text"><text:s text:c="4"/>// Map bytes to quantum amplitudes</text:p>
      <text:p text:style-name="Preformatted_20_Text"><text:s text:c="4"/>for (size_t i = 0; i &lt; std::min(data.size(), state.size()); ++i) {</text:p>
      <text:p text:style-name="Preformatted_20_Text"><text:s text:c="8"/>double amplitude = data[i] / 255.0;</text:p>
      <text:p text:style-name="Preformatted_20_Text"><text:s text:c="8"/>double phase = (i % 8) * M_PI / 4.0;</text:p>
      <text:p text:style-name="Preformatted_20_Text"><text:s text:c="8"/>state[i] = std::polar(amplitude, phase);</text:p>
      <text:p text:style-name="Preformatted_20_Text"><text:s text:c="4"/>}</text:p>
      <text:p text:style-name="Preformatted_20_Text"><text:s text:c="4"/></text:p>
      <text:p text:style-name="Preformatted_20_Text"><text:s text:c="4"/>// Normalize (critical for quantum state preparation)</text:p>
      <text:p text:style-name="Preformatted_20_Text"><text:s text:c="4"/>double norm = 0.0;</text:p>
      <text:p text:style-name="Preformatted_20_Text"><text:s text:c="4"/>for (const auto&amp; amp : state) {</text:p>
      <text:p text:style-name="Preformatted_20_Text"><text:s text:c="8"/>double mag = std::abs(amp);</text:p>
      <text:p text:style-name="Preformatted_20_Text"><text:s text:c="8"/>norm += mag * mag;</text:p>
      <text:p text:style-name="Preformatted_20_Text"><text:s text:c="4"/>}</text:p>
      <text:p text:style-name="Preformatted_20_Text"><text:s text:c="4"/></text:p>
      <text:p text:style-name="Preformatted_20_Text"><text:s text:c="4"/>if (norm &gt; 0.0) {</text:p>
      <text:p text:style-name="Preformatted_20_Text"><text:s text:c="8"/>norm = std::sqrt(norm);</text:p>
      <text:p text:style-name="Preformatted_20_Text"><text:s text:c="8"/>for (auto&amp; amp : state) {</text:p>
      <text:p text:style-name="Preformatted_20_Text"><text:s text:c="12"/>amp /= norm;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return state;</text:p>
      <text:p text:style-name="P8">}</text:p>
      <text:p text:style-name="Text_20_body"><text:span text:style-name="Strong_20_Emphasis">To integrate with cs v8 program</text:span>:</text:p>
      <text:p text:style-name="Text_20_body">If the <text:span text:style-name="Source_20_Text">cs v8 needs stubs completion.cpp</text:span> is your main program, then the <text:span text:style-name="Source_20_Text">V5_NeuralQuantumAnalyzer</text:span> class is already complete and working. The only issue would be if you're including both files and getting duplicate definitions.</text:p>
      <text:p text:style-name="Text_20_body">To fix any compilation issues, make sure:</text:p>
      <text:list xml:id="list543907967662522469" text:style-name="L4">
        <text:list-item>
          <text:p text:style-name="P4">Either remove the standalone function from the first file</text:p>
        </text:list-item>
        <text:list-item>
          <text:p text:style-name="P4">Or make sure only one is compiled/linked</text:p>
        </text:list-item>
        <text:list-item>
          <text:p text:style-name="P4">Or use the namespace approach above to avoid conflicts</text:p>
        </text:list-item>
      </text:list>
      <text:p text:style-name="Text_20_body">Would you like me to show you how to properly integrate these files or help you fix a specific compilation error you're encountering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10T22:36:46.48</meta:creation-date>
    <meta:document-statistic meta:table-count="0" meta:image-count="0" meta:object-count="0" meta:page-count="6" meta:paragraph-count="226" meta:word-count="2003" meta:character-count="13613"/>
    <dc:date>2025-12-10T22:38:41.16</dc:date>
    <dc:creator>Peter Thompson</dc:creator>
    <meta:editing-duration>PT1M55S</meta:editing-duration>
    <meta:editing-cycles>1</meta:editing-cycles>
    <meta:generator>OpenOffice/4.1.15$Win32 OpenOffice.org_project/4115m2$Build-9813</meta:generator>
  </office:meta>
</office:document-meta>
</file>