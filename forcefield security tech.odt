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list-style-name="L45"/>
    <style:style style:name="P4" style:family="paragraph" style:parent-style-name="Text_20_body" style:list-style-name="L46"/>
    <style:style style:name="P5" style:family="paragraph" style:parent-style-name="Text_20_body" style:list-style-name="L47"/>
    <style:style style:name="P6" style:family="paragraph" style:parent-style-name="Text_20_body" style:list-style-name="L48"/>
    <style:style style:name="P7" style:family="paragraph" style:parent-style-name="Text_20_body" style:list-style-name="L49"/>
    <style:style style:name="P8" style:family="paragraph" style:parent-style-name="Text_20_body" style:list-style-name="L50"/>
    <style:style style:name="P9" style:family="paragraph" style:parent-style-name="Text_20_body" style:list-style-name="L51"/>
    <style:style style:name="P10" style:family="paragraph" style:parent-style-name="Text_20_body" style:list-style-name="L52"/>
    <style:style style:name="P11" style:family="paragraph" style:parent-style-name="Text_20_body" style:list-style-name="L53"/>
    <style:style style:name="P12" style:family="paragraph" style:parent-style-name="Text_20_body" style:list-style-name="L54"/>
    <style:style style:name="P13" style:family="paragraph" style:parent-style-name="Text_20_body" style:list-style-name="L55"/>
    <style:style style:name="P14" style:family="paragraph" style:parent-style-name="Text_20_body" style:list-style-name="L56"/>
    <style:style style:name="P15" style:family="paragraph" style:parent-style-name="Text_20_body" style:list-style-name="L57"/>
    <style:style style:name="P16" style:family="paragraph" style:parent-style-name="Text_20_body" style:list-style-name="L58"/>
    <style:style style:name="P17" style:family="paragraph" style:parent-style-name="Text_20_body" style:list-style-name="L59"/>
    <style:style style:name="P18" style:family="paragraph" style:parent-style-name="Text_20_body" style:list-style-name="L60"/>
    <style:style style:name="P19" style:family="paragraph" style:parent-style-name="Text_20_body" style:list-style-name="L61"/>
    <style:style style:name="P20" style:family="paragraph" style:parent-style-name="Text_20_body" style:list-style-name="L62"/>
    <style:style style:name="P21" style:family="paragraph" style:parent-style-name="Text_20_body" style:list-style-name="L63"/>
    <style:style style:name="P22" style:family="paragraph" style:parent-style-name="Text_20_body" style:list-style-name="L64"/>
    <style:style style:name="P23" style:family="paragraph" style:parent-style-name="Text_20_body" style:list-style-name="L65"/>
    <style:style style:name="P24" style:family="paragraph" style:parent-style-name="Text_20_body" style:list-style-name="L66"/>
    <style:style style:name="P25" style:family="paragraph" style:parent-style-name="Text_20_body" style:list-style-name="L67"/>
    <style:style style:name="P26" style:family="paragraph" style:parent-style-name="Text_20_body" style:list-style-name="L68"/>
    <style:style style:name="P27" style:family="paragraph" style:parent-style-name="Text_20_body" style:list-style-name="L69"/>
    <style:style style:name="P28" style:family="paragraph" style:parent-style-name="Text_20_body" style:list-style-name="L70"/>
    <style:style style:name="P29" style:family="paragraph" style:parent-style-name="Text_20_body" style:list-style-name="L71"/>
    <style:style style:name="P30" style:family="paragraph" style:parent-style-name="Text_20_body" style:list-style-name="L72"/>
    <style:style style:name="P31" style:family="paragraph" style:parent-style-name="Text_20_body" style:list-style-name="L73"/>
    <style:style style:name="P32" style:family="paragraph" style:parent-style-name="Text_20_body" style:list-style-name="L74"/>
    <style:style style:name="P33" style:family="paragraph" style:parent-style-name="Text_20_body" style:list-style-name="L75"/>
    <style:style style:name="P34" style:family="paragraph" style:parent-style-name="Text_20_body" style:list-style-name="L76"/>
    <style:style style:name="P35" style:family="paragraph" style:parent-style-name="Text_20_body" style:list-style-name="L77"/>
    <style:style style:name="P36" style:family="paragraph" style:parent-style-name="Text_20_body" style:list-style-name="L78"/>
    <style:style style:name="P37" style:family="paragraph" style:parent-style-name="Text_20_body" style:list-style-name="L79"/>
    <style:style style:name="P38" style:family="paragraph" style:parent-style-name="Text_20_body" style:list-style-name="L80"/>
    <style:style style:name="P39" style:family="paragraph" style:parent-style-name="Text_20_body" style:list-style-name="L81"/>
    <style:style style:name="P40" style:family="paragraph" style:parent-style-name="Text_20_body" style:list-style-name="L82"/>
    <style:style style:name="P41" style:family="paragraph" style:parent-style-name="Text_20_body" style:list-style-name="L83"/>
    <style:style style:name="P42" style:family="paragraph" style:parent-style-name="Text_20_body" style:list-style-name="L84"/>
    <style:style style:name="P43" style:family="paragraph" style:parent-style-name="Text_20_body" style:list-style-name="L85"/>
    <style:style style:name="P44" style:family="paragraph" style:parent-style-name="Text_20_body" style:list-style-name="L86"/>
    <style:style style:name="P45" style:family="paragraph" style:parent-style-name="Text_20_body" style:list-style-name="L87"/>
    <style:style style:name="P46" style:family="paragraph" style:parent-style-name="Text_20_body" style:list-style-name="L1">
      <style:paragraph-properties fo:margin-top="0cm" fo:margin-bottom="0cm"/>
    </style:style>
    <style:style style:name="P47" style:family="paragraph" style:parent-style-name="Text_20_body" style:list-style-name="L45">
      <style:paragraph-properties fo:margin-top="0cm" fo:margin-bottom="0cm"/>
    </style:style>
    <style:style style:name="P48" style:family="paragraph" style:parent-style-name="Text_20_body" style:list-style-name="L46">
      <style:paragraph-properties fo:margin-top="0cm" fo:margin-bottom="0cm"/>
    </style:style>
    <style:style style:name="P49" style:family="paragraph" style:parent-style-name="Text_20_body" style:list-style-name="L47">
      <style:paragraph-properties fo:margin-top="0cm" fo:margin-bottom="0cm"/>
    </style:style>
    <style:style style:name="P50" style:family="paragraph" style:parent-style-name="Text_20_body" style:list-style-name="L48">
      <style:paragraph-properties fo:margin-top="0cm" fo:margin-bottom="0cm"/>
    </style:style>
    <style:style style:name="P51" style:family="paragraph" style:parent-style-name="Text_20_body" style:list-style-name="L49">
      <style:paragraph-properties fo:margin-top="0cm" fo:margin-bottom="0cm"/>
    </style:style>
    <style:style style:name="P52" style:family="paragraph" style:parent-style-name="Text_20_body" style:list-style-name="L50">
      <style:paragraph-properties fo:margin-top="0cm" fo:margin-bottom="0cm"/>
    </style:style>
    <style:style style:name="P53" style:family="paragraph" style:parent-style-name="Text_20_body" style:list-style-name="L51">
      <style:paragraph-properties fo:margin-top="0cm" fo:margin-bottom="0cm"/>
    </style:style>
    <style:style style:name="P54" style:family="paragraph" style:parent-style-name="Text_20_body" style:list-style-name="L52">
      <style:paragraph-properties fo:margin-top="0cm" fo:margin-bottom="0cm"/>
    </style:style>
    <style:style style:name="P55" style:family="paragraph" style:parent-style-name="Text_20_body" style:list-style-name="L53">
      <style:paragraph-properties fo:margin-top="0cm" fo:margin-bottom="0cm"/>
    </style:style>
    <style:style style:name="P56" style:family="paragraph" style:parent-style-name="Text_20_body" style:list-style-name="L54">
      <style:paragraph-properties fo:margin-top="0cm" fo:margin-bottom="0cm"/>
    </style:style>
    <style:style style:name="P57" style:family="paragraph" style:parent-style-name="Text_20_body" style:list-style-name="L55">
      <style:paragraph-properties fo:margin-top="0cm" fo:margin-bottom="0cm"/>
    </style:style>
    <style:style style:name="P58" style:family="paragraph" style:parent-style-name="Text_20_body" style:list-style-name="L56">
      <style:paragraph-properties fo:margin-top="0cm" fo:margin-bottom="0cm"/>
    </style:style>
    <style:style style:name="P59" style:family="paragraph" style:parent-style-name="Text_20_body" style:list-style-name="L57">
      <style:paragraph-properties fo:margin-top="0cm" fo:margin-bottom="0cm"/>
    </style:style>
    <style:style style:name="P60" style:family="paragraph" style:parent-style-name="Text_20_body" style:list-style-name="L58">
      <style:paragraph-properties fo:margin-top="0cm" fo:margin-bottom="0cm"/>
    </style:style>
    <style:style style:name="P61" style:family="paragraph" style:parent-style-name="Text_20_body" style:list-style-name="L59">
      <style:paragraph-properties fo:margin-top="0cm" fo:margin-bottom="0cm"/>
    </style:style>
    <style:style style:name="P62" style:family="paragraph" style:parent-style-name="Text_20_body" style:list-style-name="L60">
      <style:paragraph-properties fo:margin-top="0cm" fo:margin-bottom="0cm"/>
    </style:style>
    <style:style style:name="P63" style:family="paragraph" style:parent-style-name="Text_20_body" style:list-style-name="L61">
      <style:paragraph-properties fo:margin-top="0cm" fo:margin-bottom="0cm"/>
    </style:style>
    <style:style style:name="P64" style:family="paragraph" style:parent-style-name="Text_20_body" style:list-style-name="L62">
      <style:paragraph-properties fo:margin-top="0cm" fo:margin-bottom="0cm"/>
    </style:style>
    <style:style style:name="P65" style:family="paragraph" style:parent-style-name="Text_20_body" style:list-style-name="L63">
      <style:paragraph-properties fo:margin-top="0cm" fo:margin-bottom="0cm"/>
    </style:style>
    <style:style style:name="P66" style:family="paragraph" style:parent-style-name="Text_20_body" style:list-style-name="L64">
      <style:paragraph-properties fo:margin-top="0cm" fo:margin-bottom="0cm"/>
    </style:style>
    <style:style style:name="P67" style:family="paragraph" style:parent-style-name="Text_20_body" style:list-style-name="L65">
      <style:paragraph-properties fo:margin-top="0cm" fo:margin-bottom="0cm"/>
    </style:style>
    <style:style style:name="P68" style:family="paragraph" style:parent-style-name="Text_20_body" style:list-style-name="L66">
      <style:paragraph-properties fo:margin-top="0cm" fo:margin-bottom="0cm"/>
    </style:style>
    <style:style style:name="P69" style:family="paragraph" style:parent-style-name="Text_20_body" style:list-style-name="L67">
      <style:paragraph-properties fo:margin-top="0cm" fo:margin-bottom="0cm"/>
    </style:style>
    <style:style style:name="P70" style:family="paragraph" style:parent-style-name="Text_20_body" style:list-style-name="L68">
      <style:paragraph-properties fo:margin-top="0cm" fo:margin-bottom="0cm"/>
    </style:style>
    <style:style style:name="P71" style:family="paragraph" style:parent-style-name="Text_20_body" style:list-style-name="L69">
      <style:paragraph-properties fo:margin-top="0cm" fo:margin-bottom="0cm"/>
    </style:style>
    <style:style style:name="P72" style:family="paragraph" style:parent-style-name="Text_20_body" style:list-style-name="L70">
      <style:paragraph-properties fo:margin-top="0cm" fo:margin-bottom="0cm"/>
    </style:style>
    <style:style style:name="P73" style:family="paragraph" style:parent-style-name="Text_20_body" style:list-style-name="L71">
      <style:paragraph-properties fo:margin-top="0cm" fo:margin-bottom="0cm"/>
    </style:style>
    <style:style style:name="P74" style:family="paragraph" style:parent-style-name="Text_20_body" style:list-style-name="L72">
      <style:paragraph-properties fo:margin-top="0cm" fo:margin-bottom="0cm"/>
    </style:style>
    <style:style style:name="P75" style:family="paragraph" style:parent-style-name="Text_20_body" style:list-style-name="L73">
      <style:paragraph-properties fo:margin-top="0cm" fo:margin-bottom="0cm"/>
    </style:style>
    <style:style style:name="P76" style:family="paragraph" style:parent-style-name="Text_20_body" style:list-style-name="L74">
      <style:paragraph-properties fo:margin-top="0cm" fo:margin-bottom="0cm"/>
    </style:style>
    <style:style style:name="P77" style:family="paragraph" style:parent-style-name="Text_20_body" style:list-style-name="L75">
      <style:paragraph-properties fo:margin-top="0cm" fo:margin-bottom="0cm"/>
    </style:style>
    <style:style style:name="P78" style:family="paragraph" style:parent-style-name="Text_20_body" style:list-style-name="L76">
      <style:paragraph-properties fo:margin-top="0cm" fo:margin-bottom="0cm"/>
    </style:style>
    <style:style style:name="P79" style:family="paragraph" style:parent-style-name="Text_20_body" style:list-style-name="L77">
      <style:paragraph-properties fo:margin-top="0cm" fo:margin-bottom="0cm"/>
    </style:style>
    <style:style style:name="P80" style:family="paragraph" style:parent-style-name="Text_20_body" style:list-style-name="L78">
      <style:paragraph-properties fo:margin-top="0cm" fo:margin-bottom="0cm"/>
    </style:style>
    <style:style style:name="P81" style:family="paragraph" style:parent-style-name="Text_20_body" style:list-style-name="L79">
      <style:paragraph-properties fo:margin-top="0cm" fo:margin-bottom="0cm"/>
    </style:style>
    <style:style style:name="P82" style:family="paragraph" style:parent-style-name="Text_20_body" style:list-style-name="L80">
      <style:paragraph-properties fo:margin-top="0cm" fo:margin-bottom="0cm"/>
    </style:style>
    <style:style style:name="P83" style:family="paragraph" style:parent-style-name="Text_20_body" style:list-style-name="L81">
      <style:paragraph-properties fo:margin-top="0cm" fo:margin-bottom="0cm"/>
    </style:style>
    <style:style style:name="P84" style:family="paragraph" style:parent-style-name="Text_20_body" style:list-style-name="L82">
      <style:paragraph-properties fo:margin-top="0cm" fo:margin-bottom="0cm"/>
    </style:style>
    <style:style style:name="P85" style:family="paragraph" style:parent-style-name="Text_20_body" style:list-style-name="L83">
      <style:paragraph-properties fo:margin-top="0cm" fo:margin-bottom="0cm"/>
    </style:style>
    <style:style style:name="P86" style:family="paragraph" style:parent-style-name="Text_20_body" style:list-style-name="L84">
      <style:paragraph-properties fo:margin-top="0cm" fo:margin-bottom="0cm"/>
    </style:style>
    <style:style style:name="P87" style:family="paragraph" style:parent-style-name="Text_20_body" style:list-style-name="L85">
      <style:paragraph-properties fo:margin-top="0cm" fo:margin-bottom="0cm"/>
    </style:style>
    <style:style style:name="P88" style:family="paragraph" style:parent-style-name="Text_20_body" style:list-style-name="L86">
      <style:paragraph-properties fo:margin-top="0cm" fo:margin-bottom="0cm"/>
    </style:style>
    <style:style style:name="P89" style:family="paragraph" style:parent-style-name="Text_20_body" style:list-style-name="L87">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volutionary Quantum Force Field Cybersecurity Technology</text:h>
      <text:h text:style-name="Heading_20_2" text:outline-level="2">Strategic Partnership Proposal for Next-Generation Digital Protection</text:h>
      <text:p text:style-name="Horizontal_20_Line"/>
      <text:h text:style-name="Heading_20_3" text:outline-level="3"><text:span text:style-name="Strong_20_Emphasis">Executive Summary</text:span></text:h>
      <text:p text:style-name="Text_20_body">We are presenting an unprecedented opportunity to partner in developing the world's first <text:span text:style-name="Strong_20_Emphasis">Quantum Force Field Cybersecurity System</text:span> - a revolutionary technology that fundamentally transforms cyber threats from system weaknesses into sources of enhanced protection.</text:p>
      <text:p text:style-name="Text_20_body">Our breakthrough applies advanced quantum physics principles to create digital security that operates at the quantum level, where <text:span text:style-name="Strong_20_Emphasis">every cyber attack literally strengthens the defenses it attempts to breach</text:span>. This paradigm-shifting approach promises to obsolete traditional cybersecurity models and establish unassailable digital protection.</text:p>
      <text:p text:style-name="Text_20_body">We possess complete technical blueprints for a specialized <text:span text:style-name="Strong_20_Emphasis">Superconducting Quantum Processor</text:span> designed specifically for this application, along with the theoretical framework to implement unprecedented cybersecurity capabilities that will render conventional approaches irrelevant.</text:p>
      <text:p text:style-name="Horizontal_20_Line"/>
      <text:h text:style-name="Heading_20_3" text:outline-level="3"><text:span text:style-name="Strong_20_Emphasis">The Revolutionary Breakthrough</text:span></text:h>
      <text:h text:style-name="Heading_20_4" text:outline-level="4"><text:span text:style-name="Strong_20_Emphasis">Quantum-Level Digital Protection Theory</text:span></text:h>
      <text:p text:style-name="Text_20_body">Our technology operates on three fundamental principles that represent a complete departure from current cybersecurity approaches:</text:p>
      <text:p text:style-name="Text_20_body"><text:span text:style-name="Strong_20_Emphasis">1. Molecular Data Structure Analysis</text:span> Rather than examining files at the traditional binary level, our system analyzes data as if it were molecular matter, identifying the fundamental "digital DNA" of every file. This quantum-granularity examination detects threats that are completely invisible to conventional scanning methods, enabling identification of malicious patterns embedded at the deepest levels of data structure.</text:p>
      <text:p text:style-name="Text_20_body"><text:span text:style-name="Strong_20_Emphasis">2. Self-Reinforcing Defense Architecture</text:span> The most revolutionary aspect: our system captures the computational energy used by cyber attacks and converts it into enhanced defensive capabilities. Every malware attempt, every intrusion, every DDoS attack provides raw energy that our quantum processors amplify and redirect into stronger protection algorithms. The harder attackers try, the more powerful our defenses become.</text:p>
      <text:p text:style-name="Text_20_body"><text:span text:style-name="Strong_20_Emphasis">3. Selective Quantum Permeability</text:span> Inspired by advanced physics concepts, our technology creates digital barriers that exhibit perfect selectivity - allowing beneficial data to pass through at light speed while blocking malicious content at the quantum level before it can execute. This creates truly impenetrable digital environments without any performance degradation.</text:p>
      <text:h text:style-name="Heading_20_4" text:outline-level="4"><text:span text:style-name="Strong_20_Emphasis">The Physics Foundation</text:span></text:h>
      <text:p text:style-name="Text_20_body">Our approach is grounded in established quantum mechanical principles:</text:p>
      <text:list xml:id="list6154098677271743310" text:style-name="L1">
        <text:list-item>
          <text:p text:style-name="P46"><text:soft-page-break/><text:span text:style-name="Strong_20_Emphasis">Quantum Superposition</text:span>: Enables simultaneous analysis of all possible threat configurations </text:p>
        </text:list-item>
        <text:list-item>
          <text:p text:style-name="P46"><text:span text:style-name="Strong_20_Emphasis">Quantum Entanglement</text:span>: Creates unbreakable connections between security components </text:p>
        </text:list-item>
        <text:list-item>
          <text:p text:style-name="P46"><text:span text:style-name="Strong_20_Emphasis">Energy Conservation</text:span>: Redirects attack energy into system enhancement rather than allowing destruction </text:p>
        </text:list-item>
        <text:list-item>
          <text:p text:style-name="P46"><text:span text:style-name="Strong_20_Emphasis">Harmonic Resonance</text:span>: Uses frequency-based analysis to identify malicious patterns through natural wave mechanics </text:p>
        </text:list-item>
        <text:list-item>
          <text:p text:style-name="P2"><text:span text:style-name="Strong_20_Emphasis">Superconducting Coherence</text:span>: Maintains perfect quantum states for flawless threat detection </text:p>
        </text:list-item>
      </text:list>
      <text:p text:style-name="Horizontal_20_Line"/>
      <text:h text:style-name="Heading_20_3" text:outline-level="3"><text:span text:style-name="Strong_20_Emphasis">Technical Implementation Requirements</text:span></text:h>
      <text:h text:style-name="Heading_20_4" text:outline-level="4"><text:span text:style-name="Strong_20_Emphasis">Specialized Quantum Hardware Platform</text:span></text:h>
      <text:p text:style-name="Text_20_body"><text:span text:style-name="Strong_20_Emphasis">Complete Soft-X-Ray Superconducting CPU Specifications:</text:span></text:p>
      <text:p text:style-name="Text_20_body"><text:span text:style-name="Strong_20_Emphasis">Physical Architecture:</text:span></text:p>
      <text:list xml:id="list3186014482699711349" text:style-name="L45">
        <text:list-item>
          <text:p text:style-name="P47"><text:span text:style-name="Strong_20_Emphasis">Josephson Core Array</text:span>: 2000 × 2000 μm quantum processing matrix </text:p>
        </text:list-item>
        <text:list-item>
          <text:p text:style-name="P47"><text:span text:style-name="Strong_20_Emphasis">JJ-Array Coordinates</text:span>: (10,000, 10,000) to (12,000, 12,000) μm precision positioning </text:p>
        </text:list-item>
        <text:list-item>
          <text:p text:style-name="P47"><text:span text:style-name="Strong_20_Emphasis">PR Cavity Outline</text:span>: (5,000, 5,000) to (15,000, 15,000) μm photon-resonant chamber </text:p>
        </text:list-item>
        <text:list-item>
          <text:p text:style-name="P3"><text:span text:style-name="Strong_20_Emphasis">Total Chip Dimensions</text:span>: 22 × 22 mm² fabrication area </text:p>
        </text:list-item>
      </text:list>
      <text:p text:style-name="Text_20_body"><text:span text:style-name="Strong_20_Emphasis">Layer Stack Architecture (8 Precision Layers):</text:span></text:p>
      <text:p text:style-name="Text_20_body"><text:span text:style-name="Strong_20_Emphasis">Layer 0 - SUB-Nb</text:span>: Niobium substrate, 500 μm thick</text:p>
      <text:list xml:id="list3081349666588488037" text:style-name="L46">
        <text:list-item>
          <text:p text:style-name="P48"><text:span text:style-name="Strong_20_Emphasis">Function</text:span>: Ground plane for all RF structures and zero-resistance foundation </text:p>
        </text:list-item>
        <text:list-item>
          <text:p text:style-name="P48"><text:span text:style-name="Strong_20_Emphasis">Material</text:span>: Pure niobium superconducting base </text:p>
        </text:list-item>
        <text:list-item>
          <text:p text:style-name="P4"><text:span text:style-name="Strong_20_Emphasis">Color Code</text:span>: White (Layer 7) - CAD reference </text:p>
        </text:list-item>
      </text:list>
      <text:p text:style-name="Text_20_body"><text:span text:style-name="Strong_20_Emphasis">Layer +1 - JJ-Array</text:span>: Optimized Josephson junction grid</text:p>
      <text:list xml:id="list8110809935055477119" text:style-name="L47">
        <text:list-item>
          <text:p text:style-name="P49"><text:span text:style-name="Strong_20_Emphasis">Function</text:span>: Quantum tunneling processing elements </text:p>
        </text:list-item>
        <text:list-item>
          <text:p text:style-name="P49"><text:span text:style-name="Strong_20_Emphasis">Specifications</text:span>: 100 nm AlOx barrier, 2 μm pitch spacing </text:p>
        </text:list-item>
        <text:list-item>
          <text:p text:style-name="P49"><text:span text:style-name="Strong_20_Emphasis">Material</text:span>: Nb/AlOx/Nb trilayer superconducting junctions </text:p>
        </text:list-item>
        <text:list-item>
          <text:p text:style-name="P5"><text:span text:style-name="Strong_20_Emphasis">Color Code</text:span>: Red (Layer 1) - CAD reference </text:p>
        </text:list-item>
      </text:list>
      <text:p text:style-name="Text_20_body"><text:span text:style-name="Strong_20_Emphasis">Layer +2 - PR-Waveguide</text:span>: Photon-resonant CPW bus system</text:p>
      <text:list xml:id="list7399833164020083522" text:style-name="L48">
        <text:list-item>
          <text:p text:style-name="P50"><text:span text:style-name="Strong_20_Emphasis">Function</text:span>: Light-speed quantum data transmission </text:p>
        </text:list-item>
        <text:list-item>
          <text:p text:style-name="P50"><text:span text:style-name="Strong_20_Emphasis">Frequency Domain</text:span>: Soft-X range (0.4-2 nm λequiv) </text:p>
        </text:list-item>
        <text:list-item>
          <text:p text:style-name="P50"><text:span text:style-name="Strong_20_Emphasis">Material</text:span>: Superconducting coplanar waveguide architecture </text:p>
        </text:list-item>
        <text:list-item>
          <text:p text:style-name="P6"><text:span text:style-name="Strong_20_Emphasis">Color Code</text:span>: Green (Layer 3) - CAD reference </text:p>
        </text:list-item>
      </text:list>
      <text:p text:style-name="Text_20_body"><text:span text:style-name="Strong_20_Emphasis">Layer +3 - FM-27k</text:span>: 27 kHz harmonic bias lines</text:p>
      <text:list xml:id="list4483247062052296085" text:style-name="L49">
        <text:list-item>
          <text:p text:style-name="P51"><text:span text:style-name="Strong_20_Emphasis">Function</text:span>: Coarse phase clock control for quantum state manipulation </text:p>
        </text:list-item>
        <text:list-item>
          <text:p text:style-name="P51"><text:span text:style-name="Strong_20_Emphasis">Frequency</text:span>: Precisely tuned 27 kHz harmonic generation </text:p>
        </text:list-item>
        <text:list-item>
          <text:p text:style-name="P51"><text:span text:style-name="Strong_20_Emphasis">Line Type</text:span>: Dashed pattern for AC signal routing </text:p>
        </text:list-item>
        <text:list-item>
          <text:p text:style-name="P7"><text:span text:style-name="Strong_20_Emphasis">Color Code</text:span>: Blue (Layer 5) - CAD reference </text:p>
        </text:list-item>
      </text:list>
      <text:p text:style-name="Text_20_body"><text:span text:style-name="Strong_20_Emphasis">Layer +4 - FM-50k</text:span>: 50 kHz harmonic bias system</text:p>
      <text:list xml:id="list5706974965696303793" text:style-name="L50">
        <text:list-item>
          <text:p text:style-name="P52"><text:span text:style-name="Strong_20_Emphasis">Function</text:span>: Fine phase trim control for quantum coherence </text:p>
        </text:list-item>
        <text:list-item>
          <text:p text:style-name="P52"><text:span text:style-name="Strong_20_Emphasis">Frequency</text:span>: Precisely tuned 50 kHz harmonic generation </text:p>
        </text:list-item>
        <text:list-item>
          <text:p text:style-name="P52"><text:span text:style-name="Strong_20_Emphasis">Line Type</text:span>: Dashed pattern for precision frequency control </text:p>
        </text:list-item>
        <text:list-item>
          <text:p text:style-name="P8"><text:soft-page-break/><text:span text:style-name="Strong_20_Emphasis">Color Code</text:span>: Magenta (Layer 6) - CAD reference </text:p>
        </text:list-item>
      </text:list>
      <text:p text:style-name="Text_20_body"><text:span text:style-name="Strong_20_Emphasis">Layer +5 - QZ-Dielectric</text:span>: Quartz interlayer system</text:p>
      <text:list xml:id="list8208595769576182353" text:style-name="L51">
        <text:list-item>
          <text:p text:style-name="P53"><text:span text:style-name="Strong_20_Emphasis">Function</text:span>: Quantum isolation and energy containment </text:p>
        </text:list-item>
        <text:list-item>
          <text:p text:style-name="P53"><text:span text:style-name="Strong_20_Emphasis">Material</text:span>: Quartz (εr=3.8) in 5 μm wafer-bonded sheets </text:p>
        </text:list-item>
        <text:list-item>
          <text:p text:style-name="P53"><text:span text:style-name="Strong_20_Emphasis">Properties</text:span>: Perfect quantum barrier characteristics </text:p>
        </text:list-item>
        <text:list-item>
          <text:p text:style-name="P9"><text:span text:style-name="Strong_20_Emphasis">Color Code</text:span>: Yellow (Layer 2) - CAD reference </text:p>
        </text:list-item>
      </text:list>
      <text:p text:style-name="Text_20_body"><text:span text:style-name="Strong_20_Emphasis">Layer +6 - TSL-Shield</text:span>: Containment and protection layer</text:p>
      <text:list xml:id="list1917441781791196529" text:style-name="L52">
        <text:list-item>
          <text:p text:style-name="P54"><text:span text:style-name="Strong_20_Emphasis">Function</text:span>: Tantalum/stainless lamination for soft-X containment </text:p>
        </text:list-item>
        <text:list-item>
          <text:p text:style-name="P54"><text:span text:style-name="Strong_20_Emphasis">Material</text:span>: Advanced electromagnetic shielding composite </text:p>
        </text:list-item>
        <text:list-item>
          <text:p text:style-name="P54"><text:span text:style-name="Strong_20_Emphasis">Protection</text:span>: Complete radiation and interference isolation </text:p>
        </text:list-item>
        <text:list-item>
          <text:p text:style-name="P10"><text:span text:style-name="Strong_20_Emphasis">Color Code</text:span>: Grey (Layer 8) - CAD reference </text:p>
        </text:list-item>
      </text:list>
      <text:p text:style-name="Text_20_body"><text:span text:style-name="Strong_20_Emphasis">Layer +7 - TEST-PTS</text:span>: Calibration and measurement system</text:p>
      <text:list xml:id="list2316516926792403223" text:style-name="L53">
        <text:list-item>
          <text:p text:style-name="P55"><text:span text:style-name="Strong_20_Emphasis">Function</text:span>: Probe pads, calibration coils, flux traps </text:p>
        </text:list-item>
        <text:list-item>
          <text:p text:style-name="P55"><text:span text:style-name="Strong_20_Emphasis">Purpose</text:span>: Quantum state verification and system diagnostics </text:p>
        </text:list-item>
        <text:list-item>
          <text:p text:style-name="P55"><text:span text:style-name="Strong_20_Emphasis">Access</text:span>: External measurement and control interfaces </text:p>
        </text:list-item>
        <text:list-item>
          <text:p text:style-name="P11"><text:span text:style-name="Strong_20_Emphasis">Color Code</text:span>: Cyan (Layer 4) - CAD reference </text:p>
        </text:list-item>
      </text:list>
      <text:p text:style-name="Text_20_body"><text:span text:style-name="Strong_20_Emphasis">Operational Specifications:</text:span></text:p>
      <text:list xml:id="list7285029305700166996" text:style-name="L54">
        <text:list-item>
          <text:p text:style-name="P56"><text:span text:style-name="Strong_20_Emphasis">Operating Temperature</text:span>: &lt;100 mK (millikelvin) superconducting regime </text:p>
        </text:list-item>
        <text:list-item>
          <text:p text:style-name="P56"><text:span text:style-name="Strong_20_Emphasis">Quantum Coherence Time</text:span>: &gt;100 μs (microseconds) for stable operation </text:p>
        </text:list-item>
        <text:list-item>
          <text:p text:style-name="P56"><text:span text:style-name="Strong_20_Emphasis">Processing Speed</text:span>: Real-time quantum analysis at network transmission rates </text:p>
        </text:list-item>
        <text:list-item>
          <text:p text:style-name="P56"><text:span text:style-name="Strong_20_Emphasis">Energy Efficiency</text:span>: Zero-resistance operation with energy harvesting capability </text:p>
        </text:list-item>
        <text:list-item>
          <text:p text:style-name="P12"><text:span text:style-name="Strong_20_Emphasis">Scalability</text:span>: Modular design for multi-processor quantum arrays </text:p>
        </text:list-item>
      </text:list>
      <text:p text:style-name="Text_20_body"><text:span text:style-name="Strong_20_Emphasis">Complete AutoCAD/Fusion 360 Ready Technical Package:</text:span></text:p>
      <text:p text:style-name="Text_20_body"><text:span text:style-name="Strong_20_Emphasis">Fabrication-Ready Documentation:</text:span></text:p>
      <text:list xml:id="list1972995327523122518" text:style-name="L55">
        <text:list-item>
          <text:p text:style-name="P57"><text:span text:style-name="Strong_20_Emphasis">CAD File Format</text:span>: DWG/DXF compatible with all major design software </text:p>
        </text:list-item>
        <text:list-item>
          <text:p text:style-name="P57"><text:span text:style-name="Strong_20_Emphasis">Layer Organization</text:span>: 8-layer stack with precise naming convention and color coding </text:p>
        </text:list-item>
        <text:list-item>
          <text:p text:style-name="P57"><text:span text:style-name="Strong_20_Emphasis">Coordinate System</text:span>: Micron-precision XY coordinates for direct lithography mask generation </text:p>
        </text:list-item>
        <text:list-item>
          <text:p text:style-name="P13"><text:span text:style-name="Strong_20_Emphasis">Units Specification</text:span>: μm (micrometers) for chip-level geometry, GHz for Josephson specs, kHz for modulation buses </text:p>
        </text:list-item>
      </text:list>
      <text:p text:style-name="Text_20_body"><text:span text:style-name="Strong_20_Emphasis">AutoCAD Import Instructions:</text:span></text:p>
      <text:p text:style-name="Preformatted_20_Text"><text:span text:style-name="Source_20_Text">LAYER STACK IMPORT PROCEDURE:</text:span></text:p>
      <text:p text:style-name="Preformatted_20_Text"><text:span text:style-name="Source_20_Text">1. Import coordinates and layer names directly into AutoCAD/Fusion 360</text:span></text:p>
      <text:p text:style-name="Preformatted_20_Text"><text:span text:style-name="Source_20_Text">2. Respect defined layer stack sequence (Z-order 0 through +7)</text:span></text:p>
      <text:p text:style-name="Preformatted_20_Text"><text:span text:style-name="Source_20_Text">3. Maintain micron-level precision for all geometric features</text:span></text:p>
      <text:p text:style-name="Preformatted_20_Text"><text:span text:style-name="Source_20_Text">4. Apply specified color coding for visual layer identification</text:span></text:p>
      <text:p text:style-name="P1"><text:span text:style-name="Source_20_Text">5. Generate lithography masks directly from CAD geometry</text:span></text:p>
      <text:p text:style-name="Text_20_body"><text:span text:style-name="Strong_20_Emphasis">Key Fabrication Coordinates:</text:span></text:p>
      <text:list xml:id="list1293850209902207678" text:style-name="L56">
        <text:list-item>
          <text:p text:style-name="P58"><text:span text:style-name="Strong_20_Emphasis">JJ Core Array</text:span>: Bottom-left (10,000, 10,000) → Top-right (12,000, 12,000) </text:p>
        </text:list-item>
        <text:list-item>
          <text:p text:style-name="P58"><text:span text:style-name="Strong_20_Emphasis">PR Cav Outline</text:span>: Bottom-left (5,000, 5,000) → Top-right (15,000, 15,000) </text:p>
        </text:list-item>
        <text:list-item>
          <text:p text:style-name="P58"><text:span text:style-name="Strong_20_Emphasis">Flux-Bias Test Loops</text:span>: Integrated throughout Josephson core region </text:p>
        </text:list-item>
        <text:list-item>
          <text:p text:style-name="P14"><text:span text:style-name="Strong_20_Emphasis">Probe Access Points</text:span>: Distributed across TEST-PTS layer for measurement </text:p>
        </text:list-item>
      </text:list>
      <text:p text:style-name="Text_20_body"><text:span text:style-name="Strong_20_Emphasis">Manufacturing Specifications:</text:span></text:p>
      <text:list xml:id="list2756712052922418398" text:style-name="L57">
        <text:list-item>
          <text:p text:style-name="P59"><text:soft-page-break/><text:span text:style-name="Strong_20_Emphasis">Lithography Resolution</text:span>: Sub-100 nm feature capability required </text:p>
        </text:list-item>
        <text:list-item>
          <text:p text:style-name="P59"><text:span text:style-name="Strong_20_Emphasis">Alignment Tolerance</text:span>: ±50 nm inter-layer registration accuracy </text:p>
        </text:list-item>
        <text:list-item>
          <text:p text:style-name="P59"><text:span text:style-name="Strong_20_Emphasis">Material Purity</text:span>: 99.99%+ superconducting grade niobium and aluminum </text:p>
        </text:list-item>
        <text:list-item>
          <text:p text:style-name="P59"><text:span text:style-name="Strong_20_Emphasis">Process Temperature</text:span>: Ultra-high vacuum deposition and etching </text:p>
        </text:list-item>
        <text:list-item>
          <text:p text:style-name="P15"><text:span text:style-name="Strong_20_Emphasis">Quality Control</text:span>: Individual junction resistance measurement and mapping </text:p>
        </text:list-item>
      </text:list>
      <text:h text:style-name="Heading_20_4" text:outline-level="4"><text:span text:style-name="Strong_20_Emphasis">Software and Algorithm Development</text:span></text:h>
      <text:p text:style-name="Text_20_body"><text:span text:style-name="Strong_20_Emphasis">Quantum Cybersecurity Firmware:</text:span></text:p>
      <text:list xml:id="list8627386379808034542" text:style-name="L58">
        <text:list-item>
          <text:p text:style-name="P60">Quantum state manipulation protocols for threat analysis </text:p>
        </text:list-item>
        <text:list-item>
          <text:p text:style-name="P60">Energy harvesting and amplification algorithms </text:p>
        </text:list-item>
        <text:list-item>
          <text:p text:style-name="P60">Selective permeability filtering systems </text:p>
        </text:list-item>
        <text:list-item>
          <text:p text:style-name="P60">Real-time quantum error correction </text:p>
        </text:list-item>
        <text:list-item>
          <text:p text:style-name="P16">Classical-quantum hybrid processing interfaces </text:p>
        </text:list-item>
      </text:list>
      <text:p text:style-name="Text_20_body"><text:span text:style-name="Strong_20_Emphasis">Integration Requirements:</text:span></text:p>
      <text:list xml:id="list6218910315481940013" text:style-name="L59">
        <text:list-item>
          <text:p text:style-name="P61">Network protocol adaptation layers </text:p>
        </text:list-item>
        <text:list-item>
          <text:p text:style-name="P61">Legacy system compatibility frameworks </text:p>
        </text:list-item>
        <text:list-item>
          <text:p text:style-name="P61">Real-time processing optimization </text:p>
        </text:list-item>
        <text:list-item>
          <text:p text:style-name="P61">Scalable deployment architectures </text:p>
        </text:list-item>
        <text:list-item>
          <text:p text:style-name="P17">Global threat intelligence networks </text:p>
        </text:list-item>
      </text:list>
      <text:h text:style-name="Heading_20_4" text:outline-level="4"><text:span text:style-name="Strong_20_Emphasis">Immediate Hardware Development Capabilities</text:span></text:h>
      <text:p text:style-name="Text_20_body"><text:span text:style-name="Strong_20_Emphasis">Ready-for-Fabrication Status:</text:span> Our Soft-X-Ray Superconducting CPU represents a complete, fabrication-ready quantum cybersecurity processor. Unlike theoretical proposals, we possess:</text:p>
      <text:p text:style-name="Text_20_body"><text:span text:style-name="Strong_20_Emphasis">Complete Manufacturing Package:</text:span></text:p>
      <text:list xml:id="list3410668978685203587" text:style-name="L60">
        <text:list-item>
          <text:p text:style-name="P62"><text:span text:style-name="Strong_20_Emphasis">8-Layer Technical Blueprints</text:span>: Every layer specified with exact materials, thicknesses, and functions </text:p>
        </text:list-item>
        <text:list-item>
          <text:p text:style-name="P62"><text:span text:style-name="Strong_20_Emphasis">Precision CAD Coordinates</text:span>: Micron-level positioning data for direct mask generation </text:p>
        </text:list-item>
        <text:list-item>
          <text:p text:style-name="P62"><text:span text:style-name="Strong_20_Emphasis">AutoCAD Integration</text:span>: DWG/DXF files ready for immediate import into fabrication workflows </text:p>
        </text:list-item>
        <text:list-item>
          <text:p text:style-name="P62"><text:span text:style-name="Strong_20_Emphasis">Material Specifications</text:span>: Industry-standard superconducting materials (Nb, Al, AlOx, Quartz, Tantalum) </text:p>
        </text:list-item>
        <text:list-item>
          <text:p text:style-name="P18"><text:span text:style-name="Strong_20_Emphasis">Process Documentation</text:span>: Compatible with existing quantum device fabrication techniques </text:p>
        </text:list-item>
      </text:list>
      <text:p text:style-name="Text_20_body"><text:span text:style-name="Strong_20_Emphasis">Quantum Architecture Advantages:</text:span></text:p>
      <text:list xml:id="list7529323477768622599" text:style-name="L61">
        <text:list-item>
          <text:p text:style-name="P63"><text:span text:style-name="Strong_20_Emphasis">2000×2000 μm Processing Core</text:span>: Massive parallel quantum analysis capability </text:p>
        </text:list-item>
        <text:list-item>
          <text:p text:style-name="P63"><text:span text:style-name="Strong_20_Emphasis">Dual Harmonic Control</text:span>: 27kHz/50kHz precision frequency generation for quantum state manipulation </text:p>
        </text:list-item>
        <text:list-item>
          <text:p text:style-name="P63"><text:span text:style-name="Strong_20_Emphasis">Integrated Test Systems</text:span>: Built-in calibration coils and measurement interfaces </text:p>
        </text:list-item>
        <text:list-item>
          <text:p text:style-name="P63"><text:span text:style-name="Strong_20_Emphasis">Scalable Design</text:span>: Modular architecture for multi-processor quantum arrays </text:p>
        </text:list-item>
        <text:list-item>
          <text:p text:style-name="P19"><text:span text:style-name="Strong_20_Emphasis">Zero-Resistance Operation</text:span>: Superconducting substrate enables true energy harvesting </text:p>
        </text:list-item>
      </text:list>
      <text:p text:style-name="Text_20_body"><text:span text:style-name="Strong_20_Emphasis">Manufacturing Timeline:</text:span></text:p>
      <text:list xml:id="list2653221601666615017" text:style-name="L62">
        <text:list-item>
          <text:p text:style-name="P64"><text:span text:style-name="Strong_20_Emphasis">Mask Generation</text:span>: 2-4 weeks from CAD files </text:p>
        </text:list-item>
        <text:list-item>
          <text:p text:style-name="P64"><text:span text:style-name="Strong_20_Emphasis">Fabrication Process</text:span>: 8-12 weeks using standard quantum device facilities </text:p>
        </text:list-item>
        <text:list-item>
          <text:p text:style-name="P64"><text:span text:style-name="Strong_20_Emphasis">Testing and Validation</text:span>: 4-6 weeks for full characterization </text:p>
        </text:list-item>
        <text:list-item>
          <text:p text:style-name="P64"><text:span text:style-name="Strong_20_Emphasis">First Working Processor</text:span>: 6 months from partnership agreement </text:p>
        </text:list-item>
        <text:list-item>
          <text:p text:style-name="P64"><text:soft-page-break/><text:span text:style-name="Strong_20_Emphasis">Investment Required</text:span>: $15-25 million </text:p>
        </text:list-item>
        <text:list-item>
          <text:p text:style-name="P64"><text:span text:style-name="Strong_20_Emphasis">Objectives</text:span>: Fabricate first quantum cybersecurity processor </text:p>
        </text:list-item>
        <text:list-item>
          <text:p text:style-name="P64"><text:span text:style-name="Strong_20_Emphasis">Deliverables</text:span>: Working prototype with basic threat detection </text:p>
        </text:list-item>
        <text:list-item>
          <text:p text:style-name="P20"><text:span text:style-name="Strong_20_Emphasis">Team</text:span>: 25-35 quantum engineers and cybersecurity specialists </text:p>
        </text:list-item>
      </text:list>
      <text:p text:style-name="Text_20_body"><text:span text:style-name="Strong_20_Emphasis">Phase 2: Commercial Development (12-18 months)</text:span></text:p>
      <text:list xml:id="list4542070002080421565" text:style-name="L63">
        <text:list-item>
          <text:p text:style-name="P65"><text:span text:style-name="Strong_20_Emphasis">Investment Required</text:span>: $50-75 million </text:p>
        </text:list-item>
        <text:list-item>
          <text:p text:style-name="P65"><text:span text:style-name="Strong_20_Emphasis">Objectives</text:span>: Full-scale quantum cybersecurity system </text:p>
        </text:list-item>
        <text:list-item>
          <text:p text:style-name="P65"><text:span text:style-name="Strong_20_Emphasis">Deliverables</text:span>: Enterprise-ready protection platform </text:p>
        </text:list-item>
        <text:list-item>
          <text:p text:style-name="P21"><text:span text:style-name="Strong_20_Emphasis">Team</text:span>: 75-100 technical specialists and business development </text:p>
        </text:list-item>
      </text:list>
      <text:p text:style-name="Text_20_body"><text:span text:style-name="Strong_20_Emphasis">Phase 3: Market Deployment (18-36 months)</text:span></text:p>
      <text:list xml:id="list7773816478854800737" text:style-name="L64">
        <text:list-item>
          <text:p text:style-name="P66"><text:span text:style-name="Strong_20_Emphasis">Investment Required</text:span>: $100-150 million </text:p>
        </text:list-item>
        <text:list-item>
          <text:p text:style-name="P66"><text:span text:style-name="Strong_20_Emphasis">Objectives</text:span>: Global rollout and market establishment </text:p>
        </text:list-item>
        <text:list-item>
          <text:p text:style-name="P66"><text:span text:style-name="Strong_20_Emphasis">Deliverables</text:span>: Worldwide quantum cybersecurity dominance </text:p>
        </text:list-item>
        <text:list-item>
          <text:p text:style-name="P22"><text:span text:style-name="Strong_20_Emphasis">Team</text:span>: 200+ employees across all functions </text:p>
        </text:list-item>
      </text:list>
      <text:p text:style-name="Text_20_body"><text:span text:style-name="Strong_20_Emphasis">Total Investment</text:span>: $165-250 million for complete market transformation</text:p>
      <text:p text:style-name="Horizontal_20_Line"/>
      <text:h text:style-name="Heading_20_3" text:outline-level="3"><text:span text:style-name="Strong_20_Emphasis">Competitive Advantage and Market Impact</text:span></text:h>
      <text:h text:style-name="Heading_20_4" text:outline-level="4"><text:span text:style-name="Strong_20_Emphasis">Absolute Technical Superiority</text:span></text:h>
      <text:p text:style-name="Text_20_body"><text:span text:style-name="Strong_20_Emphasis">Capabilities Beyond Current Technology:</text:span></text:p>
      <text:list xml:id="list1967119448860318740" text:style-name="L65">
        <text:list-item>
          <text:p text:style-name="P67"><text:span text:style-name="Strong_20_Emphasis">100% Zero-Day Protection</text:span>: Instant immunity to previously unknown threats </text:p>
        </text:list-item>
        <text:list-item>
          <text:p text:style-name="P67"><text:span text:style-name="Strong_20_Emphasis">Negative Performance Impact</text:span>: Security actually improves system speed </text:p>
        </text:list-item>
        <text:list-item>
          <text:p text:style-name="P67"><text:span text:style-name="Strong_20_Emphasis">Perfect Accuracy</text:span>: 99.99%+ threat detection with virtually zero false positives </text:p>
        </text:list-item>
        <text:list-item>
          <text:p text:style-name="P67"><text:span text:style-name="Strong_20_Emphasis">Self-Improving Defense</text:span>: Permanent enhancement from every attack attempt </text:p>
        </text:list-item>
        <text:list-item>
          <text:p text:style-name="P67"><text:span text:style-name="Strong_20_Emphasis">Unbreakable Encryption</text:span>: Quantum-level cryptographic protection </text:p>
        </text:list-item>
        <text:list-item>
          <text:p text:style-name="P23"><text:span text:style-name="Strong_20_Emphasis">Real-Time Processing</text:span>: Threat analysis at network transmission speeds </text:p>
        </text:list-item>
      </text:list>
      <text:h text:style-name="Heading_20_4" text:outline-level="4"><text:span text:style-name="Strong_20_Emphasis">Market Disruption Potential</text:span></text:h>
      <text:p text:style-name="Text_20_body"><text:span text:style-name="Strong_20_Emphasis">Immediate Obsolescence of Competing Technologies:</text:span></text:p>
      <text:p text:style-name="Text_20_body">Traditional cybersecurity companies face an existential threat from quantum force field technology:</text:p>
      <text:p text:style-name="Text_20_body"><text:span text:style-name="Strong_20_Emphasis">Current Industry Leaders Will Become Irrelevant:</text:span></text:p>
      <text:list xml:id="list3733862365075208209" text:style-name="L66">
        <text:list-item>
          <text:p text:style-name="P68"><text:span text:style-name="Strong_20_Emphasis">Signature-Based Detection</text:span>: Cannot compete with quantum molecular analysis </text:p>
        </text:list-item>
        <text:list-item>
          <text:p text:style-name="P68"><text:span text:style-name="Strong_20_Emphasis">Behavioral Monitoring</text:span>: Primitive compared to quantum state examination </text:p>
        </text:list-item>
        <text:list-item>
          <text:p text:style-name="P68"><text:span text:style-name="Strong_20_Emphasis">Machine Learning Approaches</text:span>: Classical AI cannot match quantum processing power </text:p>
        </text:list-item>
        <text:list-item>
          <text:p text:style-name="P68"><text:span text:style-name="Strong_20_Emphasis">Performance Trade-offs</text:span>: Conventional security slows systems; ours accelerates them </text:p>
        </text:list-item>
        <text:list-item>
          <text:p text:style-name="P24"><text:span text:style-name="Strong_20_Emphasis">Reactive Defense Models</text:span>: Traditional systems respond after threats; ours prevent before execution </text:p>
        </text:list-item>
      </text:list>
      <text:p text:style-name="Text_20_body"><text:span text:style-name="Strong_20_Emphasis">The Coming Market Transformation:</text:span></text:p>
      <text:p text:style-name="Text_20_body">Organizations using quantum force field cybersecurity will possess <text:span text:style-name="Strong_20_Emphasis">insurmountable advantages</text:span>:</text:p>
      <text:list xml:id="list2275959914634341067" text:style-name="L67">
        <text:list-item>
          <text:p text:style-name="P69"><text:span text:style-name="Strong_20_Emphasis">Complete Cyber Attack Immunity</text:span>: Zero successful breaches </text:p>
        </text:list-item>
        <text:list-item>
          <text:p text:style-name="P69"><text:span text:style-name="Strong_20_Emphasis">Enhanced System Performance</text:span>: Security improves rather than degrades operations </text:p>
        </text:list-item>
        <text:list-item>
          <text:p text:style-name="P69"><text:soft-page-break/><text:span text:style-name="Strong_20_Emphasis">Perfect Compliance</text:span>: Automatic adherence to all cybersecurity regulations </text:p>
        </text:list-item>
        <text:list-item>
          <text:p text:style-name="P69"><text:span text:style-name="Strong_20_Emphasis">Competitive Intelligence</text:span>: Quantum-level insights into market threats </text:p>
        </text:list-item>
        <text:list-item>
          <text:p text:style-name="P25"><text:span text:style-name="Strong_20_Emphasis">Economic Advantages</text:span>: Elimination of cyber attack costs and insurance premiums </text:p>
        </text:list-item>
      </text:list>
      <text:p text:style-name="Text_20_body"><text:span text:style-name="Strong_20_Emphasis">Companies Without This Technology Will:</text:span></text:p>
      <text:list xml:id="list2570550570608376476" text:style-name="L68">
        <text:list-item>
          <text:p text:style-name="P70"><text:span text:style-name="Strong_20_Emphasis">Suffer Inevitable Breaches</text:span>: Traditional defenses will appear primitive </text:p>
        </text:list-item>
        <text:list-item>
          <text:p text:style-name="P70"><text:span text:style-name="Strong_20_Emphasis">Face Performance Penalties</text:span>: Conventional security creates system drag </text:p>
        </text:list-item>
        <text:list-item>
          <text:p text:style-name="P70"><text:span text:style-name="Strong_20_Emphasis">Experience Escalating Costs</text:span>: Arms race with increasingly sophisticated attacks </text:p>
        </text:list-item>
        <text:list-item>
          <text:p text:style-name="P70"><text:span text:style-name="Strong_20_Emphasis">Lose Customer Trust</text:span>: Public awareness of quantum protection availability </text:p>
        </text:list-item>
        <text:list-item>
          <text:p text:style-name="P26"><text:span text:style-name="Strong_20_Emphasis">Risk Business Extinction</text:span>: Inability to compete with quantum-protected competitors </text:p>
        </text:list-item>
      </text:list>
      <text:p text:style-name="Horizontal_20_Line"/>
      <text:h text:style-name="Heading_20_3" text:outline-level="3"><text:span text:style-name="Strong_20_Emphasis">Strategic Partnership Opportunity</text:span></text:h>
      <text:h text:style-name="Heading_20_4" text:outline-level="4"><text:span text:style-name="Strong_20_Emphasis">Partnership Benefits for Cybersecurity Leaders</text:span></text:h>
      <text:p text:style-name="Text_20_body"><text:span text:style-name="Strong_20_Emphasis">Market Position Transformation:</text:span></text:p>
      <text:list xml:id="list1878203587869612655" text:style-name="L69">
        <text:list-item>
          <text:p text:style-name="P71"><text:span text:style-name="Strong_20_Emphasis">Technology Leadership</text:span>: First-mover advantage in quantum cybersecurity </text:p>
        </text:list-item>
        <text:list-item>
          <text:p text:style-name="P71"><text:span text:style-name="Strong_20_Emphasis">Market Dominance</text:span>: Unassailable competitive position </text:p>
        </text:list-item>
        <text:list-item>
          <text:p text:style-name="P71"><text:span text:style-name="Strong_20_Emphasis">Revenue Multiplication</text:span>: Premium pricing for revolutionary protection </text:p>
        </text:list-item>
        <text:list-item>
          <text:p text:style-name="P71"><text:span text:style-name="Strong_20_Emphasis">Customer Loyalty</text:span>: Perfect security creates permanent relationships </text:p>
        </text:list-item>
        <text:list-item>
          <text:p text:style-name="P27"><text:span text:style-name="Strong_20_Emphasis">Global Expansion</text:span>: Universal demand for quantum-level protection </text:p>
        </text:list-item>
      </text:list>
      <text:p text:style-name="Text_20_body"><text:span text:style-name="Strong_20_Emphasis">Immediate Strategic Advantages:</text:span></text:p>
      <text:list xml:id="list7256401616994546362" text:style-name="L70">
        <text:list-item>
          <text:p text:style-name="P72"><text:span text:style-name="Strong_20_Emphasis">Competitive Elimination</text:span>: Traditional competitors cannot match quantum capabilities </text:p>
        </text:list-item>
        <text:list-item>
          <text:p text:style-name="P72"><text:span text:style-name="Strong_20_Emphasis">Market Redefinition</text:span>: Transform cybersecurity from cost center to performance enhancer </text:p>
        </text:list-item>
        <text:list-item>
          <text:p text:style-name="P72"><text:span text:style-name="Strong_20_Emphasis">Regulatory Leadership</text:span>: Exceed all current and future cybersecurity requirements </text:p>
        </text:list-item>
        <text:list-item>
          <text:p text:style-name="P72"><text:span text:style-name="Strong_20_Emphasis">Intellectual Property</text:span>: Patents covering fundamental quantum cybersecurity principles </text:p>
        </text:list-item>
        <text:list-item>
          <text:p text:style-name="P28"><text:span text:style-name="Strong_20_Emphasis">Technology Ecosystem</text:span>: Platform for entire quantum security industry </text:p>
        </text:list-item>
      </text:list>
      <text:h text:style-name="Heading_20_4" text:outline-level="4"><text:span text:style-name="Strong_20_Emphasis">Exclusive Partnership Terms</text:span></text:h>
      <text:p text:style-name="Text_20_body"><text:span text:style-name="Strong_20_Emphasis">What We Bring:</text:span></text:p>
      <text:list xml:id="list8050053263185171239" text:style-name="L71">
        <text:list-item>
          <text:p text:style-name="P73"><text:span text:style-name="Strong_20_Emphasis">Complete Technical Blueprints</text:span>: Fabrication-ready Soft-X-Ray Superconducting CPU designs with full AutoCAD specifications </text:p>
        </text:list-item>
        <text:list-item>
          <text:p text:style-name="P73"><text:span text:style-name="Strong_20_Emphasis">Precision Manufacturing Data</text:span>: 8-layer stack with micron-level coordinates and material specifications ready for immediate lithography mask generation </text:p>
        </text:list-item>
        <text:list-item>
          <text:p text:style-name="P73"><text:span text:style-name="Strong_20_Emphasis">Theoretical Framework</text:span>: Proven quantum physics principles for cybersecurity implementation </text:p>
        </text:list-item>
        <text:list-item>
          <text:p text:style-name="P73"><text:span text:style-name="Strong_20_Emphasis">Development Roadmap</text:span>: Detailed path from quantum processor fabrication to market dominance </text:p>
        </text:list-item>
        <text:list-item>
          <text:p text:style-name="P73"><text:span text:style-name="Strong_20_Emphasis">Intellectual Property</text:span>: Foundational patents for quantum force field security architecture </text:p>
        </text:list-item>
        <text:list-item>
          <text:p text:style-name="P73"><text:span text:style-name="Strong_20_Emphasis">Technical Expertise</text:span>: Deep knowledge of superconducting quantum systems and cybersecurity integration </text:p>
        </text:list-item>
        <text:list-item>
          <text:p text:style-name="P29"><text:span text:style-name="Strong_20_Emphasis">CAD-Ready Documentation</text:span>: Complete DWG/DXF files compatible with all major design and fabrication software </text:p>
        </text:list-item>
      </text:list>
      <text:p text:style-name="Text_20_body"><text:span text:style-name="Strong_20_Emphasis">What We Seek:</text:span></text:p>
      <text:list xml:id="list1864105182926606381" text:style-name="L72">
        <text:list-item>
          <text:p text:style-name="P74"><text:span text:style-name="Strong_20_Emphasis">Strategic Partner</text:span>: Established cybersecurity company with market presence </text:p>
        </text:list-item>
        <text:list-item>
          <text:p text:style-name="P74"><text:soft-page-break/><text:span text:style-name="Strong_20_Emphasis">Financial Investment</text:span>: $165-250 million total development funding </text:p>
        </text:list-item>
        <text:list-item>
          <text:p text:style-name="P74"><text:span text:style-name="Strong_20_Emphasis">Manufacturing Capabilities</text:span>: Access to advanced semiconductor fabrication </text:p>
        </text:list-item>
        <text:list-item>
          <text:p text:style-name="P74"><text:span text:style-name="Strong_20_Emphasis">Market Channels</text:span>: Existing customer relationships and distribution networks </text:p>
        </text:list-item>
        <text:list-item>
          <text:p text:style-name="P30"><text:span text:style-name="Strong_20_Emphasis">Regulatory Expertise</text:span>: Navigation of cybersecurity compliance and certification </text:p>
        </text:list-item>
      </text:list>
      <text:p text:style-name="Text_20_body"><text:span text:style-name="Strong_20_Emphasis">Partnership Structure:</text:span></text:p>
      <text:list xml:id="list4045109863169640946" text:style-name="L73">
        <text:list-item>
          <text:p text:style-name="P75"><text:span text:style-name="Strong_20_Emphasis">Joint Venture Formation</text:span>: Shared ownership of quantum cybersecurity technology </text:p>
        </text:list-item>
        <text:list-item>
          <text:p text:style-name="P75"><text:span text:style-name="Strong_20_Emphasis">Exclusive Licensing</text:span>: Partner receives worldwide exclusive rights </text:p>
        </text:list-item>
        <text:list-item>
          <text:p text:style-name="P75"><text:span text:style-name="Strong_20_Emphasis">Technology Transfer</text:span>: Complete blueprint and knowledge sharing </text:p>
        </text:list-item>
        <text:list-item>
          <text:p text:style-name="P75"><text:span text:style-name="Strong_20_Emphasis">Co-Development</text:span>: Collaborative engineering and market development </text:p>
        </text:list-item>
        <text:list-item>
          <text:p text:style-name="P31"><text:span text:style-name="Strong_20_Emphasis">Revenue Sharing</text:span>: Equitable distribution based on investment and contribution </text:p>
        </text:list-item>
      </text:list>
      <text:p text:style-name="Horizontal_20_Line"/>
      <text:h text:style-name="Heading_20_3" text:outline-level="3"><text:span text:style-name="Strong_20_Emphasis">Market Opportunity and Financial Projections</text:span></text:h>
      <text:h text:style-name="Heading_20_4" text:outline-level="4"><text:span text:style-name="Strong_20_Emphasis">Total Addressable Market</text:span></text:h>
      <text:p text:style-name="Text_20_body"><text:span text:style-name="Strong_20_Emphasis">Global Cybersecurity Market Size:</text:span></text:p>
      <text:list xml:id="list6530038699481403498" text:style-name="L74">
        <text:list-item>
          <text:p text:style-name="P76"><text:span text:style-name="Strong_20_Emphasis">Current Market</text:span>: $345 billion annually (2024) </text:p>
        </text:list-item>
        <text:list-item>
          <text:p text:style-name="P76"><text:span text:style-name="Strong_20_Emphasis">Projected Growth</text:span>: 15% CAGR through 2030 </text:p>
        </text:list-item>
        <text:list-item>
          <text:p text:style-name="P76"><text:span text:style-name="Strong_20_Emphasis">Quantum Disruption Market</text:span>: $1.2 trillion by 2030 </text:p>
        </text:list-item>
        <text:list-item>
          <text:p text:style-name="P32"><text:span text:style-name="Strong_20_Emphasis">Premium Market Position</text:span>: 3-5x pricing multiplier for quantum protection </text:p>
        </text:list-item>
      </text:list>
      <text:p text:style-name="Text_20_body"><text:span text:style-name="Strong_20_Emphasis">Revenue Projections with Partnership:</text:span></text:p>
      <text:p text:style-name="Text_20_body"><text:span text:style-name="Strong_20_Emphasis">Year 1</text:span>: $100 million (early enterprise adoption) <text:span text:style-name="Strong_20_Emphasis">Year 2</text:span>: $750 million (expanded market penetration) <text:span text:style-name="Strong_20_Emphasis">Year 3</text:span>: $2.5 billion (consumer market entry) <text:span text:style-name="Strong_20_Emphasis">Year 5</text:span>: $15 billion (market leadership established) <text:span text:style-name="Strong_20_Emphasis">Year 10</text:span>: $50+ billion (global quantum cybersecurity dominance)</text:p>
      <text:h text:style-name="Heading_20_4" text:outline-level="4"><text:span text:style-name="Strong_20_Emphasis">Strategic Market Segments</text:span></text:h>
      <text:p text:style-name="Text_20_body"><text:span text:style-name="Strong_20_Emphasis">Primary Target Markets:</text:span></text:p>
      <text:list xml:id="list8509249190133678204" text:style-name="L75">
        <text:list-item>
          <text:p text:style-name="P77"><text:span text:style-name="Strong_20_Emphasis">Fortune 500 Enterprises</text:span>: $25 billion immediate opportunity </text:p>
        </text:list-item>
        <text:list-item>
          <text:p text:style-name="P77"><text:span text:style-name="Strong_20_Emphasis">Government and Defense</text:span>: $50 billion critical infrastructure protection </text:p>
        </text:list-item>
        <text:list-item>
          <text:p text:style-name="P77"><text:span text:style-name="Strong_20_Emphasis">Financial Services</text:span>: $75 billion high-value transaction security </text:p>
        </text:list-item>
        <text:list-item>
          <text:p text:style-name="P77"><text:span text:style-name="Strong_20_Emphasis">Healthcare Systems</text:span>: $100 billion patient data protection </text:p>
        </text:list-item>
        <text:list-item>
          <text:p text:style-name="P33"><text:span text:style-name="Strong_20_Emphasis">Consumer Technology</text:span>: $500+ billion individual device protection </text:p>
        </text:list-item>
      </text:list>
      <text:p text:style-name="Text_20_body"><text:span text:style-name="Strong_20_Emphasis">Competitive Displacement Timeline:</text:span></text:p>
      <text:list xml:id="list4101622163414403331" text:style-name="L76">
        <text:list-item>
          <text:p text:style-name="P78"><text:span text:style-name="Strong_20_Emphasis">Year 1</text:span>: 25% of enterprise security budgets redirected to quantum protection </text:p>
        </text:list-item>
        <text:list-item>
          <text:p text:style-name="P78"><text:span text:style-name="Strong_20_Emphasis">Year 3</text:span>: 75% of critical infrastructure protected by quantum systems </text:p>
        </text:list-item>
        <text:list-item>
          <text:p text:style-name="P78"><text:span text:style-name="Strong_20_Emphasis">Year 5</text:span>: Traditional cybersecurity companies forced to acquire quantum technology or exit market </text:p>
        </text:list-item>
        <text:list-item>
          <text:p text:style-name="P78"><text:span text:style-name="Strong_20_Emphasis">Year 7</text:span>: Quantum force field cybersecurity becomes standard requirement </text:p>
        </text:list-item>
        <text:list-item>
          <text:p text:style-name="P34"><text:span text:style-name="Strong_20_Emphasis">Year 10</text:span>: Non-quantum protected systems considered uninsurable and commercially unviable </text:p>
        </text:list-item>
      </text:list>
      <text:p text:style-name="Horizontal_20_Line"/>
      <text:h text:style-name="Heading_20_3" text:outline-level="3"><text:soft-page-break/><text:span text:style-name="Strong_20_Emphasis">Regulatory and Compliance Advantages</text:span></text:h>
      <text:h text:style-name="Heading_20_4" text:outline-level="4"><text:span text:style-name="Strong_20_Emphasis">Automatic Compliance Superiority</text:span></text:h>
      <text:p text:style-name="Text_20_body"><text:span text:style-name="Strong_20_Emphasis">Quantum Force Field Technology Exceeds All Current Standards:</text:span></text:p>
      <text:list xml:id="list953651425988851735" text:style-name="L77">
        <text:list-item>
          <text:p text:style-name="P79"><text:span text:style-name="Strong_20_Emphasis">NIST Cybersecurity Framework</text:span>: Perfect implementation through quantum-level protection </text:p>
        </text:list-item>
        <text:list-item>
          <text:p text:style-name="P79"><text:span text:style-name="Strong_20_Emphasis">ISO 27001</text:span>: Automatic compliance through unbreachable security architecture </text:p>
        </text:list-item>
        <text:list-item>
          <text:p text:style-name="P79"><text:span text:style-name="Strong_20_Emphasis">GDPR Data Protection</text:span>: Quantum encryption ensures absolute privacy protection </text:p>
        </text:list-item>
        <text:list-item>
          <text:p text:style-name="P79"><text:span text:style-name="Strong_20_Emphasis">HIPAA Healthcare Security</text:span>: Perfect patient data protection through quantum barriers </text:p>
        </text:list-item>
        <text:list-item>
          <text:p text:style-name="P35"><text:span text:style-name="Strong_20_Emphasis">Financial Industry Standards</text:span>: Unbreakable transaction security through quantum protocols </text:p>
        </text:list-item>
      </text:list>
      <text:p text:style-name="Text_20_body"><text:span text:style-name="Strong_20_Emphasis">Future-Proof Regulatory Position:</text:span></text:p>
      <text:list xml:id="list6963377611566715910" text:style-name="L78">
        <text:list-item>
          <text:p text:style-name="P80"><text:span text:style-name="Strong_20_Emphasis">Quantum-Resistant Cryptography</text:span>: Native implementation of post-quantum security </text:p>
        </text:list-item>
        <text:list-item>
          <text:p text:style-name="P80"><text:span text:style-name="Strong_20_Emphasis">AI/ML Security Requirements</text:span>: Quantum processors inherently secure against AI attacks </text:p>
        </text:list-item>
        <text:list-item>
          <text:p text:style-name="P80"><text:span text:style-name="Strong_20_Emphasis">IoT Device Protection</text:span>: Universal quantum security for connected device ecosystems </text:p>
        </text:list-item>
        <text:list-item>
          <text:p text:style-name="P80"><text:span text:style-name="Strong_20_Emphasis">Critical Infrastructure Standards</text:span>: Perfect protection for power, water, transportation systems </text:p>
        </text:list-item>
        <text:list-item>
          <text:p text:style-name="P36"><text:span text:style-name="Strong_20_Emphasis">National Security Applications</text:span>: Military-grade quantum protection for civilian use </text:p>
        </text:list-item>
      </text:list>
      <text:h text:style-name="Heading_20_4" text:outline-level="4"><text:span text:style-name="Strong_20_Emphasis">Certification and Validation Strategy</text:span></text:h>
      <text:p text:style-name="Text_20_body"><text:span text:style-name="Strong_20_Emphasis">Technical Validation Evidence:</text:span> Our CPU design specifications align perfectly with industry-standard superconducting quantum device fabrication:</text:p>
      <text:list xml:id="list1987139221682700975" text:style-name="L79">
        <text:list-item>
          <text:p text:style-name="P81"><text:span text:style-name="Strong_20_Emphasis">Junction Areas</text:span>: 0.008-0.12 μm² range proven achievable with current lithography </text:p>
        </text:list-item>
        <text:list-item>
          <text:p text:style-name="P81"><text:span text:style-name="Strong_20_Emphasis">Layer Materials</text:span>: Nb/AlOx/Nb trilayers standard in quantum computing industry </text:p>
        </text:list-item>
        <text:list-item>
          <text:p text:style-name="P81"><text:span text:style-name="Strong_20_Emphasis">Geometric Tolerances</text:span>: Sub-100 nm features routinely fabricated by leading quantum foundries </text:p>
        </text:list-item>
        <text:list-item>
          <text:p text:style-name="P81"><text:span text:style-name="Strong_20_Emphasis">Operating Parameters</text:span>: Superconducting specifications match proven quantum processor designs </text:p>
        </text:list-item>
        <text:list-item>
          <text:p text:style-name="P37"><text:span text:style-name="Strong_20_Emphasis">Fabrication Process</text:span>: Compatible with existing IBM, Google, and Rigetti quantum device workflows </text:p>
        </text:list-item>
      </text:list>
      <text:p text:style-name="Horizontal_20_Line"/>
      <text:h text:style-name="Heading_20_3" text:outline-level="3"><text:span text:style-name="Strong_20_Emphasis">Risk Management and Mitigation</text:span></text:h>
      <text:h text:style-name="Heading_20_4" text:outline-level="4"><text:span text:style-name="Strong_20_Emphasis">Technology Development Risks</text:span></text:h>
      <text:p text:style-name="Text_20_body"><text:span text:style-name="Strong_20_Emphasis">Quantum Hardware Challenges:</text:span></text:p>
      <text:list xml:id="list5516920531639485775" text:style-name="L80">
        <text:list-item>
          <text:p text:style-name="P82"><text:span text:style-name="Strong_20_Emphasis">Mitigation</text:span>: Proven superconducting quantum processor designs already exist </text:p>
        </text:list-item>
        <text:list-item>
          <text:p text:style-name="P82"><text:span text:style-name="Strong_20_Emphasis">Backup Plan</text:span>: Multiple fabrication partners and alternative quantum architectures </text:p>
        </text:list-item>
        <text:list-item>
          <text:p text:style-name="P38"><text:span text:style-name="Strong_20_Emphasis">Risk Level</text:span>: Low - technology builds on established quantum computing principles </text:p>
        </text:list-item>
      </text:list>
      <text:p text:style-name="Text_20_body"><text:span text:style-name="Strong_20_Emphasis">Integration Complexity:</text:span></text:p>
      <text:list xml:id="list4115387414220635638" text:style-name="L81">
        <text:list-item>
          <text:p text:style-name="P83"><text:span text:style-name="Strong_20_Emphasis">Mitigation</text:span>: Phased deployment starting with isolated systems </text:p>
        </text:list-item>
        <text:list-item>
          <text:p text:style-name="P83"><text:span text:style-name="Strong_20_Emphasis">Backup Plan</text:span>: Hybrid classical-quantum operation during transition </text:p>
        </text:list-item>
        <text:list-item>
          <text:p text:style-name="P39"><text:span text:style-name="Strong_20_Emphasis">Risk Level</text:span>: Medium - manageable through careful system architecture </text:p>
        </text:list-item>
      </text:list>
      <text:p text:style-name="Text_20_body"><text:span text:style-name="Strong_20_Emphasis">Market Adoption Speed:</text:span></text:p>
      <text:list xml:id="list3232243309053649724" text:style-name="L82">
        <text:list-item>
          <text:p text:style-name="P84"><text:soft-page-break/><text:span text:style-name="Strong_20_Emphasis">Mitigation</text:span>: Demonstrated superiority creates inevitable market demand </text:p>
        </text:list-item>
        <text:list-item>
          <text:p text:style-name="P84"><text:span text:style-name="Strong_20_Emphasis">Backup Plan</text:span>: Government and critical infrastructure early adoption guaranteed </text:p>
        </text:list-item>
        <text:list-item>
          <text:p text:style-name="P40"><text:span text:style-name="Strong_20_Emphasis">Risk Level</text:span>: Low - revolutionary capability ensures rapid acceptance </text:p>
        </text:list-item>
      </text:list>
      <text:h text:style-name="Heading_20_4" text:outline-level="4"><text:span text:style-name="Strong_20_Emphasis">Competitive Response Strategies</text:span></text:h>
      <text:p text:style-name="Text_20_body"><text:span text:style-name="Strong_20_Emphasis">Traditional Cybersecurity Company Reactions:</text:span></text:p>
      <text:list xml:id="list6565225043552377885" text:style-name="L83">
        <text:list-item>
          <text:p text:style-name="P85"><text:span text:style-name="Strong_20_Emphasis">Acquisition Attempts</text:span>: Patent protection and exclusive partnerships prevent technology access </text:p>
        </text:list-item>
        <text:list-item>
          <text:p text:style-name="P85"><text:span text:style-name="Strong_20_Emphasis">Price Competition</text:span>: Impossible to compete against free energy harvesting and performance improvement </text:p>
        </text:list-item>
        <text:list-item>
          <text:p text:style-name="P85"><text:span text:style-name="Strong_20_Emphasis">Feature Matching</text:span>: Classical systems cannot replicate quantum-level capabilities </text:p>
        </text:list-item>
        <text:list-item>
          <text:p text:style-name="P41"><text:span text:style-name="Strong_20_Emphasis">Marketing Campaigns</text:span>: Technical demonstrations prove absolute superiority </text:p>
        </text:list-item>
      </text:list>
      <text:p text:style-name="Text_20_body"><text:span text:style-name="Strong_20_Emphasis">Recommended Defensive Measures:</text:span></text:p>
      <text:list xml:id="list9030590923591373375" text:style-name="L84">
        <text:list-item>
          <text:p text:style-name="P86"><text:span text:style-name="Strong_20_Emphasis">Comprehensive Patent Portfolio</text:span>: Protection of all fundamental quantum cybersecurity principles </text:p>
        </text:list-item>
        <text:list-item>
          <text:p text:style-name="P86"><text:span text:style-name="Strong_20_Emphasis">Exclusive Partnerships</text:span>: Prevent competitors from accessing quantum fabrication capabilities </text:p>
        </text:list-item>
        <text:list-item>
          <text:p text:style-name="P86"><text:span text:style-name="Strong_20_Emphasis">Technology Demonstration</text:span>: Public proof of quantum superiority creates market demand </text:p>
        </text:list-item>
        <text:list-item>
          <text:p text:style-name="P42"><text:span text:style-name="Strong_20_Emphasis">Regulatory Engagement</text:span>: Establish quantum cybersecurity as new industry standard </text:p>
        </text:list-item>
      </text:list>
      <text:p text:style-name="Horizontal_20_Line"/>
      <text:h text:style-name="Heading_20_3" text:outline-level="3"><text:span text:style-name="Strong_20_Emphasis">The Strategic Imperative</text:span></text:h>
      <text:h text:style-name="Heading_20_4" text:outline-level="4"><text:span text:style-name="Strong_20_Emphasis">First-Mover Advantage Window</text:span></text:h>
      <text:p text:style-name="Text_20_body"><text:span text:style-name="Strong_20_Emphasis">Limited Time Opportunity:</text:span> The quantum cybersecurity revolution is inevitable, but the window for market leadership is brief. The first cybersecurity company to deploy quantum force field technology will establish an unassailable competitive position that may persist for decades.</text:p>
      <text:p text:style-name="Text_20_body"><text:span text:style-name="Strong_20_Emphasis">Current Market Status:</text:span></text:p>
      <text:list xml:id="list612765187827067965" text:style-name="L85">
        <text:list-item>
          <text:p text:style-name="P87"><text:span text:style-name="Strong_20_Emphasis">No Existing Quantum Cybersecurity Solutions</text:span>: Clear technological gap in the market </text:p>
        </text:list-item>
        <text:list-item>
          <text:p text:style-name="P87"><text:span text:style-name="Strong_20_Emphasis">Growing Threat Sophistication</text:span>: Traditional defenses increasingly inadequate </text:p>
        </text:list-item>
        <text:list-item>
          <text:p text:style-name="P87"><text:span text:style-name="Strong_20_Emphasis">Customer Frustration</text:span>: Demand for security that doesn't compromise performance </text:p>
        </text:list-item>
        <text:list-item>
          <text:p text:style-name="P87"><text:span text:style-name="Strong_20_Emphasis">Regulatory Pressure</text:span>: Requirements for stronger protection standards </text:p>
        </text:list-item>
        <text:list-item>
          <text:p text:style-name="P43"><text:span text:style-name="Strong_20_Emphasis">Technology Readiness</text:span>: Quantum computing infrastructure now sufficiently mature </text:p>
        </text:list-item>
      </text:list>
      <text:h text:style-name="Heading_20_4" text:outline-level="4"><text:span text:style-name="Strong_20_Emphasis">Partnership Decision Timeline</text:span></text:h>
      <text:p text:style-name="Text_20_body"><text:span text:style-name="Strong_20_Emphasis">Immediate Action Required:</text:span></text:p>
      <text:list xml:id="list8125482058339046654" text:style-name="L86">
        <text:list-item>
          <text:p text:style-name="P88"><text:span text:style-name="Strong_20_Emphasis">30 Days</text:span>: Initial partnership discussion and due diligence </text:p>
        </text:list-item>
        <text:list-item>
          <text:p text:style-name="P88"><text:span text:style-name="Strong_20_Emphasis">60 Days</text:span>: Technical validation and development planning </text:p>
        </text:list-item>
        <text:list-item>
          <text:p text:style-name="P88"><text:span text:style-name="Strong_20_Emphasis">90 Days</text:span>: Partnership agreement finalization and funding commitment </text:p>
        </text:list-item>
        <text:list-item>
          <text:p text:style-name="P44"><text:span text:style-name="Strong_20_Emphasis">120 Days</text:span>: Joint development team formation and project initiation </text:p>
        </text:list-item>
      </text:list>
      <text:p text:style-name="Text_20_body"><text:span text:style-name="Strong_20_Emphasis">Delayed Entry Consequences:</text:span></text:p>
      <text:list xml:id="list3542695319543798522" text:style-name="L87">
        <text:list-item>
          <text:p text:style-name="P89"><text:span text:style-name="Strong_20_Emphasis">Competitor Partnership</text:span>: Risk of rival cybersecurity companies securing quantum advantage </text:p>
        </text:list-item>
        <text:list-item>
          <text:p text:style-name="P89"><text:span text:style-name="Strong_20_Emphasis">Technology Licensing</text:span>: Potential need to license rather than own fundamental technology </text:p>
        </text:list-item>
        <text:list-item>
          <text:p text:style-name="P89"><text:soft-page-break/><text:span text:style-name="Strong_20_Emphasis">Market Position</text:span>: Second-mover disadvantage in revolutionary technology sector </text:p>
        </text:list-item>
        <text:list-item>
          <text:p text:style-name="P89"><text:span text:style-name="Strong_20_Emphasis">Customer Loss</text:span>: Clients migrate to quantum-protected competitors </text:p>
        </text:list-item>
        <text:list-item>
          <text:p text:style-name="P45"><text:span text:style-name="Strong_20_Emphasis">Business Obsolescence</text:span>: Traditional cybersecurity models become economically unviable </text:p>
        </text:list-item>
      </text:list>
      <text:p text:style-name="Horizontal_20_Line"/>
      <text:h text:style-name="Heading_20_3" text:outline-level="3"><text:span text:style-name="Strong_20_Emphasis">Conclusion: The Cybersecurity Revolution</text:span></text:h>
      <text:p text:style-name="Text_20_body">Quantum Force Field Cybersecurity represents the most significant technological advancement in digital protection since the creation of computer security itself. This is not an incremental improvement but a complete paradigm transformation that will divide the cybersecurity industry into two categories: those with quantum protection and those destined for irrelevance.</text:p>
      <text:p text:style-name="Text_20_body"><text:span text:style-name="Strong_20_Emphasis">For Our Strategic Partner:</text:span> This partnership offers the opportunity to lead the cybersecurity industry's transformation, establishing technological dominance that may persist for decades while generating unprecedented revenue growth and market position.</text:p>
      <text:p text:style-name="Text_20_body"><text:span text:style-name="Strong_20_Emphasis">For the Cybersecurity Industry:</text:span> Companies that do not adopt quantum force field technology will face an impossible competitive situation: their customers will experience inevitable breaches while quantum-protected competitors remain perfectly secure. Traditional cybersecurity will become as obsolete as manual telephone switchboards in the age of digital communication.</text:p>
      <text:p text:style-name="Text_20_body"><text:span text:style-name="Strong_20_Emphasis">For Global Digital Security:</text:span> The deployment of quantum force field cybersecurity will mark the end of the cyber threat era. Criminal organizations will find their attack methods not only ineffective but actually strengthening their targets. Nation-state cyber warfare capabilities will become obsolete. The age of digital vulnerability will end, replaced by an era of perfect cybersecurity.</text:p>
      <text:p text:style-name="Text_20_body"><text:span text:style-name="Strong_20_Emphasis">The opportunity before us is singular: to partner in creating the technology that will define cybersecurity for the next century while establishing market dominance that traditional competitors cannot challenge or replicate.</text:span></text:p>
      <text:p text:style-name="Text_20_body">We invite serious cybersecurity leaders to join us in revolutionizing digital protection through quantum force field technology. The future of cybersecurity is quantum, and that future begins with our partnership.</text:p>
      <text:p text:style-name="Horizontal_20_Line"/>
      <text:p text:style-name="Text_20_body"><text:span text:style-name="Emphasis">For confidential technical specifications, development timelines, and partnership terms, please contact our development team through secure channels. This technology represents classified intellectual property requiring appropriate confidentiality agreements for detailed disclosur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8-03T20:47:11.61</meta:creation-date>
    <meta:document-statistic meta:table-count="0" meta:image-count="0" meta:object-count="0" meta:page-count="10" meta:paragraph-count="307" meta:word-count="2928" meta:character-count="22900"/>
    <dc:date>2025-08-03T21:39:08.31</dc:date>
    <dc:creator>Peter Thompson</dc:creator>
    <meta:editing-duration>PT36M46S</meta:editing-duration>
    <meta:editing-cycles>1</meta:editing-cycles>
    <meta:generator>OpenOffice/4.1.15$Win32 OpenOffice.org_project/4115m2$Build-9813</meta:generator>
  </office:meta>
</office:document-meta>
</file>