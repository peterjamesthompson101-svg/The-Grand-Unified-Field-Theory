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's a fixed version that properly analyzes data for GHz frequency patterns:</text:p>
      <text:p text:style-name="Text_20_body">cpp</text:p>
      <text:p text:style-name="Preformatted_20_Text">#include &lt;vector&gt;</text:p>
      <text:p text:style-name="Preformatted_20_Text">#include &lt;algorithm&gt;</text:p>
      <text:p text:style-name="Preformatted_20_Text">#include &lt;cmath&gt;</text:p>
      <text:p text:style-name="Preformatted_20_Text">#include &lt;cstdint&gt;</text:p>
      <text:p text:style-name="Preformatted_20_Text"/>
      <text:p text:style-name="Preformatted_20_Text">double performGHzAnalysis(const std::vector&lt;uint8_t&gt;&amp; data) {</text:p>
      <text:p text:style-name="Preformatted_20_Text"><text:s text:c="4"/>if (data.size() &lt; 512) return 0.1;</text:p>
      <text:p text:style-name="Preformatted_20_Text"><text:s text:c="4"/></text:p>
      <text:p text:style-name="Preformatted_20_Text"><text:s text:c="4"/>// Look for patterns indicating GHz frequency signals</text:p>
      <text:p text:style-name="Preformatted_20_Text"><text:s text:c="4"/>// Common GHz signal patterns in digital systems often show:</text:p>
      <text:p text:style-name="Preformatted_20_Text"><text:s text:c="4"/>// - Rapid transitions (0/1 alternation)</text:p>
      <text:p text:style-name="Preformatted_20_Text"><text:s text:c="4"/>// - Specific periodic sequences</text:p>
      <text:p text:style-name="Preformatted_20_Text"><text:s text:c="4"/>// - High frequency clock patterns</text:p>
      <text:p text:style-name="Preformatted_20_Text"><text:s text:c="4"/></text:p>
      <text:p text:style-name="Preformatted_20_Text"><text:s text:c="4"/>double ghz_score = 0.0;</text:p>
      <text:p text:style-name="Preformatted_20_Text"><text:s text:c="4"/></text:p>
      <text:p text:style-name="Preformatted_20_Text"><text:s text:c="4"/>// Check 1: High frequency transitions (many 0/1 changes)</text:p>
      <text:p text:style-name="Preformatted_20_Text"><text:s text:c="4"/>int transitions = 0;</text:p>
      <text:p text:style-name="Preformatted_20_Text"><text:s text:c="4"/>for (size_t i = 1; i &lt; data.size(); ++i) {</text:p>
      <text:p text:style-name="Preformatted_20_Text"><text:s text:c="8"/>// Count bit transitions between consecutive bytes</text:p>
      <text:p text:style-name="Preformatted_20_Text"><text:s text:c="8"/>uint8_t xor_result = data[i] ^ data[i-1];</text:p>
      <text:p text:style-name="Preformatted_20_Text"><text:s text:c="8"/>while (xor_result) {</text:p>
      <text:p text:style-name="Preformatted_20_Text"><text:s text:c="12"/>transitions += (xor_result &amp; 1);</text:p>
      <text:p text:style-name="Preformatted_20_Text"><text:s text:c="12"/>xor_result &gt;&gt;= 1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// Normalize transition count (empirical threshold)</text:p>
      <text:p text:style-name="Preformatted_20_Text"><text:s text:c="4"/>double transition_ratio = static_cast&lt;double&gt;(transitions) / (data.size() * 8);</text:p>
      <text:p text:style-name="Preformatted_20_Text"><text:s text:c="4"/>if (transition_ratio &gt; 0.4) { <text:s/>// High transition rate suggests high frequency</text:p>
      <text:p text:style-name="Preformatted_20_Text"><text:s text:c="8"/>ghz_score += 0.3;</text:p>
      <text:p text:style-name="Preformatted_20_Text"><text:s text:c="4"/>}</text:p>
      <text:p text:style-name="Preformatted_20_Text"><text:s text:c="4"/></text:p>
      <text:p text:style-name="Preformatted_20_Text"><text:s text:c="4"/>// Check 2: Look for common GHz clock patterns</text:p>
      <text:p text:style-name="Preformatted_20_Text"><text:s text:c="4"/>// Example: 01010101 (0x55) or 10101010 (0xAA) repeating</text:p>
      <text:p text:style-name="Preformatted_20_Text"><text:s text:c="4"/>std::vector&lt;uint8_t&gt; clock_patterns = {0x55, 0xAA, 0x33, 0xCC}; <text:s/>// Common clock signals</text:p>
      <text:p text:style-name="Preformatted_20_Text"><text:s text:c="4"/>int pattern_matches = 0;</text:p>
      <text:p text:style-name="Preformatted_20_Text"><text:s text:c="4"/></text:p>
      <text:p text:style-name="Preformatted_20_Text"><text:s text:c="4"/>for (const auto&amp; pattern : clock_patterns) {</text:p>
      <text:p text:style-name="Preformatted_20_Text"><text:s text:c="8"/>int count = 0;</text:p>
      <text:p text:style-name="Preformatted_20_Text"><text:s text:c="8"/>for (size_t i = 0; i &lt; data.size(); ++i) {</text:p>
      <text:p text:style-name="Preformatted_20_Text"><text:s text:c="12"/>if (data[i] == pattern) {</text:p>
      <text:p text:style-name="Preformatted_20_Text"><text:s text:c="16"/>count++;</text:p>
      <text:p text:style-name="Preformatted_20_Text"><text:s text:c="12"/>}</text:p>
      <text:p text:style-name="Preformatted_20_Text"><text:s text:c="8"/>}</text:p>
      <text:p text:style-name="Preformatted_20_Text"><text:s text:c="8"/>double pattern_ratio = static_cast&lt;double&gt;(count) / data.size();</text:p>
      <text:p text:style-name="Preformatted_20_Text"><text:s text:c="8"/>if (pattern_ratio &gt; 0.2) { <text:s/>// Significant presence of clock pattern</text:p>
      <text:p text:style-name="Preformatted_20_Text"><text:s text:c="12"/>pattern_matches++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if (pattern_matches &gt;= 2) {</text:p>
      <text:p text:style-name="Preformatted_20_Text"><text:s text:c="8"/>ghz_score += 0.3;</text:p>
      <text:p text:style-name="Preformatted_20_Text"><text:s text:c="4"/>}</text:p>
      <text:p text:style-name="Preformatted_20_Text"><text:s text:c="4"/></text:p>
      <text:p text:style-name="Preformatted_20_Text"><text:s text:c="4"/>// Check 3: Periodicity detection using autocorrelation</text:p>
      <text:p text:style-name="Preformatted_20_Text"><text:s text:c="4"/>const int max_lag = 16; <text:s/>// Check for short-term periodicity</text:p>
      <text:p text:style-name="Preformatted_20_Text"><text:soft-page-break/><text:s text:c="4"/>int periodic_score = 0;</text:p>
      <text:p text:style-name="Preformatted_20_Text"><text:s text:c="4"/></text:p>
      <text:p text:style-name="Preformatted_20_Text"><text:s text:c="4"/>for (int lag = 1; lag &lt;= max_lag; ++lag) {</text:p>
      <text:p text:style-name="Preformatted_20_Text"><text:s text:c="8"/>int matches = 0;</text:p>
      <text:p text:style-name="Preformatted_20_Text"><text:s text:c="8"/>int comparisons = 0;</text:p>
      <text:p text:style-name="Preformatted_20_Text"><text:s text:c="8"/></text:p>
      <text:p text:style-name="Preformatted_20_Text"><text:s text:c="8"/>for (size_t i = 0; i + lag &lt; data.size() &amp;&amp; i &lt; 100; ++i) { <text:s/>// Sample first 100 bytes</text:p>
      <text:p text:style-name="Preformatted_20_Text"><text:s text:c="12"/>if (data[i] == data[i + lag]) {</text:p>
      <text:p text:style-name="Preformatted_20_Text"><text:s text:c="16"/>matches++;</text:p>
      <text:p text:style-name="Preformatted_20_Text"><text:s text:c="12"/>}</text:p>
      <text:p text:style-name="Preformatted_20_Text"><text:s text:c="12"/>comparisons++;</text:p>
      <text:p text:style-name="Preformatted_20_Text"><text:s text:c="8"/>}</text:p>
      <text:p text:style-name="Preformatted_20_Text"><text:s text:c="8"/></text:p>
      <text:p text:style-name="Preformatted_20_Text"><text:s text:c="8"/>if (comparisons &gt; 0) {</text:p>
      <text:p text:style-name="Preformatted_20_Text"><text:s text:c="12"/>double correlation = static_cast&lt;double&gt;(matches) / comparisons;</text:p>
      <text:p text:style-name="Preformatted_20_Text"><text:s text:c="12"/>if (correlation &gt; 0.7) { <text:s/>// Strong correlation at this lag</text:p>
      <text:p text:style-name="Preformatted_20_Text"><text:s text:c="16"/>periodic_score++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if (periodic_score &gt; 0) {</text:p>
      <text:p text:style-name="Preformatted_20_Text"><text:s text:c="8"/>ghz_score += 0.2;</text:p>
      <text:p text:style-name="Preformatted_20_Text"><text:s text:c="4"/>}</text:p>
      <text:p text:style-name="Preformatted_20_Text"><text:s text:c="4"/></text:p>
      <text:p text:style-name="Preformatted_20_Text"><text:s text:c="4"/>// Check 4: High frequency preamble patterns (common in RF/GHz communications)</text:p>
      <text:p text:style-name="Preformatted_20_Text"><text:s text:c="4"/>std::vector&lt;uint8_t&gt; preamble_pattern = {0xAA, 0xAA, 0xAA, 0xAA}; <text:s/>// Common preamble</text:p>
      <text:p text:style-name="Preformatted_20_Text"><text:s text:c="4"/>int preamble_matches = 0;</text:p>
      <text:p text:style-name="Preformatted_20_Text"><text:s text:c="4"/></text:p>
      <text:p text:style-name="Preformatted_20_Text"><text:s text:c="4"/>for (size_t i = 0; i &lt;= data.size() - preamble_pattern.size(); ++i) {</text:p>
      <text:p text:style-name="Preformatted_20_Text"><text:s text:c="8"/>bool match = true;</text:p>
      <text:p text:style-name="Preformatted_20_Text"><text:s text:c="8"/>for (size_t j = 0; j &lt; preamble_pattern.size(); ++j) {</text:p>
      <text:p text:style-name="Preformatted_20_Text"><text:s text:c="12"/>if (data[i + j] != preamble_pattern[j]) {</text:p>
      <text:p text:style-name="Preformatted_20_Text"><text:s text:c="16"/>match = false;</text:p>
      <text:p text:style-name="Preformatted_20_Text"><text:s text:c="16"/>break;</text:p>
      <text:p text:style-name="Preformatted_20_Text"><text:s text:c="12"/>}</text:p>
      <text:p text:style-name="Preformatted_20_Text"><text:s text:c="8"/>}</text:p>
      <text:p text:style-name="Preformatted_20_Text"><text:s text:c="8"/>if (match) {</text:p>
      <text:p text:style-name="Preformatted_20_Text"><text:s text:c="12"/>preamble_matches++;</text:p>
      <text:p text:style-name="Preformatted_20_Text"><text:s text:c="12"/>i += preamble_pattern.size() - 1; <text:s/>// Skip ahead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if (preamble_matches &gt; 0) {</text:p>
      <text:p text:style-name="Preformatted_20_Text"><text:s text:c="8"/>ghz_score += 0.2;</text:p>
      <text:p text:style-name="Preformatted_20_Text"><text:s text:c="4"/>}</text:p>
      <text:p text:style-name="Preformatted_20_Text"><text:s text:c="4"/></text:p>
      <text:p text:style-name="Preformatted_20_Text"><text:s text:c="4"/>// Ensure score is between 0.0 and 1.0</text:p>
      <text:p text:style-name="Preformatted_20_Text"><text:s text:c="4"/>return std::max(0.0, std::min(1.0, ghz_score));</text:p>
      <text:p text:style-name="P2">}</text:p>
      <text:p text:style-name="Text_20_body">Key changes made:</text:p>
      <text:list xml:id="list2750083492460693214" text:style-name="L1">
        <text:list-item>
          <text:p text:style-name="P1"><text:span text:style-name="Strong_20_Emphasis">Fixed invalid hex literals</text:span> - replaced with valid hex values</text:p>
        </text:list-item>
        <text:list-item>
          <text:p text:style-name="P1"><text:span text:style-name="Strong_20_Emphasis">Added actual frequency analysis</text:span> instead of simple pattern matching:</text:p>
          <text:list>
            <text:list-item>
              <text:p text:style-name="P1"><text:span text:style-name="Strong_20_Emphasis">Transition counting</text:span>: High-frequency signals often have many 0/1 transitions</text:p>
            </text:list-item>
            <text:list-item>
              <text:p text:style-name="P1"><text:span text:style-name="Strong_20_Emphasis">Clock pattern detection</text:span>: GHz signals often use specific clock patterns</text:p>
            </text:list-item>
            <text:list-item>
              <text:p text:style-name="P1"><text:soft-page-break/><text:span text:style-name="Strong_20_Emphasis">Periodicity analysis</text:span>: Uses autocorrelation to detect repeating patterns</text:p>
            </text:list-item>
            <text:list-item>
              <text:p text:style-name="P1"><text:span text:style-name="Strong_20_Emphasis">Preamble detection</text:span>: Common in RF/GHz communication protocols</text:p>
            </text:list-item>
          </text:list>
        </text:list-item>
        <text:list-item>
          <text:p text:style-name="P1"><text:span text:style-name="Strong_20_Emphasis">Proper scoring system</text:span>: Multiple factors contribute to the GHz score</text:p>
        </text:list-item>
        <text:list-item>
          <text:p text:style-name="P1"><text:span text:style-name="Strong_20_Emphasis">Bounds checking</text:span>: Ensures return value is always between 0.0 and 1.0</text:p>
        </text:list-item>
        <text:list-item>
          <text:p text:style-name="P1"><text:span text:style-name="Strong_20_Emphasis">More realistic thresholds</text:span>: Based on typical GHz signal characteristics</text:p>
        </text:list-item>
      </text:list>
      <text:p text:style-name="Text_20_body">The function now analyzes the data for characteristics typical of GHz-frequency signals rather than just looking for a fixed pattern. You might need to adjust the thresholds and patterns based on your specific application and the actual characteristics of the GHz signals you're trying to detec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0T14:17:30.43</meta:creation-date>
    <meta:document-statistic meta:table-count="0" meta:image-count="0" meta:object-count="0" meta:page-count="3" meta:paragraph-count="119" meta:word-count="587" meta:character-count="4334"/>
    <dc:date>2025-12-10T14:18:45.69</dc:date>
    <dc:creator>Peter Thompson</dc:creator>
    <meta:editing-duration>PT1M16S</meta:editing-duration>
    <meta:editing-cycles>1</meta:editing-cycles>
    <meta:generator>OpenOffice/4.1.15$Win32 OpenOffice.org_project/4115m2$Build-9813</meta:generator>
  </office:meta>
</office:document-meta>
</file>