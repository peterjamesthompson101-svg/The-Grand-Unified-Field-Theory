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o make this function work properly in a real-world context, you'll need to integrate it with actual threat intelligence data structures and add proper error handling. Here's an improved version:</text:p>
      <text:p text:style-name="Text_20_body">cpp</text:p>
      <text:p text:style-name="Preformatted_20_Text">// Assuming ThreatIntelligence class is defined elsewhere</text:p>
      <text:p text:style-name="Preformatted_20_Text">class ThreatIntelligence {</text:p>
      <text:p text:style-name="Preformatted_20_Text">public:</text:p>
      <text:p text:style-name="Preformatted_20_Text"><text:s text:c="4"/>bool hasHighFrequencyAttackPatterns() const {</text:p>
      <text:p text:style-name="Preformatted_20_Text"><text:s text:c="8"/>// Implementation would check for patterns like DDoS, rapid scanning, etc.</text:p>
      <text:p text:style-name="Preformatted_20_Text"><text:s text:c="8"/>return high_frequency_patterns_detected;</text:p>
      <text:p text:style-name="Preformatted_20_Text"><text:s text:c="4"/>}</text:p>
      <text:p text:style-name="Preformatted_20_Text"><text:s text:c="4"/></text:p>
      <text:p text:style-name="Preformatted_20_Text"><text:s text:c="4"/>double getAverageThreatLevel() const {</text:p>
      <text:p text:style-name="Preformatted_20_Text"><text:s text:c="8"/>// Implementation would calculate based on various threat indicators</text:p>
      <text:p text:style-name="Preformatted_20_Text"><text:s text:c="8"/>return average_threat_level;</text:p>
      <text:p text:style-name="Preformatted_20_Text"><text:s text:c="4"/>}</text:p>
      <text:p text:style-name="Preformatted_20_Text"><text:s text:c="4"/></text:p>
      <text:p text:style-name="Preformatted_20_Text">private:</text:p>
      <text:p text:style-name="Preformatted_20_Text"><text:s text:c="4"/>bool high_frequency_patterns_detected;</text:p>
      <text:p text:style-name="Preformatted_20_Text"><text:s text:c="4"/>double average_threat_level;</text:p>
      <text:p text:style-name="Preformatted_20_Text">};</text:p>
      <text:p text:style-name="Preformatted_20_Text"/>
      <text:p text:style-name="Preformatted_20_Text">static void adjustBasedOnThreatIntelligence(const ThreatIntelligence&amp; intel) {</text:p>
      <text:p text:style-name="Preformatted_20_Text"><text:s text:c="4"/>// Input validation</text:p>
      <text:p text:style-name="Preformatted_20_Text"><text:s text:c="4"/>if (!isValidThreatIntel(intel)) {</text:p>
      <text:p text:style-name="Preformatted_20_Text"><text:s text:c="8"/>current_base_rate = 512000000.0; <text:s/>// Default safe rate</text:p>
      <text:p text:style-name="Preformatted_20_Text"><text:s text:c="8"/>logError("Invalid threat intelligence data received");</text:p>
      <text:p text:style-name="Preformatted_20_Text"><text:s text:c="8"/>return;</text:p>
      <text:p text:style-name="Preformatted_20_Text"><text:s text:c="4"/>}</text:p>
      <text:p text:style-name="Preformatted_20_Text"><text:s text:c="4"/></text:p>
      <text:p text:style-name="Preformatted_20_Text"><text:s text:c="4"/>// Intelligent frequency adjustment algorithm</text:p>
      <text:p text:style-name="Preformatted_20_Text"><text:s text:c="4"/>if (intel.hasHighFrequencyAttackPatterns()) {</text:p>
      <text:p text:style-name="Preformatted_20_Text"><text:s text:c="8"/>current_base_rate = 2048000000.0; <text:s/>// 2.048 GHz for high threat</text:p>
      <text:p text:style-name="Preformatted_20_Text"><text:s text:c="8"/>logSecurityEvent("High frequency attack patterns detected - maximum sampling rate engaged");</text:p>
      <text:p text:style-name="Preformatted_20_Text"><text:s text:c="4"/>} </text:p>
      <text:p text:style-name="Preformatted_20_Text"><text:s text:c="4"/>else if (intel.getAverageThreatLevel() &gt; 0.7) {</text:p>
      <text:p text:style-name="Preformatted_20_Text"><text:s text:c="8"/>current_base_rate = 1024000000.0; <text:s/>// 1.024 GHz for medium threat</text:p>
      <text:p text:style-name="Preformatted_20_Text"><text:s text:c="8"/>logSecurityEvent("Elevated threat level - increased sampling rate");</text:p>
      <text:p text:style-name="Preformatted_20_Text"><text:s text:c="4"/>} </text:p>
      <text:p text:style-name="Preformatted_20_Text"><text:s text:c="4"/>else if (intel.getAverageThreatLevel() &gt; 0.3) {</text:p>
      <text:p text:style-name="Preformatted_20_Text"><text:s text:c="8"/>current_base_rate = 768000000.0; <text:s text:c="2"/>// 768 MHz for low-medium threat</text:p>
      <text:p text:style-name="Preformatted_20_Text"><text:s text:c="4"/>}</text:p>
      <text:p text:style-name="Preformatted_20_Text"><text:s text:c="4"/>else {</text:p>
      <text:p text:style-name="Preformatted_20_Text"><text:s text:c="8"/>current_base_rate = 512000000.0; <text:s text:c="2"/>// 512 MHz for normal operation</text:p>
      <text:p text:style-name="Preformatted_20_Text"><text:s text:c="4"/>}</text:p>
      <text:p text:style-name="Preformatted_20_Text"><text:s text:c="4"/></text:p>
      <text:p text:style-name="Preformatted_20_Text"><text:s text:c="4"/>// Optional: Add rate limiting or smoothing</text:p>
      <text:p text:style-name="Preformatted_20_Text"><text:s text:c="4"/>current_base_rate = applyRateLimiting(current_base_rate);</text:p>
      <text:p text:style-name="Preformatted_20_Text"><text:s text:c="4"/></text:p>
      <text:p text:style-name="Preformatted_20_Text"><text:s text:c="4"/>// Update system configuration</text:p>
      <text:p text:style-name="Preformatted_20_Text"><text:s text:c="4"/>updateSystemSamplingRate(current_base_rate);</text:p>
      <text:p text:style-name="Preformatted_20_Text">}</text:p>
      <text:p text:style-name="Preformatted_20_Text"/>
      <text:p text:style-name="Preformatted_20_Text">// Helper functions (would need implementations)</text:p>
      <text:p text:style-name="Preformatted_20_Text">bool isValidThreatIntel(const ThreatIntelligence&amp; intel) {</text:p>
      <text:p text:style-name="Preformatted_20_Text"><text:s text:c="4"/>return intel.getAverageThreatLevel() &gt;= 0.0 &amp;&amp; </text:p>
      <text:p text:style-name="Preformatted_20_Text"><text:s text:c="11"/>intel.getAverageThreatLevel() &lt;= 1.0;</text:p>
      <text:p text:style-name="Preformatted_20_Text">}</text:p>
      <text:p text:style-name="Preformatted_20_Text"/>
      <text:p text:style-name="Preformatted_20_Text">double applyRateLimiting(double target_rate) {</text:p>
      <text:p text:style-name="Preformatted_20_Text"><text:s text:c="4"/>// Prevent rapid fluctuations</text:p>
      <text:p text:style-name="Preformatted_20_Text"><text:soft-page-break/><text:s text:c="4"/>static double previous_rate = 512000000.0;</text:p>
      <text:p text:style-name="Preformatted_20_Text"><text:s text:c="4"/>double max_change = previous_rate * 0.5; <text:s/>// Max 50% change</text:p>
      <text:p text:style-name="Preformatted_20_Text"><text:s text:c="4"/>double new_rate = std::clamp(target_rate, </text:p>
      <text:p text:style-name="Preformatted_20_Text"><text:s text:c="33"/>previous_rate - max_change, </text:p>
      <text:p text:style-name="Preformatted_20_Text"><text:s text:c="33"/>previous_rate + max_change);</text:p>
      <text:p text:style-name="Preformatted_20_Text"><text:s text:c="4"/>previous_rate = new_rate;</text:p>
      <text:p text:style-name="Preformatted_20_Text"><text:s text:c="4"/>return new_rate;</text:p>
      <text:p text:style-name="Preformatted_20_Text">}</text:p>
      <text:p text:style-name="Preformatted_20_Text"/>
      <text:p text:style-name="Preformatted_20_Text">void logError(const std::string&amp; message) {</text:p>
      <text:p text:style-name="Preformatted_20_Text"><text:s text:c="4"/>// Implementation would log to security system</text:p>
      <text:p text:style-name="Preformatted_20_Text"><text:s text:c="4"/>std::cerr &lt;&lt; "[ERROR] " &lt;&lt; message &lt;&lt; std::endl;</text:p>
      <text:p text:style-name="Preformatted_20_Text">}</text:p>
      <text:p text:style-name="Preformatted_20_Text"/>
      <text:p text:style-name="Preformatted_20_Text">void logSecurityEvent(const std::string&amp; message) {</text:p>
      <text:p text:style-name="Preformatted_20_Text"><text:s text:c="4"/>// Implementation would log to security event system</text:p>
      <text:p text:style-name="Preformatted_20_Text"><text:s text:c="4"/>std::cout &lt;&lt; "[SECURITY] " &lt;&lt; message &lt;&lt; std::endl;</text:p>
      <text:p text:style-name="Preformatted_20_Text">}</text:p>
      <text:p text:style-name="Preformatted_20_Text"/>
      <text:p text:style-name="Preformatted_20_Text">void updateSystemSamplingRate(double rate) {</text:p>
      <text:p text:style-name="Preformatted_20_Text"><text:s text:c="4"/>// Implementation would update hardware/software sampling rate</text:p>
      <text:p text:style-name="Preformatted_20_Text"><text:s text:c="4"/>// This is platform/system specific</text:p>
      <text:p text:style-name="Preformatted_20_Text"><text:s text:c="4"/>std::cout &lt;&lt; "Setting sampling rate to: " &lt;&lt; rate &lt;&lt; " Hz" &lt;&lt; std::endl;</text:p>
      <text:p text:style-name="P3">}</text:p>
      <text:p text:style-name="Text_20_body"><text:span text:style-name="Strong_20_Emphasis">Key improvements made:</text:span></text:p>
      <text:list xml:id="list4469413511285330963" text:style-name="L1">
        <text:list-item>
          <text:p text:style-name="P1"><text:span text:style-name="Strong_20_Emphasis">Added input validation</text:span> - Checks if threat intelligence data is valid before processing</text:p>
        </text:list-item>
        <text:list-item>
          <text:p text:style-name="P1"><text:span text:style-name="Strong_20_Emphasis">Enhanced threat level granularity</text:span> - Added an intermediate threat level (0.3-0.7 range)</text:p>
        </text:list-item>
        <text:list-item>
          <text:p text:style-name="P1"><text:span text:style-name="Strong_20_Emphasis">Added logging</text:span> - Security events and errors are now logged</text:p>
        </text:list-item>
        <text:list-item>
          <text:p text:style-name="P1"><text:span text:style-name="Strong_20_Emphasis">Rate limiting/smoothing</text:span> - Prevents rapid frequency fluctuations that could destabilize the system</text:p>
        </text:list-item>
        <text:list-item>
          <text:p text:style-name="P1"><text:span text:style-name="Strong_20_Emphasis">System integration</text:span> - Added a function to actually apply the sampling rate to the system</text:p>
        </text:list-item>
        <text:list-item>
          <text:p text:style-name="P1"><text:span text:style-name="Strong_20_Emphasis">Error handling</text:span> - Defaults to safe frequency if input is invalid</text:p>
        </text:list-item>
        <text:list-item>
          <text:p text:style-name="P1"><text:span text:style-name="Strong_20_Emphasis">Added comments</text:span> - Clearly explains the purpose of each frequency tier</text:p>
        </text:list-item>
      </text:list>
      <text:p text:style-name="Text_20_body"><text:span text:style-name="Strong_20_Emphasis">Note:</text:span> For a complete implementation, you would need to:</text:p>
      <text:list xml:id="list7124145440311771049" text:style-name="L2">
        <text:list-item>
          <text:p text:style-name="P2">Define the actual <text:span text:style-name="Source_20_Text">ThreatIntelligence</text:span> class with real data sources</text:p>
        </text:list-item>
        <text:list-item>
          <text:p text:style-name="P2">Implement proper logging to your security system</text:p>
        </text:list-item>
        <text:list-item>
          <text:p text:style-name="P2">Replace the <text:span text:style-name="Source_20_Text">updateSystemSamplingRate</text:span> with actual hardware/software API calls</text:p>
        </text:list-item>
        <text:list-item>
          <text:p text:style-name="P2">Adjust frequency values based on your specific hardware capabilities</text:p>
        </text:list-item>
        <text:list-item>
          <text:p text:style-name="P2">Add configuration options (possibly from a config file) for the frequency values</text:p>
        </text:list-item>
        <text:list-item>
          <text:p text:style-name="P2">Consider thread safety if this function is called from multiple threads</text:p>
        </text:list-item>
      </text:list>
      <text:p text:style-name="Text_20_body">The function now properly handles real threat intelligence data and safely adjusts system frequencies with appropriate safeguard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10T14:10:33.39</meta:creation-date>
    <meta:document-statistic meta:table-count="0" meta:image-count="0" meta:object-count="0" meta:page-count="2" meta:paragraph-count="93" meta:word-count="518" meta:character-count="4235"/>
    <dc:date>2025-12-10T14:12:07.72</dc:date>
    <dc:creator>Peter Thompson</dc:creator>
    <meta:editing-duration>PT1M35S</meta:editing-duration>
    <meta:editing-cycles>1</meta:editing-cycles>
    <meta:generator>OpenOffice/4.1.15$Win32 OpenOffice.org_project/4115m2$Build-9813</meta:generator>
  </office:meta>
</office:document-meta>
</file>