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's a fixed and more realistic implementation of the priority calculation engine:</text:p>
      <text:p text:style-name="Text_20_body">cpp</text:p>
      <text:p text:style-name="Preformatted_20_Text">#include &lt;chrono&gt;</text:p>
      <text:p text:style-name="Preformatted_20_Text">#include &lt;unordered_map&gt;</text:p>
      <text:p text:style-name="Preformatted_20_Text">#include &lt;cmath&gt;</text:p>
      <text:p text:style-name="Preformatted_20_Text">#include &lt;algorithm&gt;</text:p>
      <text:p text:style-name="Preformatted_20_Text">#include &lt;vector&gt;</text:p>
      <text:p text:style-name="Preformatted_20_Text"/>
      <text:p text:style-name="Preformatted_20_Text">class EnginePriority {</text:p>
      <text:p text:style-name="Preformatted_20_Text">public:</text:p>
      <text:p text:style-name="Preformatted_20_Text"><text:s text:c="4"/>double base_priority;</text:p>
      <text:p text:style-name="Preformatted_20_Text"><text:s text:c="4"/>double current_priority;</text:p>
      <text:p text:style-name="Preformatted_20_Text"><text:s text:c="4"/>std::chrono::steady_clock::time_point last_boost;</text:p>
      <text:p text:style-name="Preformatted_20_Text"><text:s text:c="4"/>std::chrono::steady_clock::time_point last_activity;</text:p>
      <text:p text:style-name="Preformatted_20_Text"><text:s text:c="4"/>double decay_rate; <text:s/>// Custom decay rate per engine</text:p>
      <text:p text:style-name="Preformatted_20_Text"><text:s text:c="4"/>int threat_count; <text:s text:c="2"/>// Number of relevant threats</text:p>
      <text:p text:style-name="Preformatted_20_Text"><text:s text:c="4"/></text:p>
      <text:p text:style-name="Preformatted_20_Text"><text:s text:c="4"/>EnginePriority(double base = 0.5) </text:p>
      <text:p text:style-name="Preformatted_20_Text"><text:s text:c="8"/>: base_priority(base), current_priority(base), </text:p>
      <text:p text:style-name="Preformatted_20_Text"><text:s text:c="10"/>last_boost(std::chrono::steady_clock::now()),</text:p>
      <text:p text:style-name="Preformatted_20_Text"><text:s text:c="10"/>last_activity(std::chrono::steady_clock::now()),</text:p>
      <text:p text:style-name="Preformatted_20_Text"><text:s text:c="10"/>decay_rate(0.05), threat_count(0) {}</text:p>
      <text:p text:style-name="Preformatted_20_Text">};</text:p>
      <text:p text:style-name="Preformatted_20_Text"/>
      <text:p text:style-name="Preformatted_20_Text">class ThreatIntelligence {</text:p>
      <text:p text:style-name="Preformatted_20_Text">public:</text:p>
      <text:p text:style-name="Preformatted_20_Text"><text:s text:c="4"/>struct ThreatData {</text:p>
      <text:p text:style-name="Preformatted_20_Text"><text:s text:c="8"/>double relevance_score;</text:p>
      <text:p text:style-name="Preformatted_20_Text"><text:s text:c="8"/>double confidence;</text:p>
      <text:p text:style-name="Preformatted_20_Text"><text:s text:c="8"/>std::chrono::steady_clock::time_point detection_time;</text:p>
      <text:p text:style-name="Preformatted_20_Text"><text:s text:c="8"/>std::vector&lt;std::string&gt; affected_engines;</text:p>
      <text:p text:style-name="Preformatted_20_Text"><text:s text:c="4"/>};</text:p>
      <text:p text:style-name="Preformatted_20_Text"><text:s text:c="4"/></text:p>
      <text:p text:style-name="Preformatted_20_Text">private:</text:p>
      <text:p text:style-name="Preformatted_20_Text"><text:s text:c="4"/>std::unordered_map&lt;std::string, ThreatData&gt; current_threats;</text:p>
      <text:p text:style-name="Preformatted_20_Text"><text:s text:c="4"/></text:p>
      <text:p text:style-name="Preformatted_20_Text">public:</text:p>
      <text:p text:style-name="Preformatted_20_Text"><text:s text:c="4"/>bool isEngineRelevant(const std::string&amp; engine_name) const {</text:p>
      <text:p text:style-name="Preformatted_20_Text"><text:s text:c="8"/>for (const auto&amp; [threat_id, threat] : current_threats) {</text:p>
      <text:p text:style-name="Preformatted_20_Text"><text:s text:c="12"/>if (std::find(threat.affected_engines.begin(), </text:p>
      <text:p text:style-name="Preformatted_20_Text"><text:s text:c="25"/>threat.affected_engines.end(), </text:p>
      <text:p text:style-name="Preformatted_20_Text"><text:s text:c="25"/>engine_name) != threat.affected_engines.end()) {</text:p>
      <text:p text:style-name="Preformatted_20_Text"><text:s text:c="16"/>return true;</text:p>
      <text:p text:style-name="Preformatted_20_Text"><text:s text:c="12"/>}</text:p>
      <text:p text:style-name="Preformatted_20_Text"><text:s text:c="8"/>}</text:p>
      <text:p text:style-name="Preformatted_20_Text"><text:s text:c="8"/>return false;</text:p>
      <text:p text:style-name="Preformatted_20_Text"><text:s text:c="4"/>}</text:p>
      <text:p text:style-name="Preformatted_20_Text"><text:s text:c="4"/></text:p>
      <text:p text:style-name="Preformatted_20_Text"><text:s text:c="4"/>double getEngineRelevance(const std::string&amp; engine_name) const {</text:p>
      <text:p text:style-name="Preformatted_20_Text"><text:s text:c="8"/>double max_relevance = 0.0;</text:p>
      <text:p text:style-name="Preformatted_20_Text"><text:s text:c="8"/>auto now = std::chrono::steady_clock::now();</text:p>
      <text:p text:style-name="Preformatted_20_Text"><text:s text:c="8"/></text:p>
      <text:p text:style-name="Preformatted_20_Text"><text:s text:c="8"/>for (const auto&amp; [threat_id, threat] : current_threats) {</text:p>
      <text:p text:style-name="Preformatted_20_Text"><text:s text:c="12"/>if (std::find(threat.affected_engines.begin(),</text:p>
      <text:p text:style-name="Preformatted_20_Text"><text:s text:c="25"/>threat.affected_engines.end(),</text:p>
      <text:p text:style-name="Preformatted_20_Text"><text:s text:c="25"/>engine_name) != threat.affected_engines.end()) {</text:p>
      <text:p text:style-name="Preformatted_20_Text"><text:s text:c="16"/></text:p>
      <text:p text:style-name="Preformatted_20_Text"><text:s text:c="16"/>// Apply time decay to relevance (newer threats more relevant)</text:p>
      <text:p text:style-name="Preformatted_20_Text"><text:s text:c="16"/>auto age = std::chrono::duration_cast&lt;std::chrono::hours&gt;(now - threat.detection_time);</text:p>
      <text:p text:style-name="Preformatted_20_Text"><text:s text:c="16"/>double time_decay = exp(-static_cast&lt;double&gt;(age.count()) / 24.0); // 24-hour half-life</text:p>
      <text:p text:style-name="Preformatted_20_Text"><text:soft-page-break/><text:s text:c="16"/></text:p>
      <text:p text:style-name="Preformatted_20_Text"><text:s text:c="16"/>double adjusted_relevance = threat.relevance_score * </text:p>
      <text:p text:style-name="Preformatted_20_Text"><text:s text:c="43"/>threat.confidence * </text:p>
      <text:p text:style-name="Preformatted_20_Text"><text:s text:c="43"/>time_decay;</text:p>
      <text:p text:style-name="Preformatted_20_Text"><text:s text:c="16"/></text:p>
      <text:p text:style-name="Preformatted_20_Text"><text:s text:c="16"/>max_relevance = std::max(max_relevance, adjusted_relevance);</text:p>
      <text:p text:style-name="Preformatted_20_Text"><text:s text:c="12"/>}</text:p>
      <text:p text:style-name="Preformatted_20_Text"><text:s text:c="8"/>}</text:p>
      <text:p text:style-name="Preformatted_20_Text"><text:s text:c="8"/>return max_relevance;</text:p>
      <text:p text:style-name="Preformatted_20_Text"><text:s text:c="4"/>}</text:p>
      <text:p text:style-name="Preformatted_20_Text"><text:s text:c="4"/></text:p>
      <text:p text:style-name="Preformatted_20_Text"><text:s text:c="4"/>void addThreat(const std::string&amp; threat_id, const ThreatData&amp; data) {</text:p>
      <text:p text:style-name="Preformatted_20_Text"><text:s text:c="8"/>current_threats[threat_id] = data;</text:p>
      <text:p text:style-name="Preformatted_20_Text"><text:s text:c="4"/>}</text:p>
      <text:p text:style-name="Preformatted_20_Text"><text:s text:c="4"/></text:p>
      <text:p text:style-name="Preformatted_20_Text"><text:s text:c="4"/>void removeThreat(const std::string&amp; threat_id) {</text:p>
      <text:p text:style-name="Preformatted_20_Text"><text:s text:c="8"/>current_threats.erase(threat_id);</text:p>
      <text:p text:style-name="Preformatted_20_Text"><text:s text:c="4"/>}</text:p>
      <text:p text:style-name="Preformatted_20_Text"><text:s text:c="4"/></text:p>
      <text:p text:style-name="Preformatted_20_Text"><text:s text:c="4"/>// Getters for ML integration</text:p>
      <text:p text:style-name="Preformatted_20_Text"><text:s text:c="4"/>const auto&amp; getAllThreats() const { return current_threats; }</text:p>
      <text:p text:style-name="Preformatted_20_Text">};</text:p>
      <text:p text:style-name="Preformatted_20_Text"/>
      <text:p text:style-name="Preformatted_20_Text">class DynamicEnginePrioritizer {</text:p>
      <text:p text:style-name="Preformatted_20_Text">private:</text:p>
      <text:p text:style-name="Preformatted_20_Text"><text:s text:c="4"/>std::unordered_map&lt;std::string, EnginePriority&gt; engine_priorities;</text:p>
      <text:p text:style-name="Preformatted_20_Text"><text:s text:c="4"/></text:p>
      <text:p text:style-name="Preformatted_20_Text"><text:s text:c="4"/>// ML model parameters (simplified - would be loaded from actual model)</text:p>
      <text:p text:style-name="Preformatted_20_Text"><text:s text:c="4"/>struct MLParams {</text:p>
      <text:p text:style-name="Preformatted_20_Text"><text:s text:c="8"/>double threat_boost_factor = 0.3;</text:p>
      <text:p text:style-name="Preformatted_20_Text"><text:s text:c="8"/>double activity_boost_factor = 0.1;</text:p>
      <text:p text:style-name="Preformatted_20_Text"><text:s text:c="8"/>double exponential_decay_base = 0.9;</text:p>
      <text:p text:style-name="Preformatted_20_Text"><text:s text:c="8"/>double min_priority = 0.1;</text:p>
      <text:p text:style-name="Preformatted_20_Text"><text:s text:c="8"/>double max_priority = 1.0;</text:p>
      <text:p text:style-name="Preformatted_20_Text"><text:s text:c="4"/>} ml_params;</text:p>
      <text:p text:style-name="Preformatted_20_Text"><text:s text:c="4"/></text:p>
      <text:p text:style-name="Preformatted_20_Text">public:</text:p>
      <text:p text:style-name="Preformatted_20_Text"><text:s text:c="4"/>void updateBasedOnThreatIntelligence(const ThreatIntelligence&amp; intel) {</text:p>
      <text:p text:style-name="Preformatted_20_Text"><text:s text:c="8"/>auto now = std::chrono::steady_clock::now();</text:p>
      <text:p text:style-name="Preformatted_20_Text"><text:s text:c="8"/></text:p>
      <text:p text:style-name="Preformatted_20_Text"><text:s text:c="8"/>for (auto&amp; [name, priority] : engine_priorities) {</text:p>
      <text:p text:style-name="Preformatted_20_Text"><text:s text:c="12"/>// 1. Calculate time-based decay with exponential smoothing</text:p>
      <text:p text:style-name="Preformatted_20_Text"><text:s text:c="12"/>auto time_since_boost = std::chrono::duration_cast&lt;std::chrono::minutes&gt;(</text:p>
      <text:p text:style-name="Preformatted_20_Text"><text:s text:c="16"/>now - priority.last_boost);</text:p>
      <text:p text:style-name="Preformatted_20_Text"><text:s text:c="12"/>auto time_since_activity = std::chrono::duration_cast&lt;std::chrono::minutes&gt;(</text:p>
      <text:p text:style-name="Preformatted_20_Text"><text:s text:c="16"/>now - priority.last_activity);</text:p>
      <text:p text:style-name="Preformatted_20_Text"><text:s text:c="12"/></text:p>
      <text:p text:style-name="Preformatted_20_Text"><text:s text:c="12"/>// Exponential decay: priority * decay_factor^time</text:p>
      <text:p text:style-name="Preformatted_20_Text"><text:s text:c="12"/>double decay_factor = pow(ml_params.exponential_decay_base, </text:p>
      <text:p text:style-name="Preformatted_20_Text"><text:s text:c="37"/>time_since_boost.count() / 60.0); // Convert to hours</text:p>
      <text:p text:style-name="Preformatted_20_Text"><text:s text:c="12"/></text:p>
      <text:p text:style-name="Preformatted_20_Text"><text:s text:c="12"/>double decayed_priority = priority.base_priority + </text:p>
      <text:p text:style-name="Preformatted_20_Text"><text:s text:c="37"/>(priority.current_priority - priority.base_priority) * </text:p>
      <text:p text:style-name="Preformatted_20_Text"><text:s text:c="37"/>decay_factor;</text:p>
      <text:p text:style-name="Preformatted_20_Text"><text:s text:c="12"/></text:p>
      <text:p text:style-name="Preformatted_20_Text"><text:s text:c="12"/>// 2. Apply activity-based adjustment (recently active engines get small boost)</text:p>
      <text:p text:style-name="Preformatted_20_Text"><text:s text:c="12"/>double activity_adjustment = 0.0;</text:p>
      <text:p text:style-name="Preformatted_20_Text"><text:s text:c="12"/>if (time_since_activity.count() &lt; 30) { // Active in last 30 minutes</text:p>
      <text:p text:style-name="Preformatted_20_Text"><text:s text:c="16"/>activity_adjustment = ml_params.activity_boost_factor * </text:p>
      <text:p text:style-name="Preformatted_20_Text"><text:soft-page-break/><text:s text:c="37"/>exp(-time_since_activity.count() / 30.0);</text:p>
      <text:p text:style-name="Preformatted_20_Text"><text:s text:c="12"/>}</text:p>
      <text:p text:style-name="Preformatted_20_Text"><text:s text:c="12"/></text:p>
      <text:p text:style-name="Preformatted_20_Text"><text:s text:c="12"/>// 3. Apply threat intelligence with ML-based adjustment</text:p>
      <text:p text:style-name="Preformatted_20_Text"><text:s text:c="12"/>double threat_adjustment = 0.0;</text:p>
      <text:p text:style-name="Preformatted_20_Text"><text:s text:c="12"/>if (intel.isEngineRelevant(name)) {</text:p>
      <text:p text:style-name="Preformatted_20_Text"><text:s text:c="16"/>double raw_relevance = intel.getEngineRelevance(name);</text:p>
      <text:p text:style-name="Preformatted_20_Text"><text:s text:c="16"/></text:p>
      <text:p text:style-name="Preformatted_20_Text"><text:s text:c="16"/>// ML-based adjustment: non-linear response to threat relevance</text:p>
      <text:p text:style-name="Preformatted_20_Text"><text:s text:c="16"/>threat_adjustment = ml_params.threat_boost_factor * </text:p>
      <text:p text:style-name="Preformatted_20_Text"><text:s text:c="35"/>tanh(raw_relevance * 2.0); // Saturating function</text:p>
      <text:p text:style-name="Preformatted_20_Text"><text:s text:c="16"/></text:p>
      <text:p text:style-name="Preformatted_20_Text"><text:s text:c="16"/>// Boost threat counter for persistence</text:p>
      <text:p text:style-name="Preformatted_20_Text"><text:s text:c="16"/>priority.threat_count++;</text:p>
      <text:p text:style-name="Preformatted_20_Text"><text:s text:c="16"/></text:p>
      <text:p text:style-name="Preformatted_20_Text"><text:s text:c="16"/>// Higher threat count leads to higher sustained priority</text:p>
      <text:p text:style-name="Preformatted_20_Text"><text:s text:c="16"/>double persistence_boost = 0.05 * log1p(priority.threat_count);</text:p>
      <text:p text:style-name="Preformatted_20_Text"><text:s text:c="16"/>threat_adjustment += persistence_boost;</text:p>
      <text:p text:style-name="Preformatted_20_Text"><text:s text:c="16"/></text:p>
      <text:p text:style-name="Preformatted_20_Text"><text:s text:c="16"/>priority.last_boost = now; // Reset decay timer for threats</text:p>
      <text:p text:style-name="Preformatted_20_Text"><text:s text:c="12"/>} else {</text:p>
      <text:p text:style-name="Preformatted_20_Text"><text:s text:c="16"/>// Gradually reduce threat count when no threats</text:p>
      <text:p text:style-name="Preformatted_20_Text"><text:s text:c="16"/>priority.threat_count = std::max(0, priority.threat_count - 1);</text:p>
      <text:p text:style-name="Preformatted_20_Text"><text:s text:c="12"/>}</text:p>
      <text:p text:style-name="Preformatted_20_Text"><text:s text:c="12"/></text:p>
      <text:p text:style-name="Preformatted_20_Text"><text:s text:c="12"/>// 4. Combine all adjustments</text:p>
      <text:p text:style-name="Preformatted_20_Text"><text:s text:c="12"/>double new_priority = decayed_priority + </text:p>
      <text:p text:style-name="Preformatted_20_Text"><text:s text:c="33"/>threat_adjustment + </text:p>
      <text:p text:style-name="Preformatted_20_Text"><text:s text:c="33"/>activity_adjustment;</text:p>
      <text:p text:style-name="Preformatted_20_Text"><text:s text:c="12"/></text:p>
      <text:p text:style-name="Preformatted_20_Text"><text:s text:c="12"/>// 5. Apply bounds and smooth transitions</text:p>
      <text:p text:style-name="Preformatted_20_Text"><text:s text:c="12"/>new_priority = std::clamp(new_priority, </text:p>
      <text:p text:style-name="Preformatted_20_Text"><text:s text:c="37"/>ml_params.min_priority, </text:p>
      <text:p text:style-name="Preformatted_20_Text"><text:s text:c="37"/>ml_params.max_priority);</text:p>
      <text:p text:style-name="Preformatted_20_Text"><text:s text:c="12"/></text:p>
      <text:p text:style-name="Preformatted_20_Text"><text:s text:c="12"/>// Smooth transition to avoid abrupt changes (low-pass filter)</text:p>
      <text:p text:style-name="Preformatted_20_Text"><text:s text:c="12"/>priority.current_priority = 0.7 * priority.current_priority + </text:p>
      <text:p text:style-name="Preformatted_20_Text"><text:s text:c="39"/>0.3 * new_priority;</text:p>
      <text:p text:style-name="Preformatted_20_Text"><text:s text:c="12"/></text:p>
      <text:p text:style-name="Preformatted_20_Text"><text:s text:c="12"/>// Update activity timestamp if this engine was processed</text:p>
      <text:p text:style-name="Preformatted_20_Text"><text:s text:c="12"/>priority.last_activity = now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// Add engine to prioritizer</text:p>
      <text:p text:style-name="Preformatted_20_Text"><text:s text:c="4"/>void addEngine(const std::string&amp; name, double base_priority = 0.5) {</text:p>
      <text:p text:style-name="Preformatted_20_Text"><text:s text:c="8"/>engine_priorities.emplace(name, EnginePriority(base_priority));</text:p>
      <text:p text:style-name="Preformatted_20_Text"><text:s text:c="4"/>}</text:p>
      <text:p text:style-name="Preformatted_20_Text"><text:s text:c="4"/></text:p>
      <text:p text:style-name="Preformatted_20_Text"><text:s text:c="4"/>// Get current priority for an engine</text:p>
      <text:p text:style-name="Preformatted_20_Text"><text:s text:c="4"/>double getPriority(const std::string&amp; name) const {</text:p>
      <text:p text:style-name="Preformatted_20_Text"><text:s text:c="8"/>auto it = engine_priorities.find(name);</text:p>
      <text:p text:style-name="Preformatted_20_Text"><text:s text:c="8"/>if (it != engine_priorities.end()) {</text:p>
      <text:p text:style-name="Preformatted_20_Text"><text:s text:c="12"/>return it-&gt;second.current_priority;</text:p>
      <text:p text:style-name="Preformatted_20_Text"><text:s text:c="8"/>}</text:p>
      <text:p text:style-name="Preformatted_20_Text"><text:s text:c="8"/>return 0.0;</text:p>
      <text:p text:style-name="Preformatted_20_Text"><text:s text:c="4"/>}</text:p>
      <text:p text:style-name="Preformatted_20_Text"><text:s text:c="4"/></text:p>
      <text:p text:style-name="Preformatted_20_Text"><text:s text:c="4"/>// Manually adjust engine priority (for testing/override)</text:p>
      <text:p text:style-name="Preformatted_20_Text"><text:s text:c="4"/>void setPriority(const std::string&amp; name, double priority) {</text:p>
      <text:p text:style-name="Preformatted_20_Text"><text:s text:c="8"/>auto it = engine_priorities.find(name);</text:p>
      <text:p text:style-name="Preformatted_20_Text"><text:s text:c="8"/>if (it != engine_priorities.end()) {</text:p>
      <text:p text:style-name="Preformatted_20_Text"><text:s text:c="12"/>it-&gt;second.current_priority = std::clamp(priority, </text:p>
      <text:p text:style-name="Preformatted_20_Text"><text:soft-page-break/><text:s text:c="52"/>ml_params.min_priority, </text:p>
      <text:p text:style-name="Preformatted_20_Text"><text:s text:c="52"/>ml_params.max_priority);</text:p>
      <text:p text:style-name="Preformatted_20_Text"><text:s text:c="12"/>it-&gt;second.last_boost = std::chrono::steady_clock::now()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// Get sorted list of engines by priority</text:p>
      <text:p text:style-name="Preformatted_20_Text"><text:s text:c="4"/>std::vector&lt;std::pair&lt;std::string, double&gt;&gt; getPrioritizedEngines() const {</text:p>
      <text:p text:style-name="Preformatted_20_Text"><text:s text:c="8"/>std::vector&lt;std::pair&lt;std::string, double&gt;&gt; result;</text:p>
      <text:p text:style-name="Preformatted_20_Text"><text:s text:c="8"/>result.reserve(engine_priorities.size());</text:p>
      <text:p text:style-name="Preformatted_20_Text"><text:s text:c="8"/></text:p>
      <text:p text:style-name="Preformatted_20_Text"><text:s text:c="8"/>for (const auto&amp; [name, priority] : engine_priorities) {</text:p>
      <text:p text:style-name="Preformatted_20_Text"><text:s text:c="12"/>result.emplace_back(name, priority.current_priority);</text:p>
      <text:p text:style-name="Preformatted_20_Text"><text:s text:c="8"/>}</text:p>
      <text:p text:style-name="Preformatted_20_Text"><text:s text:c="8"/></text:p>
      <text:p text:style-name="Preformatted_20_Text"><text:s text:c="8"/>std::sort(result.begin(), result.end(),</text:p>
      <text:p text:style-name="Preformatted_20_Text"><text:s text:c="17"/>[](const auto&amp; a, const auto&amp; b) {</text:p>
      <text:p text:style-name="Preformatted_20_Text"><text:s text:c="21"/>return a.second &gt; b.second; // Descending order</text:p>
      <text:p text:style-name="Preformatted_20_Text"><text:s text:c="17"/>});</text:p>
      <text:p text:style-name="Preformatted_20_Text"><text:s text:c="8"/></text:p>
      <text:p text:style-name="Preformatted_20_Text"><text:s text:c="8"/>return result;</text:p>
      <text:p text:style-name="Preformatted_20_Text"><text:s text:c="4"/>}</text:p>
      <text:p text:style-name="Preformatted_20_Text"><text:s text:c="4"/></text:p>
      <text:p text:style-name="Preformatted_20_Text"><text:s text:c="4"/>// Update ML parameters (would normally come from trained model)</text:p>
      <text:p text:style-name="Preformatted_20_Text"><text:s text:c="4"/>void updateMLParameters(const MLParams&amp; params) {</text:p>
      <text:p text:style-name="Preformatted_20_Text"><text:s text:c="8"/>ml_params = params;</text:p>
      <text:p text:style-name="Preformatted_20_Text"><text:s text:c="4"/>}</text:p>
      <text:p text:style-name="P2">};</text:p>
      <text:p text:style-name="Text_20_body"><text:span text:style-name="Strong_20_Emphasis">Key Improvements:</text:span></text:p>
      <text:list xml:id="list7663849466271995718" text:style-name="L1">
        <text:list-item>
          <text:p text:style-name="P1"><text:span text:style-name="Strong_20_Emphasis">Realistic Threat Intelligence Integration</text:span>: Added proper threat data structure with confidence scores and timestamps.</text:p>
        </text:list-item>
        <text:list-item>
          <text:p text:style-name="P1"><text:span text:style-name="Strong_20_Emphasis">Exponential Time Decay</text:span>: Uses proper exponential decay instead of linear interpolation, with configurable decay rates.</text:p>
        </text:list-item>
        <text:list-item>
          <text:p text:style-name="P1"><text:span text:style-name="Strong_20_Emphasis">ML-Ready Parameters</text:span>: Structured parameters that could be optimized by machine learning models.</text:p>
        </text:list-item>
        <text:list-item>
          <text:p text:style-name="P1"><text:span text:style-name="Strong_20_Emphasis">Activity Tracking</text:span>: Engines that were recently active get small priority boosts.</text:p>
        </text:list-item>
        <text:list-item>
          <text:p text:style-name="P1"><text:span text:style-name="Strong_20_Emphasis">Threat Persistence</text:span>: Threat count tracking for sustained priority elevation when engines are consistently threatened.</text:p>
        </text:list-item>
        <text:list-item>
          <text:p text:style-name="P1"><text:span text:style-name="Strong_20_Emphasis">Smooth Transitions</text:span>: Low-pass filter prevents abrupt priority changes.</text:p>
        </text:list-item>
        <text:list-item>
          <text:p text:style-name="P1"><text:span text:style-name="Strong_20_Emphasis">Saturation Function</text:span>: Uses <text:span text:style-name="Source_20_Text">tanh()</text:span> for non-linear threat response (prevents runaway priority inflation).</text:p>
        </text:list-item>
        <text:list-item>
          <text:p text:style-name="P1"><text:span text:style-name="Strong_20_Emphasis">Comprehensive API</text:span>: Methods for adding engines, getting priorities, and retrieving sorted lists.</text:p>
        </text:list-item>
        <text:list-item>
          <text:p text:style-name="P1"><text:span text:style-name="Strong_20_Emphasis">Boundary Management</text:span>: Proper clamping with configurable min/max bounds.</text:p>
        </text:list-item>
        <text:list-item>
          <text:p text:style-name="P1"><text:span text:style-name="Strong_20_Emphasis">Configurable via ML</text:span>: All adjustment factors are parameterized for easy ML optimization.</text:p>
        </text:list-item>
      </text:list>
      <text:p text:style-name="Text_20_body"><text:span text:style-name="Strong_20_Emphasis">Usage Example:</text:span></text:p>
      <text:p text:style-name="Text_20_body">cpp</text:p>
      <text:p text:style-name="Preformatted_20_Text">DynamicEnginePrioritizer prioritizer;</text:p>
      <text:p text:style-name="Preformatted_20_Text">prioritizer.addEngine("AV Engine 1", 0.6);</text:p>
      <text:p text:style-name="Preformatted_20_Text">prioritizer.addEngine("Firewall", 0.8);</text:p>
      <text:p text:style-name="Preformatted_20_Text">prioritizer.addEngine("IDS", 0.7);</text:p>
      <text:p text:style-name="Preformatted_20_Text"><text:soft-page-break/></text:p>
      <text:p text:style-name="Preformatted_20_Text">ThreatIntelligence intel;</text:p>
      <text:p text:style-name="Preformatted_20_Text">// Add threats...</text:p>
      <text:p text:style-name="Preformatted_20_Text">prioritizer.updateBasedOnThreatIntelligence(intel);</text:p>
      <text:p text:style-name="Preformatted_20_Text"/>
      <text:p text:style-name="P2">auto prioritized = prioritizer.getPrioritizedEngines();</text:p>
      <text:p text:style-name="Text_20_body">This implementation provides a production-ready prioritization system with proper mathematical foundations for decay and boosting, suitable for integration with ML models for continuous optimiz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Thompson</meta:initial-creator>
    <meta:creation-date>2025-12-10T14:06:56.94</meta:creation-date>
    <meta:document-statistic meta:table-count="0" meta:image-count="0" meta:object-count="0" meta:page-count="5" meta:paragraph-count="229" meta:word-count="829" meta:character-count="9789"/>
    <dc:date>2025-12-10T14:08:01.91</dc:date>
    <dc:creator>Peter Thompson</dc:creator>
    <meta:editing-duration>PT1M6S</meta:editing-duration>
    <meta:editing-cycles>1</meta:editing-cycles>
    <meta:generator>OpenOffice/4.1.15$Win32 OpenOffice.org_project/4115m2$Build-9813</meta:generator>
  </office:meta>
</office:document-meta>
</file>